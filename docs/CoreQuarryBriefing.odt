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CA00000326B69632D9.png" manifest:media-type="image/png"/>
  <manifest:file-entry manifest:full-path="Pictures/1000000000000113000000B7C6751253.png" manifest:media-type="image/png"/>
  <manifest:file-entry manifest:full-path="Pictures/10000000000001620000008ED9F43F0E.png" manifest:media-type="image/png"/>
  <manifest:file-entry manifest:full-path="Pictures/10000000000000FC000000FC83698EFC.png" manifest:media-type="image/png"/>
  <manifest:file-entry manifest:full-path="Pictures/1000000000000352000000EC9D07F8E3.png" manifest:media-type="image/png"/>
  <manifest:file-entry manifest:full-path="Pictures/10000001000006600000037120C595D9.png" manifest:media-type="image/png"/>
  <manifest:file-entry manifest:full-path="Pictures/10000000000001900000010BB8C8B6CF.png" manifest:media-type="image/png"/>
  <manifest:file-entry manifest:full-path="Pictures/10000001000005CA0000032781D97E02.png" manifest:media-type="image/png"/>
  <manifest:file-entry manifest:full-path="Pictures/1000000100000001000000010F602221.gif" manifest:media-type="image/gif"/>
  <manifest:file-entry manifest:full-path="Pictures/10000000000001500000008CF7D39373.png" manifest:media-type="image/png"/>
  <manifest:file-entry manifest:full-path="Pictures/100000000000011700000090D4C12D0E.png" manifest:media-type="image/png"/>
  <manifest:file-entry manifest:full-path="Pictures/10000001000000A20000009694C0762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Google Sans" svg:font-family="'Google Sans', 'Helvetica Neue', sans-serif"/>
    <style:font-face style:name="Helvetica" svg:font-family="Helvetica" style:font-family-generic="roman" style:font-pitch="variable"/>
    <style:font-face style:name="Helvetica1" svg:font-family="Helvetica" style:font-family-generic="swiss" style:font-pitch="variable"/>
    <style:font-face style:name="HelveticaNeue" svg:font-family="HelveticaNeue" style:font-family-generic="roman" style:font-pitch="variable"/>
    <style:font-face style:name="HelveticaNeue1" svg:font-family="HelveticaNeue"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Bold" svg:font-family="Menlo-Bold" style:font-adornments="Regular" style:font-family-generic="swiss"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monospace" svg:font-family="monospace"/>
    <style:font-face style:name="webkit-standard" svg:font-family="webkit-standard"/>
  </office:font-face-decls>
  <office:automatic-styles>
    <style:style style:name="Table3" style:family="table">
      <style:table-properties style:width="5.7264in" table:align="left" style:writing-mode="page"/>
    </style:style>
    <style:style style:name="Table3.A" style:family="table-column">
      <style:table-column-properties style:column-width="1.3215in"/>
    </style:style>
    <style:style style:name="Table3.B" style:family="table-column">
      <style:table-column-properties style:column-width="1.4278in"/>
    </style:style>
    <style:style style:name="Table3.C" style:family="table-column">
      <style:table-column-properties style:column-width="1.7431in"/>
    </style:style>
    <style:style style:name="Table3.D" style:family="table-column">
      <style:table-column-properties style:column-width="1.234in"/>
    </style:style>
    <style:style style:name="Table3.A1" style:family="table-cell">
      <style:table-cell-properties style:vertical-align="middle" fo:padding="0.0194in" fo:border="none"/>
    </style:style>
    <style:style style:name="Table15" style:family="table">
      <style:table-properties style:width="6.6931in" table:align="left" style:writing-mode="page"/>
    </style:style>
    <style:style style:name="Table15.A" style:family="table-column">
      <style:table-column-properties style:column-width="1.5326in"/>
    </style:style>
    <style:style style:name="Table15.B" style:family="table-column">
      <style:table-column-properties style:column-width="1.3667in"/>
    </style:style>
    <style:style style:name="Table15.C" style:family="table-column">
      <style:table-column-properties style:column-width="2.9257in"/>
    </style:style>
    <style:style style:name="Table15.D" style:family="table-column">
      <style:table-column-properties style:column-width="0.8681in"/>
    </style:style>
    <style:style style:name="Table15.A1" style:family="table-cell">
      <style:table-cell-properties style:vertical-align="middle" fo:padding="0in" fo:border="none"/>
    </style:style>
    <style:style style:name="Table4" style:family="table">
      <style:table-properties style:width="4.2715in" table:align="left" style:writing-mode="page"/>
    </style:style>
    <style:style style:name="Table4.A" style:family="table-column">
      <style:table-column-properties style:column-width="0.4632in"/>
    </style:style>
    <style:style style:name="Table4.B" style:family="table-column">
      <style:table-column-properties style:column-width="1.1125in"/>
    </style:style>
    <style:style style:name="Table4.C" style:family="table-column">
      <style:table-column-properties style:column-width="1.7271in"/>
    </style:style>
    <style:style style:name="Table4.D" style:family="table-column">
      <style:table-column-properties style:column-width="0.9688in"/>
    </style:style>
    <style:style style:name="Table4.A1" style:family="table-cell">
      <style:table-cell-properties style:vertical-align="middle" fo:padding="0.0194in" fo:border="none"/>
    </style:style>
    <style:style style:name="Table5" style:family="table">
      <style:table-properties style:width="6.5049in" table:align="left" style:writing-mode="page"/>
    </style:style>
    <style:style style:name="Table5.A" style:family="table-column">
      <style:table-column-properties style:column-width="2.4125in"/>
    </style:style>
    <style:style style:name="Table5.B" style:family="table-column">
      <style:table-column-properties style:column-width="4.0924in"/>
    </style:style>
    <style:style style:name="Table5.A1" style:family="table-cell">
      <style:table-cell-properties fo:padding="0in" fo:border="none"/>
    </style:style>
    <style:style style:name="Table6" style:family="table">
      <style:table-properties style:width="2.7201in" table:align="left" style:writing-mode="page"/>
    </style:style>
    <style:style style:name="Table6.A" style:family="table-column">
      <style:table-column-properties style:column-width="2.2333in"/>
    </style:style>
    <style:style style:name="Table6.B" style:family="table-column">
      <style:table-column-properties style:column-width="0.4868in"/>
    </style:style>
    <style:style style:name="Table6.A1" style:family="table-cell">
      <style:table-cell-properties style:vertical-align="middle" fo:padding="0.0194in" fo:border="none"/>
    </style:style>
    <style:style style:name="Table7" style:family="table">
      <style:table-properties style:width="1.7042in" table:align="left" style:writing-mode="page"/>
    </style:style>
    <style:style style:name="Table7.A" style:family="table-column">
      <style:table-column-properties style:column-width="0.7646in"/>
    </style:style>
    <style:style style:name="Table7.B" style:family="table-column">
      <style:table-column-properties style:column-width="0.9396in"/>
    </style:style>
    <style:style style:name="Table7.A1" style:family="table-cell">
      <style:table-cell-properties style:vertical-align="middle" fo:padding="0.0194in" fo:border="none"/>
    </style:style>
    <style:style style:name="Table8" style:family="table">
      <style:table-properties style:width="1.6875in" table:align="left" style:writing-mode="page"/>
    </style:style>
    <style:style style:name="Table8.A" style:family="table-column">
      <style:table-column-properties style:column-width="0.8944in"/>
    </style:style>
    <style:style style:name="Table8.B" style:family="table-column">
      <style:table-column-properties style:column-width="0.7931in"/>
    </style:style>
    <style:style style:name="Table8.A1" style:family="table-cell">
      <style:table-cell-properties style:vertical-align="middle" fo:padding="0.0194in" fo:border="none"/>
    </style:style>
    <style:style style:name="Table9" style:family="table">
      <style:table-properties style:width="1.6875in" table:align="left" style:writing-mode="page"/>
    </style:style>
    <style:style style:name="Table9.A" style:family="table-column">
      <style:table-column-properties style:column-width="0.8965in"/>
    </style:style>
    <style:style style:name="Table9.B" style:family="table-column">
      <style:table-column-properties style:column-width="0.791in"/>
    </style:style>
    <style:style style:name="Table9.A1" style:family="table-cell">
      <style:table-cell-properties style:vertical-align="middle" fo:padding="0.0194in" fo:border="none"/>
    </style:style>
    <style:style style:name="Table10" style:family="table">
      <style:table-properties style:width="1.7042in" table:align="left" style:writing-mode="page"/>
    </style:style>
    <style:style style:name="Table10.A" style:family="table-column">
      <style:table-column-properties style:column-width="0.8944in"/>
    </style:style>
    <style:style style:name="Table10.B" style:family="table-column">
      <style:table-column-properties style:column-width="0.8097in"/>
    </style:style>
    <style:style style:name="Table10.A1" style:family="table-cell">
      <style:table-cell-properties style:vertical-align="middle" fo:padding="0.0194in" fo:border="none"/>
    </style:style>
    <style:style style:name="Table11" style:family="table">
      <style:table-properties style:width="4.8951in" table:align="left" style:writing-mode="page"/>
    </style:style>
    <style:style style:name="Table11.A" style:family="table-column">
      <style:table-column-properties style:column-width="0.6833in"/>
    </style:style>
    <style:style style:name="Table11.B" style:family="table-column">
      <style:table-column-properties style:column-width="1.2625in"/>
    </style:style>
    <style:style style:name="Table11.C" style:family="table-column">
      <style:table-column-properties style:column-width="1.1806in"/>
    </style:style>
    <style:style style:name="Table11.D" style:family="table-column">
      <style:table-column-properties style:column-width="1.7688in"/>
    </style:style>
    <style:style style:name="Table11.A1" style:family="table-cell">
      <style:table-cell-properties style:vertical-align="middle" fo:padding="0.0194in" fo:border="none"/>
    </style:style>
    <style:style style:name="Table12" style:family="table">
      <style:table-properties style:width="3.7139in" table:align="left" style:writing-mode="page"/>
    </style:style>
    <style:style style:name="Table12.A" style:family="table-column">
      <style:table-column-properties style:column-width="0.8861in"/>
    </style:style>
    <style:style style:name="Table12.B" style:family="table-column">
      <style:table-column-properties style:column-width="2.8278in"/>
    </style:style>
    <style:style style:name="Table12.A1" style:family="table-cell">
      <style:table-cell-properties style:vertical-align="middle" fo:padding="0.0194in" fo:border="none"/>
    </style:style>
    <style:style style:name="Table13" style:family="table">
      <style:table-properties style:width="2.8924in" table:align="left" style:writing-mode="page"/>
    </style:style>
    <style:style style:name="Table13.A" style:family="table-column">
      <style:table-column-properties style:column-width="1.9403in"/>
    </style:style>
    <style:style style:name="Table13.B" style:family="table-column">
      <style:table-column-properties style:column-width="0.9521in"/>
    </style:style>
    <style:style style:name="Table13.A1" style:family="table-cell">
      <style:table-cell-properties style:vertical-align="middle" fo:padding="0.0194in" fo:border="none"/>
    </style:style>
    <style:style style:name="Table14" style:family="table">
      <style:table-properties style:width="6.6931in" table:align="left" style:writing-mode="page"/>
    </style:style>
    <style:style style:name="Table14.A" style:family="table-column">
      <style:table-column-properties style:column-width="0.9576in"/>
    </style:style>
    <style:style style:name="Table14.B" style:family="table-column">
      <style:table-column-properties style:column-width="1.0361in"/>
    </style:style>
    <style:style style:name="Table14.C" style:family="table-column">
      <style:table-column-properties style:column-width="1.9139in"/>
    </style:style>
    <style:style style:name="Table14.D" style:family="table-column">
      <style:table-column-properties style:column-width="1.0639in"/>
    </style:style>
    <style:style style:name="Table14.E" style:family="table-column">
      <style:table-column-properties style:column-width="1.7215in"/>
    </style:style>
    <style:style style:name="Table14.A1" style:family="table-cell">
      <style:table-cell-properties style:vertical-align="middle" fo:padding="0.0194in" fo:border="none"/>
    </style:style>
    <style:style style:name="Table1" style:family="table">
      <style:table-properties style:width="5.5625in" fo:margin-left="0.0278in" table:align="left" style:writing-mode="page"/>
    </style:style>
    <style:style style:name="Table1.A" style:family="table-column">
      <style:table-column-properties style:column-width="1.125in"/>
    </style:style>
    <style:style style:name="Table1.B" style:family="table-column">
      <style:table-column-properties style:column-width="1.5014in"/>
    </style:style>
    <style:style style:name="Table1.C" style:family="table-column">
      <style:table-column-properties style:column-width="2.9361in"/>
    </style:style>
    <style:style style:name="Table1.A1" style:family="table-cell">
      <style:table-cell-properties fo:padding="0in" fo:border="none"/>
    </style:style>
    <style:style style:name="Table1.3" style:family="table-row">
      <style:table-row-properties style:min-row-height="0.4201in"/>
    </style:style>
    <style:style style:name="Table2" style:family="table">
      <style:table-properties style:width="5.5597in" table:align="left" style:writing-mode="page"/>
    </style:style>
    <style:style style:name="Table2.A" style:family="table-column">
      <style:table-column-properties style:column-width="1.3097in"/>
    </style:style>
    <style:style style:name="Table2.B" style:family="table-column">
      <style:table-column-properties style:column-width="1.0007in"/>
    </style:style>
    <style:style style:name="Table2.C" style:family="table-column">
      <style:table-column-properties style:column-width="1.1236in"/>
    </style:style>
    <style:style style:name="Table2.D" style:family="table-column">
      <style:table-column-properties style:column-width="2.1257in"/>
    </style:style>
    <style:style style:name="Table2.A1" style:family="table-cell">
      <style:table-cell-properties fo:padding="0in" fo:border="none"/>
    </style:style>
    <style:style style:name="P1" style:family="paragraph" style:parent-style-name="Standard">
      <style:text-properties style:font-name="Carlito" fo:font-size="12pt" fo:font-weight="bold" officeooo:paragraph-rsid="000fcead" style:font-size-asian="12pt" style:font-weight-asian="bold" style:font-size-complex="12pt" style:font-weight-complex="bold"/>
    </style:style>
    <style:style style:name="P2" style:family="paragraph" style:parent-style-name="Standard">
      <style:text-properties style:font-name="Carlito" fo:font-size="12pt" fo:font-weight="bold" officeooo:paragraph-rsid="0088c215" style:font-size-asian="12pt" style:font-weight-asian="bold" style:font-size-complex="12pt" style:font-weight-complex="bold"/>
    </style:style>
    <style:style style:name="P3" style:family="paragraph" style:parent-style-name="Text_20_body">
      <style:paragraph-properties fo:margin-left="0in" fo:margin-right="0in" fo:orphans="2" fo:widows="2" fo:text-indent="0in" style:auto-text-indent="false"/>
      <style:text-properties style:font-name="Carlito" fo:font-size="12pt" fo:font-weight="bold" officeooo:rsid="001ce228" officeooo:paragraph-rsid="002a831d" style:font-size-asian="12pt" style:font-weight-asian="bold" style:font-size-complex="12pt" style:font-weight-complex="bold"/>
    </style:style>
    <style:style style:name="P4" style:family="paragraph" style:parent-style-name="Standard">
      <style:text-properties style:font-name="Carlito" officeooo:paragraph-rsid="005db5a3"/>
    </style:style>
    <style:style style:name="P5" style:family="paragraph" style:parent-style-name="Standard">
      <style:text-properties officeooo:rsid="000bbd3f" officeooo:paragraph-rsid="000bbd3f"/>
    </style:style>
    <style:style style:name="P6" style:family="paragraph" style:parent-style-name="Standard">
      <style:text-properties officeooo:paragraph-rsid="000bbd3f"/>
    </style:style>
    <style:style style:name="P7" style:family="paragraph" style:parent-style-name="Standard">
      <style:text-properties fo:font-weight="bold" officeooo:paragraph-rsid="000db080" style:font-weight-asian="bold" style:font-weight-complex="bold"/>
    </style:style>
    <style:style style:name="P8" style:family="paragraph" style:parent-style-name="Standard">
      <style:text-properties fo:font-weight="bold" officeooo:paragraph-rsid="000fcead" style:font-weight-asian="bold" style:font-weight-complex="bold"/>
    </style:style>
    <style:style style:name="P9" style:family="paragraph" style:parent-style-name="Table_20_Contents">
      <style:paragraph-properties fo:margin-top="0in" fo:margin-bottom="0.1965in" style:contextual-spacing="false"/>
      <style:text-properties fo:font-weight="bold"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0db080" officeooo:paragraph-rsid="000db080" style:font-weight-asian="bold" style:font-weight-complex="bold"/>
    </style:style>
    <style:style style:name="P12" style:family="paragraph" style:parent-style-name="Standard">
      <style:text-properties fo:font-weight="bold" officeooo:rsid="0018d26d" officeooo:paragraph-rsid="0018d26d" style:font-weight-asian="bold" style:font-weight-complex="bold"/>
    </style:style>
    <style:style style:name="P13" style:family="paragraph" style:parent-style-name="Text_20_body">
      <style:text-properties fo:font-weight="bold" officeooo:rsid="000bbd3f" officeooo:paragraph-rsid="000bbd3f" style:font-weight-asian="bold" style:font-weight-complex="bold"/>
    </style:style>
    <style:style style:name="P14" style:family="paragraph" style:parent-style-name="Standard">
      <style:text-properties officeooo:rsid="000fcead" officeooo:paragraph-rsid="000fcead"/>
    </style:style>
    <style:style style:name="P15" style:family="paragraph" style:parent-style-name="Standard">
      <style:text-properties officeooo:rsid="0011c311" officeooo:paragraph-rsid="0011c311"/>
    </style:style>
    <style:style style:name="P16" style:family="paragraph" style:parent-style-name="Standard">
      <style:text-properties fo:font-size="11pt" officeooo:rsid="0011c311" officeooo:paragraph-rsid="0011c311" style:font-size-asian="9.60000038146973pt" style:font-size-complex="11pt"/>
    </style:style>
    <style:style style:name="P17" style:family="paragraph" style:parent-style-name="Standard">
      <style:text-properties style:font-name="Liberation Serif" fo:font-size="11pt" officeooo:rsid="0011c311" officeooo:paragraph-rsid="0011c311" style:font-size-asian="9.60000038146973pt" style:font-size-complex="11pt"/>
    </style:style>
    <style:style style:name="P18" style:family="paragraph" style:parent-style-name="Standard">
      <style:text-properties style:font-name="Liberation Serif" fo:font-size="11pt" style:font-size-asian="11pt" style:font-size-complex="11pt"/>
    </style:style>
    <style:style style:name="P19" style:family="paragraph" style:parent-style-name="Standard">
      <style:text-properties style:font-name="Liberation Serif" fo:font-size="11pt" officeooo:rsid="00297128" officeooo:paragraph-rsid="00297128" style:font-size-asian="11pt" style:font-size-complex="11pt"/>
    </style:style>
    <style:style style:name="P20" style:family="paragraph" style:parent-style-name="Text_20_body">
      <style:paragraph-properties fo:margin-left="0in" fo:margin-right="0in" fo:orphans="2" fo:widows="2" fo:text-indent="0in" style:auto-text-indent="false"/>
      <style:text-properties style:font-name="Liberation Serif" fo:font-size="11pt" style:font-size-asian="11pt" style:font-size-complex="11pt"/>
    </style:style>
    <style:style style:name="P21" style:family="paragraph" style:parent-style-name="Standard">
      <style:text-properties style:font-name="Liberation Serif" fo:font-size="11pt" officeooo:rsid="0038c341" officeooo:paragraph-rsid="0038f357" style:font-size-asian="11pt" style:font-size-complex="11pt"/>
    </style:style>
    <style:style style:name="P22" style:family="paragraph" style:parent-style-name="Standard">
      <style:text-properties style:font-name="Liberation Serif" fo:font-size="11pt" officeooo:rsid="0038c341" officeooo:paragraph-rsid="00398f1a" style:font-size-asian="11pt" style:font-size-complex="11pt"/>
    </style:style>
    <style:style style:name="P23" style:family="paragraph" style:parent-style-name="Standard">
      <style:text-properties style:font-name="Liberation Serif" fo:font-size="11pt" officeooo:paragraph-rsid="0073fce6" style:font-size-asian="11pt" style:font-size-complex="11pt"/>
    </style:style>
    <style:style style:name="P24" style:family="paragraph" style:parent-style-name="Standard">
      <style:text-properties style:font-name="Liberation Serif" fo:font-size="11pt" officeooo:rsid="0011c311" officeooo:paragraph-rsid="0011c311" style:font-size-asian="11pt" style:font-size-complex="11pt"/>
    </style:style>
    <style:style style:name="P25" style:family="paragraph" style:parent-style-name="Standard">
      <style:text-properties style:font-name="Liberation Serif" fo:font-size="11pt" officeooo:paragraph-rsid="008316ad" style:font-size-asian="11pt" style:font-size-complex="11pt"/>
    </style:style>
    <style:style style:name="P26" style:family="paragraph" style:parent-style-name="Standard">
      <style:text-properties style:font-name="Liberation Serif" fo:font-size="11pt" officeooo:paragraph-rsid="00838d7c" style:font-size-asian="11pt" style:font-size-complex="11pt"/>
    </style:style>
    <style:style style:name="P27" style:family="paragraph" style:parent-style-name="Table_20_Contents">
      <style:paragraph-properties fo:margin-left="0in" fo:margin-right="0in" fo:text-indent="0in" style:auto-text-indent="false"/>
      <style:text-properties style:font-name="Liberation Serif" fo:font-size="11pt" style:font-size-asian="11pt" style:font-size-complex="11pt"/>
    </style:style>
    <style:style style:name="P28" style:family="paragraph" style:parent-style-name="Table_20_Heading">
      <style:text-properties style:font-name="Liberation Serif" fo:font-size="11pt" style:font-size-asian="11pt" style:font-size-complex="11pt"/>
    </style:style>
    <style:style style:name="P29" style:family="paragraph" style:parent-style-name="Text_20_body">
      <style:paragraph-properties fo:margin-left="0.4925in" fo:text-indent="0in" style:auto-text-indent="false"/>
      <style:text-properties style:font-name="Liberation Serif" fo:font-size="11pt" officeooo:paragraph-rsid="00994384" style:font-size-asian="11pt" style:font-size-complex="11pt"/>
    </style:style>
    <style:style style:name="P30" style:family="paragraph" style:parent-style-name="Standard">
      <style:text-properties style:font-name="Liberation Serif" fo:font-size="11pt" fo:font-weight="normal" style:font-size-asian="11pt" style:font-weight-asian="normal" style:font-size-complex="11pt" style:font-weight-complex="normal"/>
    </style:style>
    <style:style style:name="P31" style:family="paragraph" style:parent-style-name="Standard">
      <style:text-properties style:font-name="Liberation Serif" fo:font-size="11pt" fo:font-weight="bold" officeooo:paragraph-rsid="000fcead" style:font-size-asian="11pt" style:font-weight-asian="bold" style:font-size-complex="11pt" style:font-weight-complex="bold"/>
    </style:style>
    <style:style style:name="P32" style:family="paragraph" style:parent-style-name="Standard">
      <style:text-properties style:font-name="Liberation Serif" fo:font-size="11pt" fo:font-weight="bold" style:font-size-asian="11pt" style:font-weight-asian="bold" style:font-size-complex="11pt" style:font-weight-complex="bold"/>
    </style:style>
    <style:style style:name="P33" style:family="paragraph" style:parent-style-name="Standard">
      <style:text-properties style:font-name="Liberation Serif" fo:font-size="11pt" fo:font-weight="bold" officeooo:paragraph-rsid="009c4963" style:font-size-asian="11pt" style:font-weight-asian="bold" style:font-size-complex="11pt" style:font-weight-complex="bold"/>
    </style:style>
    <style:style style:name="P34" style:family="paragraph" style:parent-style-name="Standard">
      <style:text-properties style:font-name="Liberation Serif"/>
    </style:style>
    <style:style style:name="P35" style:family="paragraph" style:parent-style-name="Text_20_body">
      <style:text-properties style:font-name="Liberation Serif" fo:font-size="12pt" officeooo:paragraph-rsid="002a3aa2" style:font-size-asian="12pt" style:font-size-complex="12pt"/>
    </style:style>
    <style:style style:name="P36" style:family="paragraph" style:parent-style-name="Standard">
      <style:text-properties style:font-name="Liberation Serif" fo:font-size="12pt" fo:font-style="italic" fo:font-weight="bold" officeooo:paragraph-rsid="00a7b5c8" style:font-size-asian="12pt" style:font-style-asian="italic" style:font-weight-asian="bold" style:font-size-complex="12pt" style:font-style-complex="italic" style:font-weight-complex="bold"/>
    </style:style>
    <style:style style:name="P37"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Text_20_body">
      <style:text-properties style:font-name="Liberation Serif" fo:font-size="12pt" fo:font-style="italic" fo:font-weight="bold" officeooo:rsid="0053bd23" officeooo:paragraph-rsid="0053bd23" style:font-size-asian="12pt" style:font-style-asian="italic" style:font-weight-asian="bold" style:font-size-complex="12pt" style:font-style-complex="italic" style:font-weight-complex="bold"/>
    </style:style>
    <style:style style:name="P39" style:family="paragraph" style:parent-style-name="Text_20_body">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text-properties style:font-name="Liberation Serif" fo:font-size="12pt" fo:font-weight="bold" officeooo:paragraph-rsid="009c4963" style:font-size-asian="12pt" style:font-weight-asian="bold" style:font-size-complex="12pt" style:font-weight-complex="bold"/>
    </style:style>
    <style:style style:name="P41" style:family="paragraph" style:parent-style-name="Standard">
      <style:text-properties style:font-name="Liberation Serif" officeooo:paragraph-rsid="00297128"/>
    </style:style>
    <style:style style:name="P42" style:family="paragraph" style:parent-style-name="Table_20_Contents">
      <style:paragraph-properties fo:margin-top="0in" fo:margin-bottom="0.1965in" style:contextual-spacing="false"/>
      <style:text-properties style:font-name="Liberation Serif"/>
    </style:style>
    <style:style style:name="P43" style:family="paragraph" style:parent-style-name="Table_20_Contents">
      <style:paragraph-properties fo:margin-top="0in" fo:margin-bottom="0.1965in" style:contextual-spacing="false"/>
      <style:text-properties style:font-name="Liberation Serif" fo:font-weight="bold" style:font-weight-asian="bold" style:font-weight-complex="bold"/>
    </style:style>
    <style:style style:name="P44" style:family="paragraph" style:parent-style-name="Standard">
      <style:text-properties style:font-name="Liberation Serif" fo:font-weight="bold" officeooo:paragraph-rsid="002d1682" style:font-weight-asian="bold" style:font-weight-complex="bold"/>
    </style:style>
    <style:style style:name="P45" style:family="paragraph" style:parent-style-name="Standard">
      <style:text-properties style:font-name="Liberation Serif" fo:font-weight="bold" style:font-weight-asian="bold" style:font-weight-complex="bold"/>
    </style:style>
    <style:style style:name="P46" style:family="paragraph" style:parent-style-name="Text_20_body">
      <style:text-properties style:font-name="Liberation Serif" fo:font-weight="bold" style:font-weight-asian="bold" style:font-weight-complex="bold"/>
    </style:style>
    <style:style style:name="P47" style:family="paragraph" style:parent-style-name="Table_20_Contents">
      <style:text-properties style:font-name="Liberation Serif" fo:font-weight="bold"/>
    </style:style>
    <style:style style:name="P48" style:family="paragraph" style:parent-style-name="Table_20_Contents">
      <style:paragraph-properties fo:margin-top="0in" fo:margin-bottom="0.1965in" style:contextual-spacing="false"/>
      <style:text-properties style:font-name="Liberation Serif" officeooo:rsid="000fcead" officeooo:paragraph-rsid="000fcead"/>
    </style:style>
    <style:style style:name="P49" style:family="paragraph" style:parent-style-name="Standard">
      <style:text-properties style:font-name="Liberation Serif" officeooo:paragraph-rsid="005db5a3"/>
    </style:style>
    <style:style style:name="P50" style:family="paragraph" style:parent-style-name="Standard">
      <style:text-properties style:font-name="Liberation Serif" fo:font-size="10pt" fo:font-weight="bold" officeooo:paragraph-rsid="005db5a3" style:font-size-asian="10pt" style:font-size-complex="10pt"/>
    </style:style>
    <style:style style:name="P51" style:family="paragraph" style:parent-style-name="Standard">
      <style:text-properties style:font-name="Liberation Serif" officeooo:paragraph-rsid="0037926d"/>
    </style:style>
    <style:style style:name="P52" style:family="paragraph" style:parent-style-name="Standard">
      <style:text-properties style:font-name="Liberation Serif" officeooo:paragraph-rsid="007cfb38"/>
    </style:style>
    <style:style style:name="P53" style:family="paragraph" style:parent-style-name="Standard">
      <style:text-properties style:font-name="Liberation Serif" officeooo:paragraph-rsid="00738b33"/>
    </style:style>
    <style:style style:name="P54" style:family="paragraph" style:parent-style-name="Standard">
      <style:text-properties style:font-name="Liberation Serif" officeooo:paragraph-rsid="009c4963"/>
    </style:style>
    <style:style style:name="P55" style:family="paragraph" style:parent-style-name="Standard">
      <style:text-properties style:font-name="Liberation Serif" officeooo:paragraph-rsid="00a7b5c8"/>
    </style:style>
    <style:style style:name="P56" style:family="paragraph" style:parent-style-name="Standard">
      <style:text-properties style:font-name="Liberation Serif" officeooo:rsid="00ba1028" officeooo:paragraph-rsid="00ba1028"/>
    </style:style>
    <style:style style:name="P57" style:family="paragraph" style:parent-style-name="Standard">
      <style:text-properties style:font-name="Liberation Serif" officeooo:paragraph-rsid="00a343a6"/>
    </style:style>
    <style:style style:name="P58" style:family="paragraph" style:parent-style-name="Standard">
      <style:text-properties style:font-name="Liberation Serif" officeooo:paragraph-rsid="00a4a159"/>
    </style:style>
    <style:style style:name="P59" style:family="paragraph" style:parent-style-name="Table_20_Contents">
      <style:text-properties style:font-name="Liberation Serif"/>
    </style:style>
    <style:style style:name="P60" style:family="paragraph" style:parent-style-name="Table_20_Contents">
      <style:paragraph-properties fo:margin-left="0in" fo:margin-right="0in" fo:text-indent="0in" style:auto-text-indent="false"/>
      <style:text-properties style:font-name="Liberation Serif"/>
    </style:style>
    <style:style style:name="P61" style:family="paragraph" style:parent-style-name="Table_20_Heading">
      <style:text-properties style:font-name="Liberation Serif"/>
    </style:style>
    <style:style style:name="P62" style:family="paragraph" style:parent-style-name="Standard">
      <style:text-properties officeooo:paragraph-rsid="00128705"/>
    </style:style>
    <style:style style:name="P63" style:family="paragraph" style:parent-style-name="Preformatted_20_Text">
      <style:paragraph-properties fo:margin-left="0in" fo:margin-right="0in" fo:text-indent="0in" style:auto-text-indent="false"/>
    </style:style>
    <style:style style:name="P64" style:family="paragraph" style:parent-style-name="Text_20_body">
      <style:paragraph-properties fo:margin-left="0in" fo:margin-right="0in" fo:text-indent="0in" style:auto-text-indent="false"/>
    </style:style>
    <style:style style:name="P65" style:family="paragraph" style:parent-style-name="Standard">
      <style:paragraph-properties fo:margin-left="0in" fo:margin-right="0in" fo:text-indent="0in" style:auto-text-indent="false"/>
    </style:style>
    <style:style style:name="P66" style:family="paragraph" style:parent-style-name="Table_20_Contents">
      <style:paragraph-properties fo:margin-left="0in" fo:margin-right="0in" fo:margin-top="0in" fo:margin-bottom="0in" style:contextual-spacing="false" fo:text-indent="0in" style:auto-text-indent="false"/>
    </style:style>
    <style:style style:name="P67" style:family="paragraph" style:parent-style-name="Table_20_Contents">
      <style:paragraph-properties fo:margin-left="0in" fo:margin-right="0in" fo:margin-top="0in" fo:margin-bottom="0in" style:contextual-spacing="false" fo:text-indent="0in" style:auto-text-indent="false" style:writing-mode="lr-tb"/>
    </style:style>
    <style:style style:name="P68" style:family="paragraph" style:parent-style-name="Preformatted_20_Text">
      <style:text-properties fo:font-variant="normal" fo:text-transform="none" fo:color="#000000" loext:opacity="100%" fo:letter-spacing="normal" fo:font-style="normal" fo:font-weight="normal"/>
    </style:style>
    <style:style style:name="P69" style:family="paragraph" style:parent-style-name="Text_20_body">
      <style:text-properties fo:font-variant="normal" fo:text-transform="none" fo:color="#000000" loext:opacity="100%" fo:letter-spacing="normal" fo:font-style="normal" fo:font-weight="bold" officeooo:rsid="008f2335" officeooo:paragraph-rsid="008f2335"/>
    </style:style>
    <style:style style:name="P70"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bold"/>
    </style:style>
    <style:style style:name="P71" style:family="paragraph" style:parent-style-name="Preformatted_20_Text">
      <style:text-properties fo:font-variant="normal" fo:text-transform="none" fo:color="#000000" loext:opacity="100%" fo:letter-spacing="normal"/>
    </style:style>
    <style:style style:name="P72" style:family="paragraph" style:parent-style-name="Preformatted_20_Text">
      <style:text-properties fo:font-variant="normal" fo:text-transform="none" fo:color="#000000" loext:opacity="100%" fo:letter-spacing="normal" officeooo:paragraph-rsid="002a3aa2"/>
    </style:style>
    <style:style style:name="P73" style:family="paragraph" style:parent-style-name="Standard">
      <style:text-properties fo:font-variant="normal" fo:text-transform="none" fo:color="#000000" loext:opacity="100%" style:font-name="Liberation Serif" fo:font-size="11pt" fo:letter-spacing="normal" fo:font-style="normal" fo:font-weight="normal" officeooo:rsid="002fbfed" officeooo:paragraph-rsid="008316ad" style:font-size-asian="11pt" style:font-size-complex="11pt"/>
    </style:style>
    <style:style style:name="P74" style:family="paragraph" style:parent-style-name="Standard">
      <style:text-properties fo:font-variant="normal" fo:text-transform="none" fo:color="#000000" loext:opacity="100%" style:font-name="Liberation Serif" fo:font-size="11pt" fo:letter-spacing="normal" fo:font-style="normal" fo:font-weight="normal" officeooo:paragraph-rsid="00c7c77f" style:font-size-asian="11pt" style:font-size-complex="11pt"/>
    </style:style>
    <style:style style:name="P75" style:family="paragraph" style:parent-style-name="Standard">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officeooo:paragraph-rsid="00c97a48" style:font-size-asian="11pt" style:font-size-complex="11pt"/>
    </style:style>
    <style:style style:name="P76" style:family="paragraph" style:parent-style-name="Standard">
      <style:text-properties fo:font-variant="normal" fo:text-transform="none" fo:color="#000000" loext:opacity="100%" style:font-name="Liberation Serif" fo:font-size="11pt" fo:letter-spacing="normal" fo:font-style="normal" fo:font-weight="normal" officeooo:rsid="0011c311" officeooo:paragraph-rsid="00738b33" style:font-size-asian="11pt" style:font-weight-asian="bold" style:font-size-complex="11pt" style:font-weight-complex="bold"/>
    </style:style>
    <style:style style:name="P77" style:family="paragraph" style:parent-style-name="Standard">
      <style:text-properties fo:font-variant="normal" fo:text-transform="none" fo:color="#000000" loext:opacity="100%" style:font-name="Liberation Serif" fo:font-size="11pt" fo:letter-spacing="normal" fo:font-style="normal" fo:font-weight="bold" officeooo:rsid="00cbbc15" officeooo:paragraph-rsid="00cbbc15" style:font-size-asian="11pt" style:font-weight-asian="bold" style:font-size-complex="11pt" style:font-weight-complex="bold"/>
    </style:style>
    <style:style style:name="P78" style:family="paragraph" style:parent-style-name="Standard">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79" style:family="paragraph" style:parent-style-name="Text_20_body">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80"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81" style:family="paragraph" style:parent-style-name="Quotations">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82" style:family="paragraph" style:parent-style-name="Text_20_body">
      <style:text-properties fo:font-variant="normal" fo:text-transform="none" fo:color="#000000" loext:opacity="100%" style:font-name="Liberation Serif" fo:letter-spacing="normal" fo:font-style="normal" fo:font-weight="bold" officeooo:rsid="008f2335" officeooo:paragraph-rsid="008f2335" style:font-weight-asian="bold" style:font-weight-complex="bold"/>
    </style:style>
    <style:style style:name="P83" style:family="paragraph" style:parent-style-name="Standard">
      <style:text-properties fo:font-variant="normal" fo:text-transform="none" fo:color="#000000" loext:opacity="100%" style:font-name="Liberation Serif" fo:letter-spacing="normal" fo:font-style="normal" fo:font-weight="bold" officeooo:paragraph-rsid="00a343a6" style:font-weight-asian="bold" style:font-weight-complex="bold"/>
    </style:style>
    <style:style style:name="P84" style:family="paragraph" style:parent-style-name="Text_20_body">
      <style:paragraph-properties fo:margin-left="0.4925in" fo:text-indent="0in" style:auto-text-indent="false"/>
      <style:text-properties fo:font-variant="normal" fo:text-transform="none" fo:color="#000000" loext:opacity="100%" style:font-name="Liberation Serif" fo:letter-spacing="normal" fo:font-style="normal" fo:font-weight="bold" officeooo:rsid="0053bd23"/>
    </style:style>
    <style:style style:name="P85" style:family="paragraph" style:parent-style-name="Text_20_body">
      <style:text-properties fo:font-variant="normal" fo:text-transform="none" fo:color="#000000" loext:opacity="100%" style:font-name="Liberation Serif" fo:letter-spacing="normal" fo:font-style="normal" fo:font-weight="bold" officeooo:paragraph-rsid="009df0d2"/>
    </style:style>
    <style:style style:name="P86" style:family="paragraph" style:parent-style-name="Text_20_body">
      <style:text-properties fo:font-variant="normal" fo:text-transform="none" fo:color="#000000" loext:opacity="100%" style:font-name="Liberation Serif" fo:letter-spacing="normal" fo:font-style="normal" fo:font-weight="bold"/>
    </style:style>
    <style:style style:name="P87"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bold"/>
    </style:style>
    <style:style style:name="P88" style:family="paragraph" style:parent-style-name="Text_20_body">
      <style:text-properties fo:font-variant="normal" fo:text-transform="none" fo:color="#000000" loext:opacity="100%" style:font-name="Liberation Serif" fo:letter-spacing="normal" fo:font-style="normal" fo:font-weight="bold" officeooo:paragraph-rsid="00a343a6"/>
    </style:style>
    <style:style style:name="P89" style:family="paragraph" style:parent-style-name="Text_20_body">
      <style:text-properties fo:font-variant="normal" fo:text-transform="none" fo:color="#000000" loext:opacity="100%" style:font-name="Liberation Serif" fo:font-size="12pt" fo:letter-spacing="normal" fo:font-style="normal" fo:font-weight="bold" officeooo:rsid="008f2335" officeooo:paragraph-rsid="008f2335" style:font-size-asian="12pt" style:font-weight-asian="bold" style:font-size-complex="12pt" style:font-weight-complex="bold"/>
    </style:style>
    <style:style style:name="P90" style:family="paragraph" style:parent-style-name="Standard">
      <style:text-properties fo:font-variant="normal" fo:text-transform="none" fo:color="#000000" loext:opacity="100%" style:font-name="Liberation Serif" fo:font-size="12pt" fo:letter-spacing="normal" fo:font-style="normal" fo:font-weight="normal" officeooo:rsid="0011c311" officeooo:paragraph-rsid="00738b33" style:font-size-asian="11pt" style:font-weight-asian="bold" style:font-size-complex="11pt" style:font-weight-complex="bold"/>
    </style:style>
    <style:style style:name="P91" style:family="paragraph" style:parent-style-name="Standard">
      <style:text-properties fo:font-variant="normal" fo:text-transform="none" fo:color="#000000" loext:opacity="100%" style:font-name="Liberation Serif" fo:font-size="12pt" fo:letter-spacing="normal" fo:font-style="normal" fo:font-weight="normal" officeooo:paragraph-rsid="00c7c77f" style:font-size-asian="11pt" style:font-size-complex="11pt"/>
    </style:style>
    <style:style style:name="P92" style:family="paragraph" style:parent-style-name="Standard">
      <style:text-properties officeooo:paragraph-rsid="00287c31"/>
    </style:style>
    <style:style style:name="P93" style:family="paragraph" style:parent-style-name="Text_20_body">
      <style:paragraph-properties fo:margin-left="0in" fo:margin-right="0in" fo:orphans="2" fo:widows="2" fo:text-indent="0in" style:auto-text-indent="false"/>
    </style:style>
    <style:style style:name="P94" style:family="paragraph" style:parent-style-name="Text_20_body">
      <style:paragraph-properties fo:margin-left="0in" fo:margin-right="0in" fo:orphans="2" fo:widows="2" fo:text-indent="0in" style:auto-text-indent="false"/>
      <style:text-properties officeooo:paragraph-rsid="002a831d"/>
    </style:style>
    <style:style style:name="P95" style:family="paragraph" style:parent-style-name="Preformatted_20_Text">
      <style:paragraph-properties fo:margin-left="0in" fo:margin-right="0in" fo:text-indent="0in" style:auto-text-indent="false"/>
      <style:text-properties officeooo:paragraph-rsid="002a3aa2"/>
    </style:style>
    <style:style style:name="P96" style:family="paragraph" style:parent-style-name="Standard">
      <style:text-properties officeooo:paragraph-rsid="00297128"/>
    </style:style>
    <style:style style:name="P97" style:family="paragraph" style:parent-style-name="Standard">
      <style:text-properties officeooo:paragraph-rsid="001ce228"/>
    </style:style>
    <style:style style:name="P98" style:family="paragraph" style:parent-style-name="Standard">
      <style:paragraph-properties fo:break-before="page"/>
      <style:text-properties officeooo:paragraph-rsid="001ce228"/>
    </style:style>
    <style:style style:name="P99" style:family="paragraph" style:parent-style-name="Standard">
      <style:text-properties officeooo:rsid="002fbfed" officeooo:paragraph-rsid="002fbfed"/>
    </style:style>
    <style:style style:name="P100" style:family="paragraph" style:parent-style-name="Standard">
      <style:text-properties officeooo:paragraph-rsid="0038f357"/>
    </style:style>
    <style:style style:name="P101" style:family="paragraph" style:parent-style-name="Standard">
      <style:text-properties officeooo:paragraph-rsid="003d82b4"/>
    </style:style>
    <style:style style:name="P102" style:family="paragraph" style:parent-style-name="Standard">
      <style:paragraph-properties fo:margin-left="0.4925in" fo:text-indent="0in" style:auto-text-indent="false"/>
      <style:text-properties officeooo:paragraph-rsid="00537a83"/>
    </style:style>
    <style:style style:name="P103" style:family="paragraph" style:parent-style-name="Standard">
      <style:text-properties officeooo:paragraph-rsid="005db5a3"/>
    </style:style>
    <style:style style:name="P104" style:family="paragraph" style:parent-style-name="Standard">
      <style:text-properties officeooo:paragraph-rsid="0068fc7e"/>
    </style:style>
    <style:style style:name="P105" style:family="paragraph" style:parent-style-name="Standard">
      <style:text-properties officeooo:paragraph-rsid="0073fce6"/>
    </style:style>
    <style:style style:name="P106" style:family="paragraph" style:parent-style-name="Standard">
      <style:text-properties officeooo:paragraph-rsid="007cfb38"/>
    </style:style>
    <style:style style:name="P107" style:family="paragraph" style:parent-style-name="Standard">
      <style:text-properties officeooo:paragraph-rsid="005e80d7"/>
    </style:style>
    <style:style style:name="P108" style:family="paragraph" style:parent-style-name="Standard">
      <style:text-properties officeooo:paragraph-rsid="008316ad"/>
    </style:style>
    <style:style style:name="P109" style:family="paragraph" style:parent-style-name="Standard">
      <style:text-properties officeooo:paragraph-rsid="00313315"/>
    </style:style>
    <style:style style:name="P110" style:family="paragraph" style:parent-style-name="Standard">
      <style:text-properties fo:color="#000000" loext:opacity="100%" style:font-name="Liberation Serif" fo:font-size="11pt" fo:font-weight="bold" officeooo:paragraph-rsid="000fcead" style:font-size-asian="11pt" style:font-weight-asian="bold" style:font-size-complex="11pt" style:font-weight-complex="bold"/>
    </style:style>
    <style:style style:name="P111" style:family="paragraph" style:parent-style-name="Horizontal_20_Line">
      <style:text-properties style:font-name="American Typewriter" fo:font-size="12pt" fo:font-weight="normal" style:font-size-asian="12pt" style:font-weight-asian="normal" style:font-size-complex="12pt" style:font-weight-complex="normal"/>
    </style:style>
    <style:style style:name="P112" style:family="paragraph" style:parent-style-name="Text_20_body">
      <style:text-properties officeooo:rsid="008f2335" officeooo:paragraph-rsid="008f2335"/>
    </style:style>
    <style:style style:name="P113" style:family="paragraph" style:parent-style-name="Heading">
      <style:text-properties officeooo:paragraph-rsid="00c590e1"/>
    </style:style>
    <style:style style:name="P114" style:family="paragraph" style:parent-style-name="Standard">
      <style:text-properties officeooo:rsid="005b845b" officeooo:paragraph-rsid="005db5a3"/>
    </style:style>
    <style:style style:name="P115" style:family="paragraph" style:parent-style-name="Standard">
      <style:text-properties officeooo:rsid="0053a92e" officeooo:paragraph-rsid="009a4eaa"/>
    </style:style>
    <style:style style:name="P116" style:family="paragraph" style:parent-style-name="Standard">
      <style:text-properties fo:font-size="12pt" fo:font-weight="bold" style:font-size-asian="12pt" style:font-weight-asian="bold" style:font-size-complex="12pt" style:font-weight-complex="bold"/>
    </style:style>
    <style:style style:name="P117" style:family="paragraph" style:parent-style-name="Standard">
      <style:paragraph-properties fo:margin-left="0.4925in" fo:text-indent="0in" style:auto-text-indent="false"/>
      <style:text-properties officeooo:paragraph-rsid="009a4eaa"/>
    </style:style>
    <style:style style:name="P118" style:family="paragraph" style:parent-style-name="Standard">
      <style:text-properties officeooo:rsid="0018d26d" officeooo:paragraph-rsid="001ce228"/>
    </style:style>
    <style:style style:name="P119" style:family="paragraph" style:parent-style-name="Standard">
      <style:paragraph-properties fo:break-before="page"/>
      <style:text-properties officeooo:rsid="0018d26d" officeooo:paragraph-rsid="001ce228"/>
    </style:style>
    <style:style style:name="P120" style:family="paragraph" style:parent-style-name="Standard">
      <style:text-properties officeooo:paragraph-rsid="00a7b5c8"/>
    </style:style>
    <style:style style:name="P121" style:family="paragraph" style:parent-style-name="Standard">
      <style:text-properties officeooo:rsid="00b8891a" officeooo:paragraph-rsid="00b8891a"/>
    </style:style>
    <style:style style:name="P122" style:family="paragraph" style:parent-style-name="Standard">
      <style:text-properties officeooo:paragraph-rsid="00bc285a"/>
    </style:style>
    <style:style style:name="P123" style:family="paragraph" style:parent-style-name="Standard">
      <style:text-properties officeooo:paragraph-rsid="00738b33"/>
    </style:style>
    <style:style style:name="P124" style:family="paragraph" style:parent-style-name="Standard">
      <style:paragraph-properties fo:margin-left="0in" fo:margin-right="0in" fo:text-indent="0in" style:auto-text-indent="false"/>
      <style:text-properties officeooo:paragraph-rsid="00c97a48"/>
    </style:style>
    <style:style style:name="P125" style:family="paragraph" style:parent-style-name="Standard">
      <style:paragraph-properties fo:break-before="page"/>
      <style:text-properties style:font-name="Helvetica1" fo:font-size="16pt" fo:font-weight="bold" officeooo:rsid="0011c311" officeooo:paragraph-rsid="00738b33" style:font-size-asian="16pt" style:font-weight-asian="bold" style:font-size-complex="16pt" style:font-weight-complex="bold"/>
    </style:style>
    <style:style style:name="P126" style:family="paragraph" style:parent-style-name="Standard">
      <style:text-properties officeooo:paragraph-rsid="00cce4a1"/>
    </style:style>
    <style:style style:name="P127" style:family="paragraph" style:parent-style-name="Table_20_Contents">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normal" style:text-blinking="false" style:font-size-asian="11pt" style:font-size-complex="11pt"/>
    </style:style>
    <style:style style:name="P128" style:family="paragraph" style:parent-style-name="Table_20_Heading">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bold" style:text-blinking="false" style:font-size-asian="11pt" style:font-size-complex="11pt"/>
    </style:style>
    <style:style style:name="P129" style:family="paragraph" style:parent-style-name="Text_20_body" style:master-page-name="">
      <loext:graphic-properties draw:fill="none"/>
      <style:paragraph-properties fo:margin-left="0in" fo:margin-right="0in" fo:margin-top="0in" fo:margin-bottom="0.0972in" style:contextual-spacing="false" fo:line-height="120%" fo:orphans="2" fo:widows="2" fo:text-indent="0in" style:auto-text-indent="false" style:page-number="auto" fo:background-color="transparent" style:shadow="none" style:writing-mode="page"/>
      <style:text-properties officeooo:paragraph-rsid="00a343a6"/>
    </style:style>
    <style:style style:name="P130" style:family="paragraph" style:parent-style-name="Text_20_body">
      <style:text-properties officeooo:paragraph-rsid="00192843"/>
    </style:style>
    <style:style style:name="P131" style:family="paragraph" style:parent-style-name="Text_20_body">
      <style:text-properties officeooo:paragraph-rsid="00c76294"/>
    </style:style>
    <style:style style:name="P132" style:family="paragraph" style:parent-style-name="Table_20_Heading">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bold" style:text-blinking="false" style:font-size-asian="11pt" style:font-size-complex="11pt"/>
    </style:style>
    <style:style style:name="P133" style:family="paragraph" style:parent-style-name="Heading_20_1">
      <style:paragraph-properties fo:margin-left="0in" fo:margin-right="0in" fo:text-indent="0in" style:auto-text-indent="false"/>
      <style:text-properties officeooo:paragraph-rsid="00341beb"/>
    </style:style>
    <style:style style:name="P134" style:family="paragraph" style:parent-style-name="Heading_20_3">
      <style:text-properties fo:font-variant="normal" fo:text-transform="none" fo:color="#000000" loext:opacity="100%" style:font-name="Liberation Serif" fo:font-size="11pt" fo:letter-spacing="normal" fo:font-style="normal" fo:font-weight="bold" officeooo:rsid="001ce228" officeooo:paragraph-rsid="001ce228" style:font-size-asian="11pt" style:font-weight-asian="bold" style:font-size-complex="11pt" style:font-weight-complex="bold"/>
    </style:style>
    <style:style style:name="P135" style:family="paragraph" style:parent-style-name="Heading_20_3">
      <style:text-properties fo:font-variant="normal" fo:text-transform="none" fo:color="#000000" loext:opacity="100%" style:font-name="Liberation Serif" fo:font-size="11pt" fo:letter-spacing="normal" fo:font-style="normal" fo:font-weight="bold" officeooo:rsid="008316ad" officeooo:paragraph-rsid="008316ad" style:font-size-asian="11pt" style:font-weight-asian="bold" style:font-size-complex="11pt" style:font-weight-complex="bold"/>
    </style:style>
    <style:style style:name="P136" style:family="paragraph" style:parent-style-name="Heading_20_3">
      <style:text-properties fo:font-variant="normal" fo:text-transform="none" fo:color="#000000" loext:opacity="100%" style:font-name="Liberation Serif" fo:font-size="11pt" fo:letter-spacing="normal" fo:font-style="normal" fo:font-weight="normal" style:font-size-asian="11pt" style:font-size-complex="11pt"/>
    </style:style>
    <style:style style:name="P137" style:family="paragraph" style:parent-style-name="Heading_20_3">
      <style:text-properties fo:font-variant="normal" fo:text-transform="none" fo:color="#000000" loext:opacity="100%" style:font-name="Liberation Serif" fo:letter-spacing="normal" fo:font-style="normal" fo:font-weight="bold" officeooo:paragraph-rsid="0053a92e" style:font-weight-asian="bold" style:font-weight-complex="bold"/>
    </style:style>
    <style:style style:name="P138" style:family="paragraph" style:parent-style-name="Heading_20_3">
      <style:text-properties fo:font-variant="normal" fo:text-transform="none" fo:color="#000000" loext:opacity="100%" style:font-name="Liberation Serif" fo:letter-spacing="normal" fo:font-style="normal" fo:font-weight="bold" style:font-weight-asian="bold" style:font-weight-complex="bold"/>
    </style:style>
    <style:style style:name="P139" style:family="paragraph" style:parent-style-name="Heading_20_3">
      <style:paragraph-properties fo:margin-left="0in" fo:margin-right="0in" fo:orphans="2" fo:widows="2" fo:text-indent="0in" style:auto-text-indent="false"/>
      <style:text-properties fo:font-variant="normal" fo:text-transform="none" fo:color="#000000" loext:opacity="100%" fo:font-size="12pt" fo:letter-spacing="normal" fo:font-style="italic" fo:font-weight="bold" officeooo:paragraph-rsid="0053bd23" style:font-size-asian="12pt" style:font-style-asian="italic" style:font-weight-asian="bold" style:font-size-complex="12pt" style:font-style-complex="italic" style:font-weight-complex="bold"/>
    </style:style>
    <style:style style:name="P140" style:family="paragraph" style:parent-style-name="Heading_20_3">
      <style:text-properties fo:font-variant="normal" fo:text-transform="none" fo:color="#000000" loext:opacity="100%" style:font-name="American Typewriter" fo:font-size="12pt" fo:letter-spacing="normal" fo:font-style="normal" fo:font-weight="bold" officeooo:rsid="009c1e4e" officeooo:paragraph-rsid="009c1e4e" style:font-size-asian="12pt" style:font-weight-asian="bold" style:font-size-complex="12pt" style:font-weight-complex="bold"/>
    </style:style>
    <style:style style:name="P141" style:family="paragraph" style:parent-style-name="Heading_20_3">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P142" style:family="paragraph" style:parent-style-name="Heading_20_3">
      <style:paragraph-properties fo:break-before="page"/>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P143" style:family="paragraph" style:parent-style-name="Heading_20_3">
      <style:text-properties style:font-name="Liberation Serif" fo:font-weight="bold" style:font-weight-asian="bold" style:font-weight-complex="bold"/>
    </style:style>
    <style:style style:name="P144" style:family="paragraph" style:parent-style-name="Heading_20_3">
      <style:text-properties fo:font-weight="bold" officeooo:paragraph-rsid="008f2335" style:font-weight-asian="bold" style:font-weight-complex="bold"/>
    </style:style>
    <style:style style:name="P145" style:family="paragraph" style:parent-style-name="Heading_20_3">
      <style:text-properties style:font-name="American Typewriter" fo:font-size="12pt" fo:font-weight="bold" officeooo:paragraph-rsid="008f2335" style:font-size-asian="12pt" style:font-weight-asian="bold" style:font-size-complex="12pt" style:font-weight-complex="bold"/>
    </style:style>
    <style:style style:name="P146" style:family="paragraph" style:parent-style-name="Heading_20_3">
      <style:text-properties officeooo:paragraph-rsid="00a31081"/>
    </style:style>
    <style:style style:name="P147" style:family="paragraph" style:parent-style-name="Heading_20_4">
      <style:text-properties fo:font-variant="normal" fo:text-transform="none" fo:color="#000000" loext:opacity="100%" style:font-name="Liberation Serif" fo:font-size="12pt" fo:letter-spacing="normal" fo:font-style="italic" fo:font-weight="bold" officeooo:rsid="008f2335" officeooo:paragraph-rsid="008f2335" style:font-size-asian="12pt" style:font-style-asian="italic" style:font-weight-asian="bold" style:font-size-complex="12pt" style:font-style-complex="italic" style:font-weight-complex="bold"/>
    </style:style>
    <style:style style:name="P148" style:family="paragraph" style:parent-style-name="Heading_20_4">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P149" style:family="paragraph" style:parent-style-name="Heading_20_4">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150" style:family="paragraph" style:parent-style-name="Heading_20_4">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151" style:family="paragraph" style:parent-style-name="Heading_20_4">
      <style:text-properties fo:font-variant="normal" fo:text-transform="none" fo:color="#000000" loext:opacity="100%" style:font-name="Liberation Serif" fo:font-size="11pt" fo:letter-spacing="normal" fo:font-style="normal" fo:font-weight="normal" style:font-size-asian="11pt" style:font-size-complex="11pt"/>
    </style:style>
    <style:style style:name="P152" style:family="paragraph" style:parent-style-name="Standard" style:list-style-name="L1"/>
    <style:style style:name="P153" style:family="paragraph" style:parent-style-name="Standard" style:list-style-name="L1">
      <style:text-properties style:font-name="Liberation Serif"/>
    </style:style>
    <style:style style:name="P154" style:family="paragraph" style:parent-style-name="Standard" style:list-style-name="L1">
      <style:text-properties style:font-name="Liberation Serif" officeooo:paragraph-rsid="00c57dc4"/>
    </style:style>
    <style:style style:name="P155" style:family="paragraph" style:parent-style-name="Standard" style:list-style-name="L2">
      <style:text-properties style:font-name="Liberation Serif"/>
    </style:style>
    <style:style style:name="P156" style:family="paragraph" style:parent-style-name="Standard" style:list-style-name="L2">
      <style:text-properties style:font-name="Liberation Serif" officeooo:rsid="007e9e37" officeooo:paragraph-rsid="007e9e37"/>
    </style:style>
    <style:style style:name="P157" style:family="paragraph" style:parent-style-name="Standard" style:list-style-name="L3">
      <style:text-properties style:font-name="Liberation Serif"/>
    </style:style>
    <style:style style:name="P158" style:family="paragraph" style:parent-style-name="Standard" style:list-style-name="L3">
      <style:text-properties style:font-name="Liberation Serif" officeooo:rsid="008d277c" officeooo:paragraph-rsid="008d277c"/>
    </style:style>
    <style:style style:name="P159" style:family="paragraph" style:parent-style-name="Standard" style:list-style-name="L4">
      <style:text-properties style:font-name="Liberation Serif"/>
    </style:style>
    <style:style style:name="P160" style:family="paragraph" style:parent-style-name="Standard" style:list-style-name="L4">
      <style:text-properties style:font-name="Liberation Serif" officeooo:paragraph-rsid="00738b33"/>
    </style:style>
    <style:style style:name="P161" style:family="paragraph" style:parent-style-name="Standard" style:list-style-name="L9">
      <style:text-properties style:font-name="Liberation Serif" officeooo:paragraph-rsid="0068fc7e"/>
    </style:style>
    <style:style style:name="P162" style:family="paragraph" style:parent-style-name="Standard">
      <style:text-properties style:font-name="Liberation Serif" fo:font-size="11pt" style:font-size-asian="11pt" style:font-size-complex="11pt"/>
    </style:style>
    <style:style style:name="P163" style:family="paragraph" style:parent-style-name="Standard" style:list-style-name="WWNum1">
      <style:paragraph-properties fo:margin-left="0in" fo:text-indent="0in" style:auto-text-indent="false"/>
      <style:text-properties style:font-name="Liberation Serif" fo:font-size="11pt" style:font-size-asian="11pt" style:font-size-complex="11pt"/>
    </style:style>
    <style:style style:name="P164" style:family="paragraph" style:parent-style-name="Standard" style:list-style-name="L25">
      <style:text-properties style:font-name="Liberation Serif" fo:font-size="11pt" officeooo:paragraph-rsid="008f2335" style:font-size-asian="11pt" style:font-size-complex="11pt"/>
    </style:style>
    <style:style style:name="P165" style:family="paragraph" style:parent-style-name="Standard" style:list-style-name="L25">
      <style:text-properties style:font-name="Liberation Serif" fo:font-size="11pt" style:font-size-asian="11pt" style:font-size-complex="11pt"/>
    </style:style>
    <style:style style:name="P166" style:family="paragraph" style:parent-style-name="Standard" style:list-style-name="L26">
      <style:text-properties style:font-name="Liberation Serif" fo:font-size="11pt" style:font-size-asian="11pt" style:font-size-complex="11pt"/>
    </style:style>
    <style:style style:name="P167" style:family="paragraph" style:parent-style-name="Standard" style:list-style-name="L26">
      <style:text-properties style:font-name="Liberation Serif" fo:font-size="11pt" officeooo:paragraph-rsid="008f2335" style:font-size-asian="11pt" style:font-size-complex="11pt"/>
    </style:style>
    <style:style style:name="P168" style:family="paragraph" style:parent-style-name="Standard" style:list-style-name="L26">
      <style:text-properties style:font-name="Liberation Serif" fo:font-size="11pt" officeooo:rsid="00537a83" officeooo:paragraph-rsid="008f2335" style:font-size-asian="11pt" style:font-size-complex="11pt"/>
    </style:style>
    <style:style style:name="P169" style:family="paragraph" style:parent-style-name="Standard" style:list-style-name="L28">
      <style:text-properties style:font-name="Liberation Serif" fo:font-size="11pt" officeooo:rsid="00537a83" officeooo:paragraph-rsid="00537a83" style:font-size-asian="11pt" style:font-size-complex="11pt"/>
    </style:style>
    <style:style style:name="P170" style:family="paragraph" style:parent-style-name="Standard" style:list-style-name="L27">
      <style:text-properties style:font-name="Liberation Serif" fo:font-size="11pt" style:font-size-asian="11pt" style:font-size-complex="11pt"/>
    </style:style>
    <style:style style:name="P171" style:family="paragraph" style:parent-style-name="Standard" style:list-style-name="L28">
      <style:text-properties style:font-name="Liberation Serif" fo:font-size="11pt" style:font-size-asian="11pt" style:font-size-complex="11pt"/>
    </style:style>
    <style:style style:name="P172" style:family="paragraph" style:parent-style-name="Standard" style:list-style-name="L29">
      <style:text-properties style:font-name="Liberation Serif" fo:font-size="11pt" style:font-size-asian="11pt" style:font-size-complex="11pt"/>
    </style:style>
    <style:style style:name="P173" style:family="paragraph" style:parent-style-name="Standard" style:list-style-name="L30">
      <style:text-properties style:font-name="Liberation Serif" fo:font-size="11pt" style:font-size-asian="11pt" style:font-size-complex="11pt"/>
    </style:style>
    <style:style style:name="P174" style:family="paragraph" style:parent-style-name="Standard" style:list-style-name="L31">
      <style:text-properties style:font-name="Liberation Serif" fo:font-size="11pt" style:font-size-asian="11pt" style:font-size-complex="11pt"/>
    </style:style>
    <style:style style:name="P175" style:family="paragraph" style:parent-style-name="Standard" style:list-style-name="L32">
      <style:text-properties style:font-name="Liberation Serif" fo:font-size="11pt" style:font-size-asian="11pt" style:font-size-complex="11pt"/>
    </style:style>
    <style:style style:name="P176" style:family="paragraph" style:parent-style-name="Standard" style:list-style-name="L33">
      <style:text-properties style:font-name="Liberation Serif" fo:font-size="11pt" officeooo:paragraph-rsid="0053a92e" style:font-size-asian="11pt" style:font-size-complex="11pt"/>
    </style:style>
    <style:style style:name="P177" style:family="paragraph" style:parent-style-name="Standard" style:list-style-name="L55">
      <style:text-properties style:font-name="Liberation Serif" fo:font-size="11pt" style:font-size-asian="11pt" style:font-size-complex="11pt"/>
    </style:style>
    <style:style style:name="P178" style:family="paragraph" style:parent-style-name="Standard" style:list-style-name="L62">
      <style:text-properties style:font-name="Liberation Serif" fo:font-size="11pt" style:font-size-asian="11pt" style:font-size-complex="11pt"/>
    </style:style>
    <style:style style:name="P17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8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paragraph-rsid="00bdb002" style:font-size-asian="11pt" style:font-size-complex="11pt"/>
    </style:style>
    <style:style style:name="P181" style:family="paragraph" style:parent-style-name="Standard" style:list-style-name="L80">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82" style:family="paragraph" style:parent-style-name="Standard" style:list-style-name="L81">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83" style:family="paragraph" style:parent-style-name="Standard" style:list-style-name="L8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8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style>
    <style:style style:name="P18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paragraph-rsid="00bdb002" style:font-size-asian="11pt"/>
    </style:style>
    <style:style style:name="P18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rsid="0088c215" officeooo:paragraph-rsid="0088c215" style:font-size-asian="11pt"/>
    </style:style>
    <style:style style:name="P187" style:family="paragraph" style:parent-style-name="Standard" style:list-style-name="L32">
      <style:text-properties style:font-name="Liberation Serif" fo:font-size="11pt" officeooo:paragraph-rsid="0053a92e"/>
    </style:style>
    <style:style style:name="P188" style:family="paragraph" style:parent-style-name="Standard">
      <style:text-properties style:font-name="Liberation Serif" fo:font-size="11pt" fo:font-weight="bold" style:font-size-asian="11pt" style:font-weight-asian="bold" style:font-size-complex="11pt" style:font-weight-complex="bold"/>
    </style:style>
    <style:style style:name="P18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style:font-size-asian="11pt" style:font-weight-asian="bold" style:font-size-complex="11pt" style:font-weight-complex="bold"/>
    </style:style>
    <style:style style:name="P190" style:family="paragraph" style:parent-style-name="Standard" style:list-style-name="L16">
      <style:text-properties style:font-name="Liberation Serif"/>
    </style:style>
    <style:style style:name="P191" style:family="paragraph" style:parent-style-name="Standard" style:list-style-name="L17">
      <style:text-properties style:font-name="Liberation Serif"/>
    </style:style>
    <style:style style:name="P192" style:family="paragraph" style:parent-style-name="Standard" style:list-style-name="L18">
      <style:text-properties style:font-name="Liberation Serif"/>
    </style:style>
    <style:style style:name="P193" style:family="paragraph" style:parent-style-name="Standard" style:list-style-name="L19">
      <style:text-properties style:font-name="Liberation Serif"/>
    </style:style>
    <style:style style:name="P194" style:family="paragraph" style:parent-style-name="Standard" style:list-style-name="L20">
      <style:text-properties style:font-name="Liberation Serif"/>
    </style:style>
    <style:style style:name="P195" style:family="paragraph" style:parent-style-name="Standard" style:list-style-name="L21">
      <style:text-properties style:font-name="Liberation Serif"/>
    </style:style>
    <style:style style:name="P196" style:family="paragraph" style:parent-style-name="Standard" style:list-style-name="L22">
      <style:text-properties style:font-name="Liberation Serif" officeooo:paragraph-rsid="004159f6"/>
    </style:style>
    <style:style style:name="P197" style:family="paragraph" style:parent-style-name="Standard" style:list-style-name="L34">
      <style:text-properties style:font-name="Liberation Serif"/>
    </style:style>
    <style:style style:name="P198" style:family="paragraph" style:parent-style-name="Standard" style:list-style-name="L36">
      <style:text-properties style:font-name="Liberation Serif"/>
    </style:style>
    <style:style style:name="P199" style:family="paragraph" style:parent-style-name="Standard" style:list-style-name="L37">
      <style:text-properties style:font-name="Liberation Serif"/>
    </style:style>
    <style:style style:name="P200" style:family="paragraph" style:parent-style-name="Standard" style:list-style-name="L38">
      <style:text-properties style:font-name="Liberation Serif"/>
    </style:style>
    <style:style style:name="P201" style:family="paragraph" style:parent-style-name="Standard" style:list-style-name="L40">
      <style:text-properties style:font-name="Liberation Serif"/>
    </style:style>
    <style:style style:name="P202" style:family="paragraph" style:parent-style-name="Standard" style:list-style-name="L41">
      <style:text-properties style:font-name="Liberation Serif"/>
    </style:style>
    <style:style style:name="P203" style:family="paragraph" style:parent-style-name="Standard" style:list-style-name="L42">
      <style:text-properties style:font-name="Liberation Serif"/>
    </style:style>
    <style:style style:name="P204" style:family="paragraph" style:parent-style-name="Standard" style:list-style-name="L43">
      <style:text-properties style:font-name="Liberation Serif"/>
    </style:style>
    <style:style style:name="P205" style:family="paragraph" style:parent-style-name="Standard" style:list-style-name="L45">
      <style:text-properties style:font-name="Liberation Serif"/>
    </style:style>
    <style:style style:name="P206" style:family="paragraph" style:parent-style-name="Standard" style:list-style-name="L46">
      <style:text-properties style:font-name="Liberation Serif"/>
    </style:style>
    <style:style style:name="P207" style:family="paragraph" style:parent-style-name="Standard" style:list-style-name="L47">
      <style:text-properties style:font-name="Liberation Serif"/>
    </style:style>
    <style:style style:name="P208" style:family="paragraph" style:parent-style-name="Standard" style:list-style-name="L48">
      <style:text-properties style:font-name="Liberation Serif"/>
    </style:style>
    <style:style style:name="P209" style:family="paragraph" style:parent-style-name="Standard" style:list-style-name="L48">
      <style:text-properties style:font-name="Liberation Serif" officeooo:paragraph-rsid="009a4eaa"/>
    </style:style>
    <style:style style:name="P210" style:family="paragraph" style:parent-style-name="Standard" style:list-style-name="L48">
      <style:text-properties style:font-name="Liberation Serif" fo:font-weight="bold" style:font-weight-asian="bold" style:font-weight-complex="bold"/>
    </style:style>
    <style:style style:name="P211" style:family="paragraph" style:parent-style-name="Standard" style:list-style-name="L54">
      <style:text-properties style:font-name="Liberation Serif" fo:font-weight="bold" officeooo:rsid="00202a73" officeooo:paragraph-rsid="009c4963" style:font-weight-asian="bold" style:font-weight-complex="bold"/>
    </style:style>
    <style:style style:name="P212" style:family="paragraph" style:parent-style-name="Standard" style:list-style-name="L49">
      <style:text-properties style:font-name="Liberation Serif"/>
    </style:style>
    <style:style style:name="P213" style:family="paragraph" style:parent-style-name="Standard" style:list-style-name="L51">
      <style:text-properties style:font-name="Liberation Serif"/>
    </style:style>
    <style:style style:name="P214" style:family="paragraph" style:parent-style-name="Standard" style:list-style-name="L52">
      <style:text-properties style:font-name="Liberation Serif"/>
    </style:style>
    <style:style style:name="P215" style:family="paragraph" style:parent-style-name="Standard" style:list-style-name="L53">
      <style:text-properties style:font-name="Liberation Serif"/>
    </style:style>
    <style:style style:name="P216" style:family="paragraph" style:parent-style-name="Standard" style:list-style-name="L53">
      <style:paragraph-properties>
        <style:tab-stops>
          <style:tab-stop style:position="5.2417in"/>
        </style:tab-stops>
      </style:paragraph-properties>
      <style:text-properties style:font-name="Liberation Serif"/>
    </style:style>
    <style:style style:name="P217" style:family="paragraph" style:parent-style-name="Standard" style:list-style-name="L54">
      <style:text-properties style:font-name="Liberation Serif"/>
    </style:style>
    <style:style style:name="P218" style:family="paragraph" style:parent-style-name="Standard" style:list-style-name="L54">
      <style:text-properties style:font-name="Liberation Serif" officeooo:paragraph-rsid="009c4963"/>
    </style:style>
    <style:style style:name="P219" style:family="paragraph" style:parent-style-name="Standard" style:list-style-name="L56">
      <style:text-properties style:font-name="Liberation Serif"/>
    </style:style>
    <style:style style:name="P220" style:family="paragraph" style:parent-style-name="Standard" style:list-style-name="L57">
      <style:text-properties style:font-name="Liberation Serif"/>
    </style:style>
    <style:style style:name="P221" style:family="paragraph" style:parent-style-name="Standard" style:list-style-name="L58">
      <style:text-properties style:font-name="Liberation Serif" officeooo:paragraph-rsid="00a085d6"/>
    </style:style>
    <style:style style:name="P222" style:family="paragraph" style:parent-style-name="Standard" style:list-style-name="L61">
      <style:text-properties style:font-name="Liberation Serif"/>
    </style:style>
    <style:style style:name="P223" style:family="paragraph" style:parent-style-name="Standard" style:list-style-name="L62">
      <style:text-properties style:font-name="Liberation Serif"/>
    </style:style>
    <style:style style:name="P224" style:family="paragraph" style:parent-style-name="Standard" style:list-style-name="L63">
      <style:text-properties style:font-name="Liberation Serif" officeooo:paragraph-rsid="00a7b5c8"/>
    </style:style>
    <style:style style:name="P225" style:family="paragraph" style:parent-style-name="Standard" style:list-style-name="L65">
      <style:text-properties style:font-name="Liberation Serif"/>
    </style:style>
    <style:style style:name="P226" style:family="paragraph" style:parent-style-name="Standard" style:list-style-name="L66">
      <style:text-properties style:font-name="Liberation Serif"/>
    </style:style>
    <style:style style:name="P227" style:family="paragraph" style:parent-style-name="Standard" style:list-style-name="L67">
      <style:text-properties style:font-name="Liberation Serif"/>
    </style:style>
    <style:style style:name="P228" style:family="paragraph" style:parent-style-name="Standard" style:list-style-name="L68">
      <style:text-properties style:font-name="Liberation Serif"/>
    </style:style>
    <style:style style:name="P229" style:family="paragraph" style:parent-style-name="Standard" style:list-style-name="L69">
      <style:text-properties style:font-name="Liberation Serif"/>
    </style:style>
    <style:style style:name="P230" style:family="paragraph" style:parent-style-name="Standard" style:list-style-name="L70">
      <style:text-properties style:font-name="Liberation Serif"/>
    </style:style>
    <style:style style:name="P231" style:family="paragraph" style:parent-style-name="Standard" style:list-style-name="L70">
      <style:text-properties style:font-name="Liberation Serif" officeooo:paragraph-rsid="00a343a6"/>
    </style:style>
    <style:style style:name="P232" style:family="paragraph" style:parent-style-name="Standard" style:list-style-name="L71">
      <style:text-properties style:font-name="Liberation Serif"/>
    </style:style>
    <style:style style:name="P233" style:family="paragraph" style:parent-style-name="Standard" style:list-style-name="L73">
      <style:text-properties style:font-name="Liberation Serif"/>
    </style:style>
    <style:style style:name="P234" style:family="paragraph" style:parent-style-name="Standard" style:list-style-name="L74">
      <style:text-properties style:font-name="Liberation Serif"/>
    </style:style>
    <style:style style:name="P235" style:family="paragraph" style:parent-style-name="Standard" style:list-style-name="L74">
      <style:text-properties style:font-name="Liberation Serif" officeooo:paragraph-rsid="00a4a159"/>
    </style:style>
    <style:style style:name="P236" style:family="paragraph" style:parent-style-name="Standard">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c7c77f" officeooo:paragraph-rsid="00c7c77f" style:text-blinking="false" style:font-size-asian="11pt" style:font-size-complex="11pt" loext:padding="0in" loext:border="none"/>
    </style:style>
    <style:style style:name="P237" style:family="paragraph" style:parent-style-name="Standard">
      <style:text-properties fo:font-variant="normal" fo:text-transform="none" fo:color="#000000" loext:opacity="100%" style:font-name="Liberation Serif" fo:font-size="11pt" fo:letter-spacing="normal" fo:font-style="normal" fo:font-weight="bold" officeooo:paragraph-rsid="00c97a48" style:font-size-asian="11pt" style:font-size-complex="11pt"/>
    </style:style>
    <style:style style:name="P238" style:family="paragraph" style:parent-style-name="Standard" style:list-style-name="L9">
      <style:text-properties fo:font-variant="normal" fo:text-transform="none" fo:color="#0a0a0a" loext:opacity="100%" style:text-outline="false" style:font-name="Liberation Serif" fo:font-size="11pt" fo:letter-spacing="normal" fo:font-style="normal" style:text-underline-style="none" fo:font-weight="normal" officeooo:paragraph-rsid="0068fc7e" style:font-size-asian="11pt" style:font-weight-asian="normal" style:font-size-complex="11pt"/>
    </style:style>
    <style:style style:name="P239" style:family="paragraph" style:parent-style-name="Standard" style:list-style-name="L10"/>
    <style:style style:name="P240" style:family="paragraph" style:parent-style-name="Standard" style:list-style-name="L11"/>
    <style:style style:name="P241" style:family="paragraph" style:parent-style-name="Standard" style:list-style-name="L12"/>
    <style:style style:name="P242" style:family="paragraph" style:parent-style-name="Standard" style:list-style-name="L13"/>
    <style:style style:name="P243" style:family="paragraph" style:parent-style-name="Standard">
      <style:text-properties style:use-window-font-color="true" loext:opacity="0%" style:font-name="Liberation Serif" fo:font-size="11pt" fo:font-weight="normal" style:font-size-asian="11pt" style:font-weight-asian="normal" style:font-size-complex="11pt"/>
    </style:style>
    <style:style style:name="P244" style:family="paragraph" style:parent-style-name="Standard">
      <style:text-properties style:use-window-font-color="true" loext:opacity="0%" style:font-name="Liberation Serif" fo:font-size="11pt" fo:font-weight="normal" officeooo:paragraph-rsid="008316ad" style:font-size-asian="11pt" style:font-weight-asian="normal" style:font-size-complex="11pt"/>
    </style:style>
    <style:style style:name="P245" style:family="paragraph" style:parent-style-name="Standard">
      <style:text-properties officeooo:paragraph-rsid="008316ad"/>
    </style:style>
    <style:style style:name="P246" style:family="paragraph" style:parent-style-name="Standard" style:list-style-name="L14">
      <style:text-properties officeooo:paragraph-rsid="008316ad"/>
    </style:style>
    <style:style style:name="P247" style:family="paragraph" style:parent-style-name="Standard" style:list-style-name="WWNum1">
      <style:paragraph-properties fo:margin-left="0in" fo:text-indent="0in" style:auto-text-indent="false"/>
    </style:style>
    <style:style style:name="P248" style:family="paragraph" style:parent-style-name="Standard" style:list-style-name="L15">
      <style:text-properties officeooo:paragraph-rsid="002d1682"/>
    </style:style>
    <style:style style:name="P249" style:family="paragraph" style:parent-style-name="Standard" style:list-style-name="L16"/>
    <style:style style:name="P250" style:family="paragraph" style:parent-style-name="Standard" style:list-style-name="L17"/>
    <style:style style:name="P251" style:family="paragraph" style:parent-style-name="Standard" style:list-style-name="L23">
      <style:text-properties officeooo:paragraph-rsid="005db5a3"/>
    </style:style>
    <style:style style:name="P252" style:family="paragraph" style:parent-style-name="Standard" style:list-style-name="L23">
      <style:text-properties officeooo:rsid="005b845b" officeooo:paragraph-rsid="005db5a3"/>
    </style:style>
    <style:style style:name="P253" style:family="paragraph" style:parent-style-name="Standard" style:list-style-name="L24"/>
    <style:style style:name="P254" style:family="paragraph" style:parent-style-name="Standard" style:list-style-name="L29"/>
    <style:style style:name="P255" style:family="paragraph" style:parent-style-name="Standard" style:list-style-name="L34"/>
    <style:style style:name="P256" style:family="paragraph" style:parent-style-name="Standard" style:list-style-name="L36"/>
    <style:style style:name="P257" style:family="paragraph" style:parent-style-name="Standard" style:list-style-name="L37"/>
    <style:style style:name="P258" style:family="paragraph" style:parent-style-name="Standard" style:list-style-name="L39"/>
    <style:style style:name="P259" style:family="paragraph" style:parent-style-name="Standard" style:list-style-name="L40"/>
    <style:style style:name="P260" style:family="paragraph" style:parent-style-name="Standard" style:list-style-name="L43"/>
    <style:style style:name="P261" style:family="paragraph" style:parent-style-name="Standard" style:list-style-name="L45"/>
    <style:style style:name="P262" style:family="paragraph" style:parent-style-name="Standard" style:list-style-name="L46"/>
    <style:style style:name="P263" style:family="paragraph" style:parent-style-name="Standard" style:list-style-name="L50"/>
    <style:style style:name="P264" style:family="paragraph" style:parent-style-name="Standard" style:list-style-name="L53"/>
    <style:style style:name="P265" style:family="paragraph" style:parent-style-name="Standard" style:list-style-name="L57"/>
    <style:style style:name="P266" style:family="paragraph" style:parent-style-name="Standard" style:list-style-name="L58"/>
    <style:style style:name="P267" style:family="paragraph" style:parent-style-name="Standard" style:list-style-name="L58">
      <style:text-properties officeooo:paragraph-rsid="00aed73f"/>
    </style:style>
    <style:style style:name="P268" style:family="paragraph" style:parent-style-name="Standard" style:list-style-name="L59">
      <style:text-properties officeooo:paragraph-rsid="00a92c6d"/>
    </style:style>
    <style:style style:name="P269" style:family="paragraph" style:parent-style-name="Standard" style:list-style-name="L61"/>
    <style:style style:name="P270" style:family="paragraph" style:parent-style-name="Standard" style:list-style-name="L64"/>
    <style:style style:name="P271" style:family="paragraph" style:parent-style-name="Standard" style:list-style-name="L67"/>
    <style:style style:name="P272" style:family="paragraph" style:parent-style-name="Standard" style:list-style-name="L68"/>
    <style:style style:name="P273" style:family="paragraph" style:parent-style-name="Standard" style:list-style-name="L70"/>
    <style:style style:name="P274" style:family="paragraph" style:parent-style-name="Standard" style:list-style-name="L72"/>
    <style:style style:name="P275" style:family="paragraph" style:parent-style-name="Standard" style:list-style-name="L73"/>
    <style:style style:name="P276" style:family="paragraph" style:parent-style-name="Standard" style:list-style-name="L7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8c215"/>
    </style:style>
    <style:style style:name="P27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78" style:family="paragraph" style:parent-style-name="Standard" style:list-style-name="L76">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a693"/>
    </style:style>
    <style:style style:name="P279" style:family="paragraph" style:parent-style-name="Standard" style:list-style-name="L77">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80" style:family="paragraph" style:parent-style-name="Standard" style:list-style-name="L78">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81" style:family="paragraph" style:parent-style-name="Standard" style:list-style-name="L79">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8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d4703e"/>
    </style:style>
    <style:style style:name="P28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1" fo:font-size="18pt" style:font-size-asian="18pt"/>
    </style:style>
    <style:style style:name="P28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1" fo:font-size="11pt" style:font-size-asian="11pt" style:font-size-complex="11pt"/>
    </style:style>
    <style:style style:name="P28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font-size-complex="11pt"/>
    </style:style>
    <style:style style:name="P286" style:family="paragraph" style:parent-style-name="Standard" style:list-style-name="L80">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font-size-complex="11pt"/>
    </style:style>
    <style:style style:name="P28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American Typewriter" fo:font-size="10pt" style:font-size-asian="10pt" style:font-size-complex="10pt"/>
    </style:style>
    <style:style style:name="P28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American Typewriter" fo:font-size="10pt" style:font-size-asian="10pt" style:font-size-complex="10pt"/>
    </style:style>
    <style:style style:name="P289" style:family="paragraph" style:parent-style-name="Standard">
      <style:paragraph-properties fo:margin-left="2.0772in" fo:text-indent="-2.078in" style:auto-text-indent="false">
        <style:tab-stops>
          <style:tab-stop style:position="2.0772in"/>
        </style:tab-stops>
      </style:paragraph-properties>
      <style:text-properties style:font-name="American Typewriter"/>
    </style:style>
    <style:style style:name="P29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style:font-size-asian="10pt" style:font-size-complex="10pt"/>
    </style:style>
    <style:style style:name="P29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officeooo:paragraph-rsid="00ba1028" style:font-size-asian="10pt" style:font-size-complex="10pt"/>
    </style:style>
    <style:style style:name="P29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1pt" style:font-size-asian="11pt" style:font-size-complex="11pt"/>
    </style:style>
    <style:style style:name="P293" style:family="paragraph" style:parent-style-name="Standard">
      <style:paragraph-properties fo:margin-left="2.0772in" fo:text-indent="-2.078in" style:auto-text-indent="false">
        <style:tab-stops>
          <style:tab-stop style:position="2.0772in"/>
        </style:tab-stops>
      </style:paragraph-properties>
    </style:style>
    <style:style style:name="P294" style:family="paragraph" style:parent-style-name="Standard">
      <style:paragraph-properties fo:margin-left="2.0772in" fo:text-indent="-2.078in" style:auto-text-indent="false">
        <style:tab-stops>
          <style:tab-stop style:position="2.0772in"/>
        </style:tab-stops>
      </style:paragraph-properties>
      <style:text-properties officeooo:rsid="00b8891a" officeooo:paragraph-rsid="00b8891a"/>
    </style:style>
    <style:style style:name="P29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officeooo:rsid="00d4703e" officeooo:paragraph-rsid="00d4703e" style:font-size-asian="11pt" style:font-weight-asian="bold" style:font-size-complex="11pt" style:font-weight-complex="bold"/>
    </style:style>
    <style:style style:name="P29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normal" officeooo:rsid="00d4703e" officeooo:paragraph-rsid="00d4703e" style:font-size-asian="11pt" style:font-weight-asian="normal" style:font-size-complex="11pt" style:font-weight-complex="normal"/>
    </style:style>
    <style:style style:name="P29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1pt" style:font-size-asian="11pt" style:font-size-complex="11pt"/>
    </style:style>
    <style:style style:name="P29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style:font-size-asian="10pt" style:font-size-complex="10pt"/>
    </style:style>
    <style:style style:name="P299" style:family="paragraph" style:parent-style-name="Text_20_body" style:list-style-name="L5">
      <style:paragraph-properties fo:margin-top="0in" fo:margin-bottom="0in" style:contextual-spacing="false" fo:padding="0in" fo:border="none"/>
    </style:style>
    <style:style style:name="P300" style:family="paragraph" style:parent-style-name="Text_20_body" style:list-style-name="L5">
      <style:paragraph-properties fo:padding="0in" fo:border="none"/>
      <style:text-properties officeooo:paragraph-rsid="00c97a48"/>
    </style:style>
    <style:style style:name="P301" style:family="paragraph" style:parent-style-name="Text_20_body" style:list-style-name="L6">
      <style:paragraph-properties fo:margin-top="0in" fo:margin-bottom="0in" style:contextual-spacing="false" fo:padding="0in" fo:border="none"/>
    </style:style>
    <style:style style:name="P302" style:family="paragraph" style:parent-style-name="Text_20_body" style:list-style-name="L6">
      <style:paragraph-properties fo:padding="0in" fo:border="none"/>
    </style:style>
    <style:style style:name="P303" style:family="paragraph" style:parent-style-name="Text_20_body" style:list-style-name="L7">
      <style:paragraph-properties fo:margin-top="0in" fo:margin-bottom="0in" style:contextual-spacing="false" fo:padding="0in" fo:border="none"/>
    </style:style>
    <style:style style:name="P304" style:family="paragraph" style:parent-style-name="Text_20_body" style:list-style-name="L7">
      <style:paragraph-properties fo:padding="0in" fo:border="none"/>
    </style:style>
    <style:style style:name="P305" style:family="paragraph" style:parent-style-name="Text_20_body" style:list-style-name="L8">
      <style:paragraph-properties fo:margin-top="0in" fo:margin-bottom="0in" style:contextual-spacing="false" fo:padding="0in" fo:border="none"/>
    </style:style>
    <style:style style:name="P306" style:family="paragraph" style:parent-style-name="Text_20_body" style:list-style-name="L8">
      <style:paragraph-properties fo:padding="0in" fo:border="none"/>
    </style:style>
    <style:style style:name="P307" style:family="paragraph" style:parent-style-name="Text_20_body" style:list-style-name="L35">
      <style:paragraph-properties fo:margin-left="0in" fo:margin-right="0in" fo:text-indent="0in" style:auto-text-indent="false"/>
    </style:style>
    <style:style style:name="P308" style:family="paragraph" style:parent-style-name="Text_20_body" style:list-style-name="L38">
      <style:paragraph-properties fo:margin-left="0in" fo:margin-right="0in" fo:text-indent="0in" style:auto-text-indent="false"/>
    </style:style>
    <style:style style:name="P309" style:family="paragraph" style:parent-style-name="Text_20_body" style:list-style-name="L38">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10" style:family="paragraph" style:parent-style-name="Text_20_body" style:list-style-name="L39">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11" style:family="paragraph" style:parent-style-name="Text_20_body" style:list-style-name="L40">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12" style:family="paragraph" style:parent-style-name="Text_20_body" style:list-style-name="L60">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313" style:family="paragraph" style:parent-style-name="Text_20_body" style:list-style-name="L39">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314" style:family="paragraph" style:parent-style-name="Text_20_body" style:list-style-name="L40">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315"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316" style:family="paragraph" style:parent-style-name="Text_20_body" style:list-style-name="L57">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317" style:family="paragraph" style:parent-style-name="Text_20_body">
      <style:text-properties fo:font-variant="normal" fo:text-transform="none" fo:color="#000000" loext:opacity="100%" style:font-name="Liberation Serif" fo:letter-spacing="normal" fo:font-style="normal" fo:font-weight="bold" officeooo:paragraph-rsid="009c1e4e" style:font-weight-asian="normal" style:font-weight-complex="normal"/>
    </style:style>
    <style:style style:name="P318" style:family="paragraph" style:parent-style-name="Text_20_body" style:list-style-name="L57">
      <style:paragraph-properties fo:text-indent="0in" style:auto-text-indent="false"/>
      <style:text-properties fo:font-variant="normal" fo:text-transform="none" fo:color="#000000" loext:opacity="100%" style:font-name="Liberation Serif" fo:letter-spacing="normal" fo:font-style="normal" fo:font-weight="bold"/>
    </style:style>
    <style:style style:name="P319" style:family="paragraph" style:parent-style-name="Text_20_body" style:list-style-name="L62">
      <style:paragraph-properties fo:margin-left="0in" fo:margin-right="0in" fo:text-indent="0in" style:auto-text-indent="false"/>
      <style:text-properties fo:font-variant="normal" fo:text-transform="none" fo:color="#000000" loext:opacity="100%" style:font-name="Liberation Serif" fo:letter-spacing="normal" fo:font-style="normal" fo:font-weight="bold" officeooo:paragraph-rsid="00a92c6d"/>
    </style:style>
    <style:style style:name="P320" style:family="paragraph" style:parent-style-name="Text_20_body" style:list-style-name="L62">
      <style:paragraph-properties fo:margin-left="0in" fo:margin-right="0in" fo:text-indent="0in" style:auto-text-indent="false"/>
      <style:text-properties fo:font-variant="normal" fo:text-transform="none" fo:color="#000000" loext:opacity="100%" style:font-name="Liberation Serif" fo:letter-spacing="normal" fo:font-style="normal" fo:font-weight="bold"/>
    </style:style>
    <style:style style:name="P321" style:family="paragraph" style:parent-style-name="Text_20_body" style:list-style-name="L57">
      <style:paragraph-properties fo:text-indent="0in" style:auto-text-indent="false"/>
      <style:text-properties fo:font-variant="normal" fo:text-transform="none" fo:color="#000000" loext:opacity="100%" fo:letter-spacing="normal" fo:font-style="normal" fo:font-weight="bold"/>
    </style:style>
    <style:style style:name="P322" style:family="paragraph" style:parent-style-name="Text_20_body" style:list-style-name="L67">
      <style:paragraph-properties fo:text-indent="0in" style:auto-text-indent="false"/>
      <style:text-properties fo:font-variant="normal" fo:text-transform="none" fo:color="#000000" loext:opacity="100%" fo:letter-spacing="normal" fo:font-style="normal" fo:font-weight="bold"/>
    </style:style>
    <style:style style:name="P323" style:family="paragraph" style:parent-style-name="Text_20_body" style:list-style-name="L68">
      <style:paragraph-properties fo:text-indent="0in" style:auto-text-indent="false"/>
      <style:text-properties fo:font-variant="normal" fo:text-transform="none" fo:color="#000000" loext:opacity="100%" fo:letter-spacing="normal" fo:font-style="normal" fo:font-weight="bold"/>
    </style:style>
    <style:style style:name="P324" style:family="paragraph" style:parent-style-name="Text_20_body" style:list-style-name="L72">
      <style:paragraph-properties fo:text-indent="0in" style:auto-text-indent="false"/>
      <style:text-properties fo:font-variant="normal" fo:text-transform="none" fo:color="#000000" loext:opacity="100%" fo:letter-spacing="normal" fo:font-style="normal" fo:font-weight="bold"/>
    </style:style>
    <style:style style:name="P325" style:family="paragraph" style:parent-style-name="Text_20_body" style:list-style-name="L44">
      <style:paragraph-properties fo:margin-left="0in" fo:margin-right="0in" fo:text-indent="0in" style:auto-text-indent="false"/>
      <style:text-properties fo:font-weight="bold"/>
    </style:style>
    <style:style style:name="P326" style:family="paragraph" style:parent-style-name="Text_20_body">
      <style:text-properties officeooo:rsid="00b8891a" officeooo:paragraph-rsid="00b8891a"/>
    </style:style>
    <style:style style:name="P327" style:family="paragraph" style:parent-style-name="Text_20_body">
      <style:paragraph-properties fo:margin-top="0in" fo:margin-bottom="0in" style:contextual-spacing="false"/>
      <style:text-properties officeooo:paragraph-rsid="0065a5e2"/>
    </style:style>
    <style:style style:name="P328" style:family="paragraph" style:parent-style-name="Text_20_body">
      <style:text-properties style:font-name="Liberation Serif" fo:font-size="14pt" style:font-size-asian="14pt" style:font-size-complex="14pt"/>
    </style:style>
    <style:style style:name="T1" style:family="text">
      <style:text-properties style:font-name="American Typewriter" fo:font-size="12pt" fo:font-weight="normal" style:font-size-asian="12pt" style:font-weight-asian="normal" style:font-size-complex="12pt" style:font-weight-complex="normal"/>
    </style:style>
    <style:style style:name="T2" style:family="text">
      <style:text-properties style:font-name="American Typewriter" fo:font-size="12pt" officeooo:rsid="001ddb05" style:font-size-asian="12pt" style:font-size-complex="12pt"/>
    </style:style>
    <style:style style:name="T3" style:family="text">
      <style:text-properties style:font-name="American Typewriter" fo:font-size="12pt" fo:font-weight="bold" style:font-size-asian="12pt" style:font-weight-asian="bold" style:font-size-complex="12pt" style:font-weight-complex="bold"/>
    </style:style>
    <style:style style:name="T4" style:family="text">
      <style:text-properties style:font-name="American Typewriter" fo:font-size="12pt" fo:font-weight="bold" officeooo:rsid="0021c6f7" style:font-size-asian="12pt" style:font-weight-asian="bold" style:font-size-complex="12pt" style:font-weight-complex="bold"/>
    </style:style>
    <style:style style:name="T5" style:family="text">
      <style:text-properties style:font-name="American Typewriter" fo:font-size="12pt" fo:font-weight="bold" officeooo:rsid="00a343a6" style:font-size-asian="12pt" style:font-weight-asian="bold" style:font-size-complex="12pt" style:font-weight-complex="bold"/>
    </style:style>
    <style:style style:name="T6" style:family="text">
      <style:text-properties style:font-name="American Typewriter" fo:font-size="12pt" fo:font-weight="bold" officeooo:rsid="001ddb05" style:font-size-asian="12pt" style:font-weight-asian="bold" style:font-size-complex="12pt" style:font-weight-complex="bold"/>
    </style:style>
    <style:style style:name="T7" style:family="text">
      <style:text-properties style:font-name="American Typewriter" fo:font-size="12pt" fo:font-weight="bold" officeooo:rsid="0023643b" style:font-size-asian="12pt" style:font-weight-asian="bold" style:font-size-complex="12pt"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0bbd3f" style:font-weight-asian="bold" style:font-weight-complex="bold"/>
    </style:style>
    <style:style style:name="T11" style:family="text">
      <style:text-properties fo:font-weight="bold" officeooo:rsid="001ce228" style:font-weight-asian="bold" style:font-weight-complex="bold"/>
    </style:style>
    <style:style style:name="T12" style:family="text">
      <style:text-properties fo:font-weight="bold" officeooo:rsid="0073fce6" style:font-weight-asian="bold" style:font-weight-complex="bold"/>
    </style:style>
    <style:style style:name="T13" style:family="text">
      <style:text-properties fo:font-weight="bold" officeooo:rsid="007821a5" style:font-weight-asian="bold" style:font-weight-complex="bold"/>
    </style:style>
    <style:style style:name="T14" style:family="text">
      <style:text-properties fo:font-weight="bold" officeooo:rsid="00994384" style:font-weight-asian="bold" style:font-weight-complex="bold"/>
    </style:style>
    <style:style style:name="T15" style:family="text">
      <style:text-properties fo:font-weight="bold" officeooo:rsid="007a69cf" style:font-weight-asian="bold" style:font-weight-complex="bold"/>
    </style:style>
    <style:style style:name="T16" style:family="text">
      <style:text-properties fo:font-weight="bold" officeooo:rsid="0065a5e2" style:font-weight-asian="bold" style:font-weight-complex="bold"/>
    </style:style>
    <style:style style:name="T17" style:family="text">
      <style:text-properties fo:font-weight="bold" officeooo:rsid="00ab1740"/>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officeooo:rsid="000bbd3f" style:font-weight-asian="normal" style:font-weight-complex="normal"/>
    </style:style>
    <style:style style:name="T21" style:family="text">
      <style:text-properties fo:font-weight="normal" officeooo:rsid="0018d26d" style:font-weight-asian="normal" style:font-weight-complex="normal"/>
    </style:style>
    <style:style style:name="T22" style:family="text">
      <style:text-properties fo:font-weight="normal" officeooo:rsid="00569b9c" style:font-weight-asian="normal" style:font-weight-complex="normal"/>
    </style:style>
    <style:style style:name="T23" style:family="text">
      <style:text-properties fo:font-weight="normal" officeooo:rsid="00994384" style:font-weight-asian="normal" style:font-weight-complex="normal"/>
    </style:style>
    <style:style style:name="T24" style:family="text">
      <style:text-properties officeooo:rsid="000db080"/>
    </style:style>
    <style:style style:name="T25" style:family="text">
      <style:text-properties officeooo:rsid="000fcead"/>
    </style:style>
    <style:style style:name="T26" style:family="text">
      <style:text-properties fo:color="#333333" loext:opacity="100%" style:text-outline="false" style:text-underline-style="none" fo:font-weight="normal" style:font-weight-asian="normal"/>
    </style:style>
    <style:style style:name="T27" style:family="text">
      <style:text-properties fo:color="#333333" loext:opacity="100%" style:text-outline="false" style:font-name="Liberation Serif" fo:font-size="11pt" style:text-underline-style="none" fo:font-weight="normal" style:font-size-asian="11pt" style:font-weight-asian="normal" style:font-size-complex="11pt"/>
    </style:style>
    <style:style style:name="T28" style:family="text">
      <style:text-properties fo:color="#333333" loext:opacity="100%" style:text-outline="false" style:font-name="Liberation Serif" fo:font-size="11pt" style:text-underline-style="none" fo:font-weight="normal" officeooo:rsid="00128705" style:font-size-asian="11pt" style:font-weight-asian="normal" style:font-size-complex="11pt"/>
    </style:style>
    <style:style style:name="T29" style:family="text">
      <style:text-properties fo:color="#333333" loext:opacity="100%" style:text-outline="false" style:font-name="Liberation Serif" fo:font-size="11pt" style:text-underline-style="none" fo:font-weight="normal" officeooo:rsid="007b3d44" style:font-size-asian="11pt" style:font-weight-asian="normal" style:font-size-complex="11pt"/>
    </style:style>
    <style:style style:name="T30" style:family="text">
      <style:text-properties fo:color="#333333" loext:opacity="100%" style:text-outline="false" fo:font-size="11pt" fo:font-style="normal" style:text-underline-style="none" style:font-size-asian="11pt" style:font-style-asian="normal" style:font-size-complex="11pt"/>
    </style:style>
    <style:style style:name="T31" style:family="text">
      <style:text-properties fo:font-variant="normal" fo:text-transform="none" fo:color="#333333" loext:opacity="100%" style:text-outline="false" fo:letter-spacing="normal" fo:font-style="normal" style:text-underline-style="none" fo:font-weight="normal" style:font-weight-asian="normal"/>
    </style:style>
    <style:style style:name="T32" style:family="text">
      <style:text-properties fo:font-variant="normal" fo:text-transform="none" fo:color="#333333" loext:opacity="100%" style:text-outline="false" style:font-name="Liberation Serif" fo:font-size="12pt" fo:letter-spacing="normal" fo:font-style="normal" style:text-underline-style="none" fo:font-weight="normal" officeooo:rsid="00128705" style:font-weight-asian="normal"/>
    </style:style>
    <style:style style:name="T33" style:family="text">
      <style:text-properties fo:font-variant="normal" fo:text-transform="none" fo:color="#333333" loext:opacity="100%" style:text-outline="false" style:font-name="Liberation Serif" fo:letter-spacing="normal" fo:font-style="normal" style:text-underline-style="none" fo:font-weight="normal" style:font-size-asian="11pt" style:font-weight-asian="normal"/>
    </style:style>
    <style:style style:name="T34" style:family="text">
      <style:text-properties fo:font-variant="normal" fo:text-transform="none" fo:color="#3333ff" loext:opacity="100%" style:text-outline="false" style:font-name="Liberation Serif" fo:letter-spacing="normal" fo:font-style="normal" style:text-underline-style="none" fo:font-weight="normal" style:font-size-asian="11pt" style:font-weight-asian="normal"/>
    </style:style>
    <style:style style:name="T35" style:family="text">
      <style:text-properties fo:font-variant="normal" fo:text-transform="none" fo:color="#141414" loext:opacity="100%" style:text-outline="false" style:font-name="Liberation Serif" fo:font-size="11pt" fo:letter-spacing="normal" fo:font-style="normal" style:text-underline-style="none" fo:font-weight="normal" officeooo:rsid="00128705" style:font-size-asian="11pt" style:font-weight-asian="normal" style:font-size-complex="11pt"/>
    </style:style>
    <style:style style:name="T36" style:family="text">
      <style:text-properties fo:font-variant="normal" fo:text-transform="none" fo:color="#085c77" loext:opacity="100%" style:font-name="Liberation Serif" fo:font-size="11pt" fo:letter-spacing="normal" fo:font-style="normal" style:text-underline-style="solid" style:text-underline-width="auto" style:text-underline-color="font-color" fo:font-weight="normal" style:font-size-asian="11pt" style:font-size-complex="11pt"/>
    </style:style>
    <style:style style:name="T37" style:family="text">
      <style:text-properties fo:font-variant="normal" fo:text-transform="none" fo:color="#212529" loext:opacity="100%" style:text-outline="false" style:font-name="Liberation Serif" fo:font-size="11pt" fo:letter-spacing="normal" fo:font-style="normal" style:text-underline-style="none" fo:font-weight="normal" style:font-size-asian="11pt" style:font-size-complex="11pt"/>
    </style:style>
    <style:style style:name="T38" style:family="text">
      <style:text-properties fo:font-variant="normal" fo:text-transform="none" fo:color="#212529" loext:opacity="100%" style:text-outline="false" style:font-name="Liberation Serif" fo:font-size="11pt" fo:letter-spacing="normal" fo:font-style="normal" style:text-underline-style="none" fo:font-weight="normal" officeooo:rsid="00128705" style:font-size-asian="11pt" style:font-size-complex="11pt"/>
    </style:style>
    <style:style style:name="T39" style:family="text">
      <style:text-properties fo:font-variant="normal" fo:text-transform="none" fo:color="#000000" loext:opacity="100%" fo:letter-spacing="normal"/>
    </style:style>
    <style:style style:name="T40" style:family="text">
      <style:text-properties fo:font-variant="normal" fo:text-transform="none" fo:color="#000000" loext:opacity="100%" fo:letter-spacing="normal" fo:font-style="normal"/>
    </style:style>
    <style:style style:name="T41" style:family="text">
      <style:text-properties fo:font-variant="normal" fo:text-transform="none" fo:color="#000000" loext:opacity="100%" fo:letter-spacing="normal" fo:font-style="normal" fo:font-weight="normal"/>
    </style:style>
    <style:style style:name="T42" style:family="text">
      <style:text-properties fo:font-variant="normal" fo:text-transform="none" fo:color="#000000" loext:opacity="100%" fo:letter-spacing="normal" fo:font-style="normal" fo:font-weight="normal" officeooo:rsid="001ce228"/>
    </style:style>
    <style:style style:name="T43" style:family="text">
      <style:text-properties fo:font-variant="normal" fo:text-transform="none" fo:color="#000000" loext:opacity="100%" fo:letter-spacing="normal" fo:font-style="normal" fo:font-weight="normal" officeooo:rsid="001ce228" style:font-weight-asian="bold" style:font-weight-complex="bold"/>
    </style:style>
    <style:style style:name="T44" style:family="text">
      <style:text-properties fo:font-variant="normal" fo:text-transform="none" fo:color="#000000" loext:opacity="100%" fo:letter-spacing="normal" fo:font-style="normal" fo:font-weight="normal" officeooo:rsid="0027fa9d" style:font-weight-asian="bold" style:font-weight-complex="bold"/>
    </style:style>
    <style:style style:name="T45"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46" style:family="text">
      <style:text-properties fo:font-variant="normal" fo:text-transform="none" fo:color="#000000" loext:opacity="100%" fo:letter-spacing="normal" fo:font-style="normal" fo:font-weight="normal" officeooo:rsid="00287c31"/>
    </style:style>
    <style:style style:name="T47" style:family="text">
      <style:text-properties fo:font-variant="normal" fo:text-transform="none" fo:color="#000000" loext:opacity="100%" fo:letter-spacing="normal" fo:font-style="normal" fo:font-weight="normal" style:font-weight-asian="normal" style:font-weight-complex="normal"/>
    </style:style>
    <style:style style:name="T48" style:family="text">
      <style:text-properties fo:font-variant="normal" fo:text-transform="none" fo:color="#000000" loext:opacity="100%" fo:letter-spacing="normal" fo:font-style="normal" fo:font-weight="normal" officeooo:rsid="001ce228" style:font-weight-asian="normal" style:font-weight-complex="normal"/>
    </style:style>
    <style:style style:name="T49" style:family="text">
      <style:text-properties fo:font-variant="normal" fo:text-transform="none" fo:color="#000000" loext:opacity="100%" fo:letter-spacing="normal" fo:font-style="normal" fo:font-weight="normal" officeooo:rsid="00297128" style:font-weight-asian="normal" style:font-weight-complex="normal"/>
    </style:style>
    <style:style style:name="T50" style:family="text">
      <style:text-properties fo:font-variant="normal" fo:text-transform="none" fo:color="#000000" loext:opacity="100%" fo:letter-spacing="normal" fo:font-style="normal" fo:font-weight="normal" officeooo:rsid="002b04c8"/>
    </style:style>
    <style:style style:name="T51" style:family="text">
      <style:text-properties fo:font-variant="normal" fo:text-transform="none" fo:color="#000000" loext:opacity="100%" fo:letter-spacing="normal" fo:font-style="normal" fo:font-weight="normal" officeooo:rsid="002b4a64"/>
    </style:style>
    <style:style style:name="T52" style:family="text">
      <style:text-properties fo:font-variant="normal" fo:text-transform="none" fo:color="#000000" loext:opacity="100%" fo:letter-spacing="normal" fo:font-style="normal" fo:font-weight="normal" officeooo:rsid="002a831d"/>
    </style:style>
    <style:style style:name="T53" style:family="text">
      <style:text-properties fo:font-variant="normal" fo:text-transform="none" fo:color="#000000" loext:opacity="100%" fo:letter-spacing="normal" fo:font-style="normal" fo:font-weight="normal" officeooo:rsid="00320ced"/>
    </style:style>
    <style:style style:name="T54" style:family="text">
      <style:text-properties fo:font-variant="normal" fo:text-transform="none" fo:color="#000000" loext:opacity="100%" fo:letter-spacing="normal" fo:font-style="normal" fo:font-weight="normal" officeooo:rsid="0032428e"/>
    </style:style>
    <style:style style:name="T55" style:family="text">
      <style:text-properties fo:font-variant="normal" fo:text-transform="none" fo:color="#000000" loext:opacity="100%" fo:letter-spacing="normal" fo:font-style="normal" fo:font-weight="normal" officeooo:rsid="0092175b"/>
    </style:style>
    <style:style style:name="T56" style:family="text">
      <style:text-properties fo:font-variant="normal" fo:text-transform="none" fo:color="#000000" loext:opacity="100%" fo:letter-spacing="normal" fo:font-style="normal" officeooo:rsid="001fd7e2"/>
    </style:style>
    <style:style style:name="T57" style:family="text">
      <style:text-properties fo:font-variant="normal" fo:text-transform="none" fo:color="#000000" loext:opacity="100%" fo:letter-spacing="normal" fo:font-style="normal" fo:font-weight="bold"/>
    </style:style>
    <style:style style:name="T58" style:family="text">
      <style:text-properties fo:font-variant="normal" fo:text-transform="none" fo:color="#000000" loext:opacity="100%" fo:letter-spacing="normal" fo:font-style="normal" fo:font-weight="bold" style:font-weight-asian="bold" style:font-weight-complex="bold"/>
    </style:style>
    <style:style style:name="T59" style:family="text">
      <style:text-properties fo:font-variant="normal" fo:text-transform="none" fo:color="#000000" loext:opacity="100%" fo:letter-spacing="normal" fo:font-style="normal" fo:font-weight="bold" officeooo:rsid="008316ad" style:font-weight-asian="bold" style:font-weight-complex="bold"/>
    </style:style>
    <style:style style:name="T60" style:family="text">
      <style:text-properties fo:font-variant="normal" fo:text-transform="none" fo:color="#000000" loext:opacity="100%" fo:letter-spacing="normal" fo:font-style="normal" fo:font-weight="bold" officeooo:rsid="0092175b" style:font-weight-asian="bold" style:font-weight-complex="bold"/>
    </style:style>
    <style:style style:name="T61" style:family="text">
      <style:text-properties fo:font-variant="normal" fo:text-transform="none" fo:color="#000000" loext:opacity="100%" fo:letter-spacing="normal" fo:font-style="italic" style:font-style-asian="italic" style:font-style-complex="italic"/>
    </style:style>
    <style:style style:name="T62" style:family="text">
      <style:text-properties fo:font-variant="normal" fo:text-transform="none" fo:color="#000000" loext:opacity="100%" style:font-name="Liberation Serif" fo:font-size="11pt" fo:letter-spacing="normal" fo:font-style="normal" fo:font-weight="normal" officeooo:rsid="00287c31" style:font-size-asian="11pt" style:font-weight-asian="bold" style:font-size-complex="11pt" style:font-weight-complex="bold"/>
    </style:style>
    <style:style style:name="T63" style:family="text">
      <style:text-properties fo:font-variant="normal" fo:text-transform="none" fo:color="#000000" loext:opacity="100%" style:font-name="Liberation Serif" fo:font-size="11pt" fo:letter-spacing="normal" fo:font-style="normal" fo:font-weight="normal" officeooo:rsid="002a3aa2" style:font-size-asian="11pt" style:font-weight-asian="bold" style:font-size-complex="11pt" style:font-weight-complex="bold"/>
    </style:style>
    <style:style style:name="T64" style:family="text">
      <style:text-properties fo:font-variant="normal" fo:text-transform="none" fo:color="#000000" loext:opacity="100%" style:font-name="Liberation Serif" fo:font-size="11pt" fo:letter-spacing="normal" fo:font-style="normal" fo:font-weight="normal" officeooo:rsid="003c5f32" style:font-size-asian="11pt" style:font-weight-asian="bold" style:font-size-complex="11pt" style:font-weight-complex="bold"/>
    </style:style>
    <style:style style:name="T65" style:family="text">
      <style:text-properties fo:font-variant="normal" fo:text-transform="none" fo:color="#000000" loext:opacity="100%" style:font-name="Liberation Serif" fo:font-size="11pt" fo:letter-spacing="normal" fo:font-style="normal" fo:font-weight="normal" officeooo:rsid="003a99a7" style:font-size-asian="11pt" style:font-weight-asian="bold" style:font-size-complex="11pt" style:font-weight-complex="bold"/>
    </style:style>
    <style:style style:name="T66" style:family="text">
      <style:text-properties fo:font-variant="normal" fo:text-transform="none" fo:color="#000000" loext:opacity="100%" style:font-name="Liberation Serif" fo:font-size="11pt" fo:letter-spacing="normal" fo:font-style="normal" fo:font-weight="normal" officeooo:rsid="00cc7603" style:font-size-asian="11pt" style:font-weight-asian="bold" style:font-size-complex="11pt" style:font-weight-complex="bold"/>
    </style:style>
    <style:style style:name="T67" style:family="text">
      <style:text-properties fo:font-variant="normal" fo:text-transform="none" fo:color="#000000" loext:opacity="100%" style:font-name="Liberation Serif" fo:font-size="11pt" fo:letter-spacing="normal" fo:font-style="normal" fo:font-weight="normal" officeooo:rsid="0011c311" style:font-size-asian="11pt" style:font-weight-asian="bold" style:font-size-complex="11pt" style:font-weight-complex="bold"/>
    </style:style>
    <style:style style:name="T68"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69" style:family="text">
      <style:text-properties fo:font-variant="normal" fo:text-transform="none" fo:color="#000000" loext:opacity="100%" style:font-name="Liberation Serif" fo:font-size="11pt" fo:letter-spacing="normal" fo:font-style="normal" fo:font-weight="normal" officeooo:rsid="001ce228" style:font-size-asian="11pt" style:font-size-complex="11pt"/>
    </style:style>
    <style:style style:name="T70" style:family="text">
      <style:text-properties fo:font-variant="normal" fo:text-transform="none" fo:color="#000000" loext:opacity="100%" style:font-name="Liberation Serif" fo:font-size="11pt" fo:letter-spacing="normal" fo:font-style="normal" fo:font-weight="normal" officeooo:rsid="002a3aa2" style:font-size-asian="11pt" style:font-size-complex="11pt"/>
    </style:style>
    <style:style style:name="T71" style:family="text">
      <style:text-properties fo:font-variant="normal" fo:text-transform="none" fo:color="#000000" loext:opacity="100%" style:font-name="Liberation Serif" fo:font-size="11pt" fo:letter-spacing="normal" fo:font-style="normal" fo:font-weight="normal" officeooo:rsid="002b4a64" style:font-size-asian="11pt" style:font-size-complex="11pt"/>
    </style:style>
    <style:style style:name="T72" style:family="text">
      <style:text-properties fo:font-variant="normal" fo:text-transform="none" fo:color="#000000" loext:opacity="100%" style:font-name="Liberation Serif" fo:font-size="11pt" fo:letter-spacing="normal" fo:font-style="normal" fo:font-weight="normal" officeooo:rsid="00313315" style:font-size-asian="11pt" style:font-size-complex="11pt"/>
    </style:style>
    <style:style style:name="T73" style:family="text">
      <style:text-properties fo:font-variant="normal" fo:text-transform="none" fo:color="#000000" loext:opacity="100%" style:font-name="Liberation Serif" fo:font-size="11pt" fo:letter-spacing="normal" fo:font-style="normal" fo:font-weight="normal" officeooo:rsid="00320ced" style:font-size-asian="11pt" style:font-size-complex="11pt"/>
    </style:style>
    <style:style style:name="T74" style:family="text">
      <style:text-properties fo:font-variant="normal" fo:text-transform="none" fo:color="#000000" loext:opacity="100%" style:font-name="Liberation Serif" fo:font-size="11pt" fo:letter-spacing="normal" fo:font-style="normal" fo:font-weight="normal" officeooo:rsid="0032428e" style:font-size-asian="11pt" style:font-size-complex="11pt"/>
    </style:style>
    <style:style style:name="T75" style:family="text">
      <style:text-properties fo:font-variant="normal" fo:text-transform="none" fo:color="#000000" loext:opacity="100%" style:font-name="Liberation Serif" fo:font-size="11pt" fo:letter-spacing="normal" fo:font-style="normal" fo:font-weight="normal" officeooo:rsid="00341beb" style:font-size-asian="11pt" style:font-size-complex="11pt"/>
    </style:style>
    <style:style style:name="T76" style:family="text">
      <style:text-properties fo:font-variant="normal" fo:text-transform="none" fo:color="#000000" loext:opacity="100%" style:font-name="Liberation Serif" fo:font-size="11pt" fo:letter-spacing="normal" fo:font-style="normal" fo:font-weight="normal" officeooo:rsid="00362050" style:font-size-asian="11pt" style:font-size-complex="11pt"/>
    </style:style>
    <style:style style:name="T77" style:family="text">
      <style:text-properties fo:font-variant="normal" fo:text-transform="none" fo:color="#000000" loext:opacity="100%" style:font-name="Liberation Serif" fo:font-size="11pt" fo:letter-spacing="normal" fo:font-style="normal" fo:font-weight="normal" officeooo:rsid="0027fa9d" style:font-size-asian="11pt" style:font-size-complex="11pt"/>
    </style:style>
    <style:style style:name="T78" style:family="text">
      <style:text-properties fo:font-variant="normal" fo:text-transform="none" fo:color="#000000" loext:opacity="100%" style:font-name="Liberation Serif" fo:font-size="11pt" fo:letter-spacing="normal" fo:font-style="normal" fo:font-weight="normal" officeooo:rsid="00379202" style:font-size-asian="11pt" style:font-size-complex="11pt"/>
    </style:style>
    <style:style style:name="T79" style:family="text">
      <style:text-properties fo:font-variant="normal" fo:text-transform="none" fo:color="#000000" loext:opacity="100%" style:font-name="Liberation Serif" fo:font-size="11pt" fo:letter-spacing="normal" fo:font-style="normal" fo:font-weight="normal" officeooo:rsid="0037926d" style:font-size-asian="11pt" style:font-size-complex="11pt"/>
    </style:style>
    <style:style style:name="T80" style:family="text">
      <style:text-properties fo:font-variant="normal" fo:text-transform="none" fo:color="#000000" loext:opacity="100%" style:font-name="Liberation Serif" fo:font-size="11pt" fo:letter-spacing="normal" fo:font-style="normal" fo:font-weight="normal" officeooo:rsid="0051b5cb" style:font-size-asian="11pt" style:font-size-complex="11pt"/>
    </style:style>
    <style:style style:name="T81" style:family="text">
      <style:text-properties fo:font-variant="normal" fo:text-transform="none" fo:color="#000000" loext:opacity="100%" style:font-name="Liberation Serif" fo:font-size="11pt" fo:letter-spacing="normal" fo:font-style="normal" fo:font-weight="normal" officeooo:rsid="006d5853" style:font-size-asian="11pt" style:font-size-complex="11pt"/>
    </style:style>
    <style:style style:name="T82" style:family="text">
      <style:text-properties fo:font-variant="normal" fo:text-transform="none" fo:color="#000000" loext:opacity="100%" style:font-name="Liberation Serif" fo:font-size="11pt" fo:letter-spacing="normal" fo:font-style="normal" fo:font-weight="normal" officeooo:rsid="003d82b4" style:font-size-asian="11pt" style:font-size-complex="11pt"/>
    </style:style>
    <style:style style:name="T83" style:family="text">
      <style:text-properties fo:font-variant="normal" fo:text-transform="none" fo:color="#000000" loext:opacity="100%" style:font-name="Liberation Serif" fo:font-size="11pt" fo:letter-spacing="normal" fo:font-style="normal" fo:font-weight="normal" officeooo:rsid="00cce4a1" style:font-size-asian="11pt" style:font-size-complex="11pt"/>
    </style:style>
    <style:style style:name="T84" style:family="text">
      <style:text-properties fo:font-variant="normal" fo:text-transform="none" fo:color="#000000" loext:opacity="100%" style:font-name="Liberation Serif" fo:font-size="11pt" fo:letter-spacing="normal" fo:font-style="normal" fo:font-weight="normal" officeooo:rsid="00aae2f4" style:font-size-asian="11pt" style:font-size-complex="11pt"/>
    </style:style>
    <style:style style:name="T85" style:family="text">
      <style:text-properties fo:font-variant="normal" fo:text-transform="none" fo:color="#000000" loext:opacity="100%" style:font-name="Liberation Serif" fo:font-size="11pt" fo:letter-spacing="normal" fo:font-style="normal" fo:font-weight="normal" style:font-size-asian="11pt" style:font-weight-asian="normal" style:font-size-complex="11pt" style:font-weight-complex="normal"/>
    </style:style>
    <style:style style:name="T86" style:family="text">
      <style:text-properties fo:font-variant="normal" fo:text-transform="none" fo:color="#000000" loext:opacity="100%" style:font-name="Liberation Serif" fo:font-size="11pt" fo:letter-spacing="normal" fo:font-style="normal" fo:font-weight="normal" officeooo:rsid="0027fefd" style:font-size-asian="11pt" style:font-weight-asian="normal" style:font-size-complex="11pt" style:font-weight-complex="normal"/>
    </style:style>
    <style:style style:name="T87" style:family="text">
      <style:text-properties fo:font-variant="normal" fo:text-transform="none" fo:color="#000000" loext:opacity="100%" style:font-name="Liberation Serif" fo:font-size="11pt" fo:letter-spacing="normal" fo:font-style="normal" fo:font-weight="normal" officeooo:rsid="0018d26d" style:font-size-asian="11pt" style:font-weight-asian="normal" style:font-size-complex="11pt" style:font-weight-complex="normal"/>
    </style:style>
    <style:style style:name="T88" style:family="text">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T89" style:family="text">
      <style:text-properties fo:font-variant="normal" fo:text-transform="none" fo:color="#000000" loext:opacity="100%" style:font-name="Liberation Serif" fo:font-size="11pt" fo:letter-spacing="normal" fo:font-style="normal" fo:font-weight="bold" officeooo:rsid="001ce228" style:font-size-asian="11pt" style:font-weight-asian="bold" style:font-size-complex="11pt" style:font-weight-complex="bold"/>
    </style:style>
    <style:style style:name="T90" style:family="text">
      <style:text-properties fo:font-variant="normal" fo:text-transform="none" fo:color="#000000" loext:opacity="100%" style:font-name="Liberation Serif" fo:font-size="11pt" fo:letter-spacing="normal" fo:font-style="normal" fo:font-weight="bold" officeooo:rsid="002a3aa2" style:font-size-asian="11pt" style:font-weight-asian="bold" style:font-size-complex="11pt" style:font-weight-complex="bold"/>
    </style:style>
    <style:style style:name="T91" style:family="text">
      <style:text-properties fo:font-variant="normal" fo:text-transform="none" fo:color="#000000" loext:opacity="100%" style:font-name="Liberation Serif" fo:font-size="11pt" fo:letter-spacing="normal" fo:font-style="normal" fo:font-weight="bold" officeooo:rsid="00a343a6" style:font-size-asian="11pt" style:font-weight-asian="bold" style:font-size-complex="11pt" style:font-weight-complex="bold"/>
    </style:style>
    <style:style style:name="T92" style:family="text">
      <style:text-properties fo:font-variant="normal" fo:text-transform="none" fo:color="#000000" loext:opacity="100%" style:font-name="Liberation Serif" fo:font-size="11pt" fo:letter-spacing="normal" fo:font-style="normal" fo:font-weight="bold" officeooo:rsid="00cce4a1" style:font-size-asian="11pt" style:font-weight-asian="bold" style:font-size-complex="11pt" style:font-weight-complex="bold"/>
    </style:style>
    <style:style style:name="T93" style:family="text">
      <style:text-properties fo:font-variant="normal" fo:text-transform="none" fo:color="#000000" loext:opacity="100%" style:font-name="Liberation Serif" fo:font-size="11pt" fo:letter-spacing="normal" fo:font-style="normal" fo:font-weight="bold" style:font-size-asian="11pt" style:font-size-complex="11pt"/>
    </style:style>
    <style:style style:name="T94" style:family="text">
      <style:text-properties fo:font-variant="normal" fo:text-transform="none" fo:color="#000000" loext:opacity="100%" style:font-name="Liberation Serif" fo:font-size="11pt" fo:letter-spacing="normal" fo:font-style="normal" fo:font-weight="bold" officeooo:rsid="00a92c6d" style:font-size-asian="11pt" style:font-size-complex="11pt"/>
    </style:style>
    <style:style style:name="T95" style:family="text">
      <style:text-properties fo:font-variant="normal" fo:text-transform="none" fo:color="#000000" loext:opacity="100%" style:font-name="Liberation Serif" fo:font-size="11pt" fo:letter-spacing="normal" fo:font-style="normal" officeooo:rsid="00313315" style:font-size-asian="11pt" style:font-size-complex="11pt"/>
    </style:style>
    <style:style style:name="T96" style:family="text">
      <style:text-properties fo:font-variant="normal" fo:text-transform="none" fo:color="#000000" loext:opacity="100%" style:font-name="Liberation Serif" fo:font-size="11pt" fo:letter-spacing="normal" fo:font-weight="normal" officeooo:rsid="00320ced" style:font-size-asian="11pt" style:font-size-complex="11pt"/>
    </style:style>
    <style:style style:name="T97" style:family="text">
      <style:text-properties fo:font-variant="normal" fo:text-transform="none" fo:color="#000000" loext:opacity="100%" style:font-name="Liberation Serif" fo:font-size="11pt" fo:letter-spacing="normal" style:font-size-asian="11pt" style:font-size-complex="11pt"/>
    </style:style>
    <style:style style:name="T98" style:family="text">
      <style:text-properties fo:font-variant="normal" fo:text-transform="none" fo:color="#000000" loext:opacity="100%" style:font-name="Liberation Serif" fo:letter-spacing="normal"/>
    </style:style>
    <style:style style:name="T99" style:family="text">
      <style:text-properties fo:font-variant="normal" fo:text-transform="none" fo:color="#000000" loext:opacity="100%" style:font-name="Liberation Serif" fo:letter-spacing="normal" fo:font-style="normal" fo:font-weight="normal"/>
    </style:style>
    <style:style style:name="T100" style:family="text">
      <style:text-properties fo:font-variant="normal" fo:text-transform="none" fo:color="#000000" loext:opacity="100%" style:font-name="Liberation Serif" fo:letter-spacing="normal" fo:font-style="normal" fo:font-weight="normal" officeooo:rsid="002b4a64"/>
    </style:style>
    <style:style style:name="T101" style:family="text">
      <style:text-properties fo:font-variant="normal" fo:text-transform="none" fo:color="#000000" loext:opacity="100%" style:font-name="Liberation Serif" fo:letter-spacing="normal" fo:font-style="normal" fo:font-weight="normal" officeooo:rsid="002a831d"/>
    </style:style>
    <style:style style:name="T102" style:family="text">
      <style:text-properties fo:font-variant="normal" fo:text-transform="none" fo:color="#000000" loext:opacity="100%" style:font-name="Liberation Serif" fo:letter-spacing="normal" fo:font-style="normal" fo:font-weight="normal" officeooo:rsid="002e7f12"/>
    </style:style>
    <style:style style:name="T103" style:family="text">
      <style:text-properties fo:font-variant="normal" fo:text-transform="none" fo:color="#000000" loext:opacity="100%" style:font-name="Liberation Serif" fo:letter-spacing="normal" fo:font-style="normal" fo:font-weight="normal" officeooo:rsid="00313315"/>
    </style:style>
    <style:style style:name="T104" style:family="text">
      <style:text-properties fo:font-variant="normal" fo:text-transform="none" fo:color="#000000" loext:opacity="100%" style:font-name="Liberation Serif" fo:letter-spacing="normal" fo:font-style="normal" fo:font-weight="normal" officeooo:rsid="00320ced"/>
    </style:style>
    <style:style style:name="T105" style:family="text">
      <style:text-properties fo:font-variant="normal" fo:text-transform="none" fo:color="#000000" loext:opacity="100%" style:font-name="Liberation Serif" fo:letter-spacing="normal" fo:font-style="normal" fo:font-weight="normal" officeooo:rsid="0032428e"/>
    </style:style>
    <style:style style:name="T106" style:family="text">
      <style:text-properties fo:font-variant="normal" fo:text-transform="none" fo:color="#000000" loext:opacity="100%" style:font-name="Liberation Serif" fo:letter-spacing="normal" fo:font-style="normal" fo:font-weight="normal" officeooo:rsid="003593cc"/>
    </style:style>
    <style:style style:name="T107" style:family="text">
      <style:text-properties fo:font-variant="normal" fo:text-transform="none" fo:color="#000000" loext:opacity="100%" style:font-name="Liberation Serif" fo:letter-spacing="normal" fo:font-style="normal" fo:font-weight="normal" officeooo:rsid="00362050"/>
    </style:style>
    <style:style style:name="T108" style:family="text">
      <style:text-properties fo:font-variant="normal" fo:text-transform="none" fo:color="#000000" loext:opacity="100%" style:font-name="Liberation Serif" fo:letter-spacing="normal" fo:font-style="normal" fo:font-weight="normal" officeooo:rsid="0037926d"/>
    </style:style>
    <style:style style:name="T109" style:family="text">
      <style:text-properties fo:font-variant="normal" fo:text-transform="none" fo:color="#000000" loext:opacity="100%" style:font-name="Liberation Serif" fo:letter-spacing="normal" fo:font-style="normal" fo:font-weight="normal" officeooo:rsid="0038f357"/>
    </style:style>
    <style:style style:name="T110" style:family="text">
      <style:text-properties fo:font-variant="normal" fo:text-transform="none" fo:color="#000000" loext:opacity="100%" style:font-name="Liberation Serif" fo:letter-spacing="normal" fo:font-style="normal" fo:font-weight="normal" officeooo:rsid="00287c31"/>
    </style:style>
    <style:style style:name="T111" style:family="text">
      <style:text-properties fo:font-variant="normal" fo:text-transform="none" fo:color="#000000" loext:opacity="100%" style:font-name="Liberation Serif" fo:letter-spacing="normal" fo:font-style="normal" fo:font-weight="normal" officeooo:rsid="0044e228"/>
    </style:style>
    <style:style style:name="T112" style:family="text">
      <style:text-properties fo:font-variant="normal" fo:text-transform="none" fo:color="#000000" loext:opacity="100%" style:font-name="Liberation Serif" fo:letter-spacing="normal" fo:font-style="normal" fo:font-weight="normal" officeooo:rsid="00a92c6d"/>
    </style:style>
    <style:style style:name="T113" style:family="text">
      <style:text-properties fo:font-variant="normal" fo:text-transform="none" fo:color="#000000" loext:opacity="100%" style:font-name="Liberation Serif" fo:letter-spacing="normal" fo:font-style="normal" officeooo:rsid="00320ced"/>
    </style:style>
    <style:style style:name="T114" style:family="text">
      <style:text-properties fo:font-variant="normal" fo:text-transform="none" fo:color="#000000" loext:opacity="100%" style:font-name="Liberation Serif" fo:letter-spacing="normal" fo:font-style="normal" fo:font-weight="bold"/>
    </style:style>
    <style:style style:name="T115" style:family="text">
      <style:text-properties fo:font-variant="normal" fo:text-transform="none" fo:color="#000000" loext:opacity="100%" style:font-name="Liberation Serif" fo:letter-spacing="normal" fo:font-style="normal" fo:font-weight="bold" style:font-weight-asian="bold" style:font-weight-complex="bold"/>
    </style:style>
    <style:style style:name="T116" style:family="text">
      <style:text-properties fo:font-variant="normal" fo:text-transform="none" fo:color="#000000" loext:opacity="100%" style:font-name="Liberation Serif" fo:letter-spacing="normal" fo:font-style="normal" fo:font-weight="bold" officeooo:rsid="00313315" style:font-weight-asian="bold" style:font-weight-complex="bold"/>
    </style:style>
    <style:style style:name="T117" style:family="text">
      <style:text-properties fo:font-variant="normal" fo:text-transform="none" fo:color="#000000" loext:opacity="100%" style:font-name="Liberation Serif" fo:letter-spacing="normal" fo:font-style="normal" fo:font-weight="bold" officeooo:rsid="00a7b5c8" style:font-weight-asian="bold" style:font-weight-complex="bold"/>
    </style:style>
    <style:style style:name="T118" style:family="text">
      <style:text-properties fo:font-variant="normal" fo:text-transform="none" fo:color="#000000" loext:opacity="100%" style:font-name="Liberation Serif" fo:letter-spacing="normal" fo:font-style="italic" fo:font-weight="normal"/>
    </style:style>
    <style:style style:name="T119" style:family="text">
      <style:text-properties fo:font-variant="normal" fo:text-transform="none" fo:color="#000000" loext:opacity="100%" style:font-name="Liberation Serif" fo:letter-spacing="normal" fo:font-style="italic" fo:font-weight="normal" style:font-style-asian="italic" style:font-style-complex="italic"/>
    </style:style>
    <style:style style:name="T120"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21"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22" style:family="text">
      <style:text-properties fo:font-variant="normal" fo:text-transform="none" fo:color="#000000" loext:opacity="100%" style:font-name="Liberation Serif" fo:font-size="12pt" fo:letter-spacing="normal" fo:font-style="normal" fo:font-weight="bold" officeooo:rsid="00c8839b" style:font-weight-asian="bold" style:font-weight-complex="bold"/>
    </style:style>
    <style:style style:name="T123" style:family="text">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124" style:family="text">
      <style:text-properties fo:font-variant="normal" fo:text-transform="none" fo:color="#000000" loext:opacity="100%" style:font-name="Liberation Serif" fo:font-size="14pt" fo:letter-spacing="normal" fo:font-style="normal" fo:font-weight="normal" style:font-size-asian="11pt" style:font-size-complex="11pt"/>
    </style:style>
    <style:style style:name="T125" style:family="text">
      <style:text-properties fo:font-variant="normal" fo:text-transform="none" fo:color="#000000" loext:opacity="100%" style:font-name="American Typewriter" fo:letter-spacing="normal" fo:font-style="normal" fo:font-weight="normal"/>
    </style:style>
    <style:style style:name="T126" style:family="text">
      <style:text-properties fo:font-variant="normal" fo:text-transform="none" fo:color="#000000" loext:opacity="100%" style:font-name="American Typewriter" fo:letter-spacing="normal" fo:font-style="normal" fo:font-weight="normal" officeooo:rsid="0038f357"/>
    </style:style>
    <style:style style:name="T127" style:family="text">
      <style:text-properties fo:font-variant="normal" fo:text-transform="none" fo:color="#000000" loext:opacity="100%" style:font-name="American Typewriter" fo:letter-spacing="normal" fo:font-style="normal" fo:font-weight="bold" style:font-weight-asian="bold" style:font-weight-complex="bold"/>
    </style:style>
    <style:style style:name="T128" style:family="text">
      <style:text-properties fo:font-variant="normal" fo:text-transform="none" fo:color="#000000" loext:opacity="100%" style:font-name="American Typewriter" fo:font-size="12pt" fo:letter-spacing="normal" fo:font-style="normal" fo:font-weight="normal" officeooo:rsid="008f2335" style:font-size-asian="12pt" style:font-weight-asian="normal" style:font-size-complex="12pt" style:font-weight-complex="normal"/>
    </style:style>
    <style:style style:name="T129" style:family="text">
      <style:text-properties fo:font-variant="normal" fo:text-transform="none" fo:color="#000000" loext:opacity="100%" style:font-name="American Typewriter" fo:font-size="12pt" fo:letter-spacing="normal" fo:font-style="normal" officeooo:rsid="008f2335" style:font-size-asian="12pt" style:font-size-complex="12pt"/>
    </style:style>
    <style:style style:name="T130" style:family="text">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T131" style:family="text">
      <style:text-properties fo:font-variant="normal" fo:text-transform="none" fo:color="#000000" loext:opacity="100%" fo:font-size="11pt" fo:letter-spacing="normal" fo:font-style="normal" fo:font-weight="normal" style:font-size-asian="11pt" style:font-size-complex="11pt"/>
    </style:style>
    <style:style style:name="T132" style:family="text">
      <style:text-properties fo:font-variant="normal" fo:text-transform="none" fo:color="#000000" loext:opacity="100%" fo:font-size="11pt" fo:letter-spacing="normal" fo:font-style="normal" fo:font-weight="normal" officeooo:rsid="00c57dc4" style:font-size-asian="11pt" style:font-size-complex="11pt"/>
    </style:style>
    <style:style style:name="T133"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style:text-blinking="false" style:font-size-asian="11pt" style:font-size-complex="11pt" loext:padding="0in" loext:border="none"/>
    </style:style>
    <style:style style:name="T134"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3d82b4" style:text-blinking="false" style:font-size-asian="11pt" style:font-size-complex="11pt" loext:padding="0in" loext:border="none"/>
    </style:style>
    <style:style style:name="T135"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c7c77f" style:text-blinking="false" style:font-size-asian="11pt" style:font-weight-asian="bold" style:font-size-complex="11pt" style:font-weight-complex="bold" loext:padding="0in" loext:border="none"/>
    </style:style>
    <style:style style:name="T136"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137"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c7c77f" style:text-blinking="false" style:font-size-asian="11pt" style:font-size-complex="11pt" loext:padding="0in" loext:border="none"/>
    </style:style>
    <style:style style:name="T138"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c97a48" style:text-blinking="false" style:font-size-asian="11pt" style:font-size-complex="11pt" loext:padding="0in" loext:border="none"/>
    </style:style>
    <style:style style:name="T139"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140" style:family="text">
      <style:text-properties fo:font-variant="normal" fo:text-transform="none" fo:color="#000000" loext:opacity="100%" style:font-name="Liberation Serif" fo:font-size="11pt" fo:letter-spacing="normal" fo:font-style="normal" fo:font-weight="normal" officeooo:rsid="00d4703e" style:font-size-asian="11pt" style:font-size-complex="11pt"/>
    </style:style>
    <style:style style:name="T141" style:family="text">
      <style:text-properties fo:font-variant="normal" fo:text-transform="none" fo:color="#000000" loext:opacity="100%" style:font-name="Liberation Serif" fo:font-size="11pt" fo:letter-spacing="normal" style:font-size-asian="11pt" style:font-size-complex="11pt"/>
    </style:style>
    <style:style style:name="T142" style:family="text">
      <style:text-properties fo:font-variant="normal" fo:text-transform="none" fo:color="#0a0a0a" loext:opacity="100%" style:font-name="Liberation Serif" fo:font-size="11pt" fo:letter-spacing="normal" fo:font-style="normal" fo:font-weight="normal" style:font-size-asian="11pt" style:font-size-complex="11pt"/>
    </style:style>
    <style:style style:name="T143" style:family="text">
      <style:text-properties fo:font-variant="normal" fo:text-transform="none" fo:color="#0a0a0a" loext:opacity="100%" style:font-name="Liberation Serif" fo:font-size="11pt" fo:letter-spacing="normal" fo:font-style="normal" fo:font-weight="normal" officeooo:rsid="00379202" style:font-size-asian="11pt" style:font-size-complex="11pt"/>
    </style:style>
    <style:style style:name="T144" style:family="text">
      <style:text-properties fo:font-variant="normal" fo:text-transform="none" fo:color="#0a0a0a" loext:opacity="100%" style:font-name="Liberation Serif" fo:font-size="11pt" fo:letter-spacing="normal" fo:font-style="normal" fo:font-weight="normal" officeooo:rsid="003c5f32" style:font-size-asian="11pt" style:font-size-complex="11pt"/>
    </style:style>
    <style:style style:name="T145" style:family="text">
      <style:text-properties fo:font-variant="normal" fo:text-transform="none" fo:color="#0a0a0a" loext:opacity="100%" style:font-name="Liberation Serif" fo:font-size="11pt" fo:letter-spacing="normal" fo:font-style="normal" fo:font-weight="normal" officeooo:rsid="003d82b4" style:font-size-asian="11pt" style:font-size-complex="11pt"/>
    </style:style>
    <style:style style:name="T146" style:family="text">
      <style:text-properties fo:font-variant="normal" fo:text-transform="none" fo:color="#0a0a0a" loext:opacity="100%" style:font-name="Liberation Serif" fo:font-size="11pt" fo:letter-spacing="normal" fo:font-style="normal" fo:font-weight="normal" officeooo:rsid="005a3260" style:font-size-asian="11pt" style:font-size-complex="11pt"/>
    </style:style>
    <style:style style:name="T147" style:family="text">
      <style:text-properties fo:font-variant="normal" fo:text-transform="none" fo:color="#0a0a0a" loext:opacity="100%" style:font-name="Liberation Serif" fo:font-size="11pt" fo:letter-spacing="normal" fo:font-style="normal" fo:font-weight="normal" officeooo:rsid="005dd200" style:font-size-asian="11pt" style:font-size-complex="11pt"/>
    </style:style>
    <style:style style:name="T148" style:family="text">
      <style:text-properties fo:font-variant="normal" fo:text-transform="none" fo:color="#0a0a0a" loext:opacity="100%" style:font-name="Liberation Serif" fo:font-size="11pt" fo:letter-spacing="normal" fo:font-style="normal" fo:font-weight="normal" officeooo:rsid="00655f29" style:font-size-asian="11pt" style:font-size-complex="11pt"/>
    </style:style>
    <style:style style:name="T149" style:family="text">
      <style:text-properties fo:font-variant="normal" fo:text-transform="none" fo:color="#0a0a0a" loext:opacity="100%" style:font-name="Liberation Serif" fo:font-size="11pt" fo:letter-spacing="normal" fo:font-style="normal" fo:font-weight="normal" officeooo:rsid="005e80d7" style:font-size-asian="11pt" style:font-size-complex="11pt"/>
    </style:style>
    <style:style style:name="T150" style:family="text">
      <style:text-properties fo:font-variant="normal" fo:text-transform="none" fo:color="#0a0a0a" loext:opacity="100%" style:font-name="Liberation Serif" fo:font-size="11pt" fo:letter-spacing="normal" fo:font-style="normal" fo:font-weight="normal" officeooo:rsid="003c5f32" style:font-size-asian="11pt" style:font-weight-asian="bold" style:font-size-complex="11pt" style:font-weight-complex="bold"/>
    </style:style>
    <style:style style:name="T151" style:family="text">
      <style:text-properties fo:font-variant="normal" fo:text-transform="none" fo:color="#0a0a0a" loext:opacity="100%" style:font-name="Liberation Serif" fo:font-size="11pt" fo:letter-spacing="normal" fo:font-style="normal" fo:font-weight="normal" officeooo:rsid="003d82b4" style:font-size-asian="11pt" style:font-weight-asian="bold" style:font-size-complex="11pt" style:font-weight-complex="bold"/>
    </style:style>
    <style:style style:name="T152" style:family="text">
      <style:text-properties fo:font-variant="normal" fo:text-transform="none" fo:color="#0a0a0a" loext:opacity="100%" style:font-name="Liberation Serif" fo:font-size="11pt" fo:letter-spacing="normal" fo:font-style="normal" fo:font-weight="normal" officeooo:rsid="003c5f32" style:font-size-asian="11pt" style:font-weight-asian="normal" style:font-size-complex="11pt" style:font-weight-complex="normal"/>
    </style:style>
    <style:style style:name="T153" style:family="text">
      <style:text-properties fo:font-variant="normal" fo:text-transform="none" fo:color="#0a0a0a" loext:opacity="100%" style:font-name="Liberation Serif" fo:font-size="11pt" fo:letter-spacing="normal" fo:font-style="normal" fo:font-weight="normal" officeooo:rsid="00583292" style:font-size-asian="11pt" style:font-weight-asian="normal" style:font-size-complex="11pt" style:font-weight-complex="normal"/>
    </style:style>
    <style:style style:name="T154" style:family="text">
      <style:text-properties fo:font-variant="normal" fo:text-transform="none" fo:color="#0a0a0a" loext:opacity="100%" style:font-name="Liberation Serif" fo:font-size="11pt" fo:letter-spacing="normal" fo:font-style="normal" fo:font-weight="normal" officeooo:rsid="0073fce6" style:font-size-asian="11pt" style:font-weight-asian="normal" style:font-size-complex="11pt" style:font-weight-complex="normal"/>
    </style:style>
    <style:style style:name="T155" style:family="text">
      <style:text-properties fo:font-variant="normal" fo:text-transform="none" fo:color="#0a0a0a" loext:opacity="100%" style:font-name="Liberation Serif" fo:font-size="11pt" fo:letter-spacing="normal" fo:font-style="normal" fo:font-weight="normal" officeooo:rsid="001ce228" style:font-size-asian="11pt" style:font-weight-asian="normal" style:font-size-complex="11pt" style:font-weight-complex="normal"/>
    </style:style>
    <style:style style:name="T156" style:family="text">
      <style:text-properties fo:font-variant="normal" fo:text-transform="none" fo:color="#0a0a0a" loext:opacity="100%" style:font-name="Liberation Serif" fo:font-size="11pt" fo:letter-spacing="normal" fo:font-style="normal" fo:font-weight="normal" officeooo:rsid="0048a673" style:font-size-asian="11pt" style:font-weight-asian="normal" style:font-size-complex="11pt" style:font-weight-complex="normal"/>
    </style:style>
    <style:style style:name="T157" style:family="text">
      <style:text-properties fo:font-variant="normal" fo:text-transform="none" fo:color="#0a0a0a" loext:opacity="100%" style:font-name="Liberation Serif" fo:font-size="11pt" fo:letter-spacing="normal" fo:font-style="normal" fo:font-weight="bold" style:font-size-asian="11pt" style:font-size-complex="11pt"/>
    </style:style>
    <style:style style:name="T158" style:family="text">
      <style:text-properties fo:font-variant="normal" fo:text-transform="none" fo:color="#0a0a0a" loext:opacity="100%" style:font-name="Liberation Serif" fo:font-size="11pt" fo:letter-spacing="normal" fo:font-style="normal" fo:font-weight="bold" officeooo:rsid="00583292" style:font-size-asian="11pt" style:font-size-complex="11pt"/>
    </style:style>
    <style:style style:name="T159" style:family="text">
      <style:text-properties fo:font-variant="normal" fo:text-transform="none" fo:color="#0a0a0a" loext:opacity="100%" style:font-name="Liberation Serif" fo:font-size="11pt" fo:letter-spacing="normal" fo:font-style="normal" fo:font-weight="bold" style:font-size-asian="11pt" style:font-weight-asian="bold" style:font-size-complex="11pt" style:font-weight-complex="bold"/>
    </style:style>
    <style:style style:name="T160" style:family="text">
      <style:text-properties fo:font-variant="normal" fo:text-transform="none" fo:color="#0a0a0a" loext:opacity="100%" style:font-name="Liberation Serif" fo:font-size="11pt" fo:letter-spacing="normal" fo:font-style="normal" fo:font-weight="bold" officeooo:rsid="00583292" style:font-size-asian="11pt" style:font-weight-asian="bold" style:font-size-complex="11pt" style:font-weight-complex="bold"/>
    </style:style>
    <style:style style:name="T161" style:family="text">
      <style:text-properties fo:font-variant="normal" fo:text-transform="none" fo:color="#0a0a0a" loext:opacity="100%" style:font-name="Liberation Serif" fo:font-size="11pt" fo:letter-spacing="normal" fo:font-style="normal" fo:font-weight="bold" officeooo:rsid="0048a673" style:font-size-asian="11pt" style:font-weight-asian="bold" style:font-size-complex="11pt" style:font-weight-complex="bold"/>
    </style:style>
    <style:style style:name="T162" style:family="text">
      <style:text-properties fo:font-variant="normal" fo:text-transform="none" fo:color="#0a0a0a" loext:opacity="100%" style:font-name="Liberation Serif" fo:font-size="11pt" fo:letter-spacing="normal" fo:font-weight="normal" officeooo:rsid="001ce228" style:font-size-asian="11pt" style:font-weight-asian="normal" style:font-size-complex="11pt" style:font-weight-complex="normal"/>
    </style:style>
    <style:style style:name="T163" style:family="text">
      <style:text-properties fo:font-variant="normal" fo:text-transform="none" fo:color="#0a0a0a" loext:opacity="100%" style:font-name="Liberation Serif" fo:font-size="11pt" fo:letter-spacing="normal" fo:font-weight="normal" officeooo:rsid="0073fce6" style:font-size-asian="11pt" style:font-weight-asian="normal" style:font-size-complex="11pt" style:font-weight-complex="normal"/>
    </style:style>
    <style:style style:name="T164" style:family="text">
      <style:text-properties fo:font-variant="normal" fo:text-transform="none" fo:color="#0a0a0a" loext:opacity="100%" fo:font-size="11pt" fo:letter-spacing="normal" fo:font-style="normal" officeooo:rsid="0018d26d" style:font-size-asian="11pt" style:font-weight-asian="bold" style:font-size-complex="11pt" style:font-weight-complex="bold"/>
    </style:style>
    <style:style style:name="T165" style:family="text">
      <style:text-properties fo:font-variant="normal" fo:text-transform="none" fo:color="#0a0a0a" loext:opacity="100%" fo:font-size="11pt" fo:letter-spacing="normal" fo:font-style="normal" officeooo:rsid="005b845b" style:font-size-asian="11pt" style:font-weight-asian="bold" style:font-size-complex="11pt" style:font-weight-complex="bold"/>
    </style:style>
    <style:style style:name="T166" style:family="text">
      <style:text-properties fo:font-variant="normal" fo:text-transform="none" fo:color="#0a0a0a" loext:opacity="100%" fo:font-size="11pt" fo:letter-spacing="normal" fo:font-style="normal" officeooo:rsid="005c49d0" style:font-size-asian="11pt" style:font-weight-asian="bold" style:font-size-complex="11pt" style:font-weight-complex="bold"/>
    </style:style>
    <style:style style:name="T167" style:family="text">
      <style:text-properties fo:font-variant="normal" fo:text-transform="none" fo:color="#0a0a0a" loext:opacity="100%" fo:font-size="11pt" fo:letter-spacing="normal" fo:font-style="normal" officeooo:rsid="005a3260" style:font-size-asian="11pt" style:font-weight-asian="bold" style:font-size-complex="11pt" style:font-weight-complex="bold"/>
    </style:style>
    <style:style style:name="T168" style:family="text">
      <style:text-properties fo:font-variant="normal" fo:text-transform="none" fo:color="#0a0a0a" loext:opacity="100%" fo:font-size="11pt" fo:letter-spacing="normal" fo:font-style="normal" fo:font-weight="normal" style:font-size-asian="11pt" style:font-size-complex="11pt"/>
    </style:style>
    <style:style style:name="T169" style:family="text">
      <style:text-properties fo:font-variant="normal" fo:text-transform="none" fo:color="#0a0a0a" loext:opacity="100%" fo:font-size="11pt" fo:letter-spacing="normal" fo:font-style="normal" fo:font-weight="normal" officeooo:rsid="004dda13" style:font-size-asian="11pt" style:font-size-complex="11pt"/>
    </style:style>
    <style:style style:name="T170" style:family="text">
      <style:text-properties fo:font-variant="normal" fo:text-transform="none" fo:color="#0a0a0a" loext:opacity="100%" fo:font-size="11pt" fo:letter-spacing="normal" fo:font-style="normal" fo:font-weight="normal" officeooo:rsid="0018d26d" style:font-size-asian="11pt" style:font-weight-asian="bold" style:font-size-complex="11pt" style:font-weight-complex="bold"/>
    </style:style>
    <style:style style:name="T171" style:family="text">
      <style:text-properties fo:font-variant="normal" fo:text-transform="none" fo:color="#0a0a0a" loext:opacity="100%" fo:font-size="11pt" fo:letter-spacing="normal" fo:font-style="normal" fo:font-weight="bold" officeooo:rsid="0018d26d" style:font-size-asian="11pt" style:font-size-complex="11pt"/>
    </style:style>
    <style:style style:name="T172" style:family="text">
      <style:text-properties fo:font-variant="normal" fo:text-transform="none" fo:color="#0a0a0a" loext:opacity="100%" fo:font-size="12pt" fo:letter-spacing="normal" fo:font-style="normal" fo:font-weight="normal"/>
    </style:style>
    <style:style style:name="T173" style:family="text">
      <style:text-properties fo:font-variant="normal" fo:text-transform="none" fo:color="#0a0a0a" loext:opacity="100%" fo:letter-spacing="normal"/>
    </style:style>
    <style:style style:name="T174" style:family="text">
      <style:text-properties fo:font-variant="normal" fo:text-transform="none" fo:color="#0a0a0a" loext:opacity="100%" fo:letter-spacing="normal" fo:font-style="normal" fo:font-weight="normal"/>
    </style:style>
    <style:style style:name="T175" style:family="text">
      <style:text-properties fo:font-variant="normal" fo:text-transform="none" fo:color="#0a0a0a" loext:opacity="100%" fo:letter-spacing="normal" fo:font-style="normal" fo:font-weight="normal" officeooo:rsid="0073fce6" style:font-weight-asian="bold" style:font-weight-complex="bold"/>
    </style:style>
    <style:style style:name="T176" style:family="text">
      <style:text-properties fo:font-variant="normal" fo:text-transform="none" fo:color="#0a0a0a" loext:opacity="100%" style:text-outline="false" style:font-name="Liberation Serif" fo:font-size="11pt" fo:letter-spacing="normal" fo:font-style="normal" style:text-underline-style="none" fo:font-weight="normal" style:font-size-asian="11pt" style:font-weight-asian="normal" style:font-size-complex="11pt"/>
    </style:style>
    <style:style style:name="T177" style:family="text">
      <style:text-properties fo:font-variant="normal" fo:text-transform="none" fo:color="#0a0a0a" loext:opacity="100%" style:text-outline="false" style:font-name="Liberation Serif" fo:font-size="11pt" fo:letter-spacing="normal" fo:font-style="normal" style:text-underline-style="none" fo:font-weight="normal" officeooo:rsid="00609905" style:font-size-asian="11pt" style:font-weight-asian="normal" style:font-size-complex="11pt"/>
    </style:style>
    <style:style style:name="T178" style:family="text">
      <style:text-properties fo:font-variant="normal" fo:text-transform="none" fo:color="#0a0a0a" loext:opacity="100%" style:text-outline="false" style:font-name="Liberation Serif" fo:font-size="11pt" fo:letter-spacing="normal" fo:font-style="normal" style:text-underline-style="none" fo:font-weight="normal" officeooo:rsid="00620c54" style:font-size-asian="11pt" style:font-weight-asian="normal" style:font-size-complex="11pt"/>
    </style:style>
    <style:style style:name="T179" style:family="text">
      <style:text-properties fo:font-variant="normal" fo:text-transform="none" fo:color="#0a0a0a" loext:opacity="100%" style:text-outline="false" style:font-name="Liberation Serif" fo:font-size="11pt" fo:letter-spacing="normal" fo:font-style="normal" style:text-underline-style="none" fo:font-weight="normal" officeooo:rsid="0065a5e2" style:font-size-asian="11pt" style:font-weight-asian="normal" style:font-size-complex="11pt"/>
    </style:style>
    <style:style style:name="T180" style:family="text">
      <style:text-properties fo:font-variant="normal" fo:text-transform="none" fo:color="#383838" loext:opacity="100%" style:font-name="Liberation Serif" fo:font-size="11pt" fo:letter-spacing="normal" fo:font-style="normal" fo:font-weight="normal" officeooo:rsid="003d82b4" style:font-size-asian="11pt" style:font-size-complex="11pt"/>
    </style:style>
    <style:style style:name="T181" style:family="text">
      <style:text-properties fo:font-variant="normal" fo:text-transform="none" fo:color="#1f1f1f" loext:opacity="100%" fo:letter-spacing="normal" fo:font-style="normal" fo:font-weight="normal"/>
    </style:style>
    <style:style style:name="T182" style:family="text">
      <style:text-properties fo:font-variant="normal" fo:text-transform="none" fo:color="#1f1f1f" loext:opacity="100%" fo:letter-spacing="normal" fo:font-style="normal" fo:font-weight="normal" loext:padding="0in" loext:border="none"/>
    </style:style>
    <style:style style:name="T183" style:family="text">
      <style:text-properties fo:font-variant="normal" fo:text-transform="none" fo:color="#1f1f1f" loext:opacity="100%" style:font-name="Liberation Serif" fo:font-size="11pt" fo:letter-spacing="normal" fo:font-style="normal" fo:font-weight="normal" style:font-size-asian="11pt" style:font-size-complex="11pt"/>
    </style:style>
    <style:style style:name="T184" style:family="text">
      <style:text-properties fo:font-variant="normal" fo:text-transform="none" fo:color="#202122"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185" style:family="text">
      <style:text-properties fo:font-variant="normal" fo:text-transform="none" fo:color="#202122" loext:opacity="100%" style:font-name="Liberation Serif" fo:font-size="11pt" fo:letter-spacing="normal" fo:font-style="normal" fo:font-weight="normal" style:font-size-asian="11pt" style:font-size-complex="11pt"/>
    </style:style>
    <style:style style:name="T186" style:family="text">
      <style:text-properties fo:font-variant="normal" fo:text-transform="none" fo:color="#202122" loext:opacity="100%" style:font-name="Liberation Serif" fo:font-size="11pt" fo:letter-spacing="normal" fo:font-style="normal" fo:font-weight="normal" officeooo:rsid="00537a83" style:font-size-asian="11pt" style:font-size-complex="11pt"/>
    </style:style>
    <style:style style:name="T187" style:family="text">
      <style:text-properties fo:font-variant="normal" fo:text-transform="none" fo:color="#202122" loext:opacity="100%" style:font-name="Liberation Serif" fo:font-size="11pt" fo:letter-spacing="normal" fo:font-style="normal" fo:font-weight="normal" officeooo:rsid="0053a92e" style:font-size-asian="11pt" style:font-size-complex="11pt"/>
    </style:style>
    <style:style style:name="T188" style:family="text">
      <style:text-properties fo:font-variant="normal" fo:text-transform="none" style:use-window-font-color="true" loext:opacity="0%" fo:letter-spacing="normal" fo:font-style="normal" fo:font-weight="bold" officeooo:rsid="002fbfed" style:font-weight-asian="bold" style:font-weight-complex="bold"/>
    </style:style>
    <style:style style:name="T189" style:family="text">
      <style:text-properties fo:font-variant="normal" fo:text-transform="none" style:use-window-font-color="true" loext:opacity="0%" fo:letter-spacing="normal" fo:font-style="normal" fo:font-weight="bold" officeooo:rsid="008316ad" style:font-weight-asian="bold" style:font-weight-complex="bold"/>
    </style:style>
    <style:style style:name="T190" style:family="text">
      <style:text-properties fo:font-variant="normal" fo:text-transform="none" style:use-window-font-color="true" loext:opacity="0%" fo:letter-spacing="normal" fo:font-style="normal" fo:font-weight="normal" officeooo:rsid="008316ad" style:font-weight-asian="normal" style:font-weight-complex="bold"/>
    </style:style>
    <style:style style:name="T191" style:family="text">
      <style:text-properties fo:font-variant="normal" fo:text-transform="none" style:use-window-font-color="true" loext:opacity="0%" fo:letter-spacing="normal" fo:font-style="normal" fo:font-weight="normal" officeooo:rsid="00320ced"/>
    </style:style>
    <style:style style:name="T192" style:family="text">
      <style:text-properties fo:font-variant="normal" fo:text-transform="none" style:use-window-font-color="true" loext:opacity="0%" style:font-name="Liberation Serif" fo:font-size="11pt" fo:letter-spacing="normal" fo:font-style="normal" fo:font-weight="bold" officeooo:rsid="006d5853" style:font-size-asian="11pt" style:font-weight-asian="bold" style:font-size-complex="11pt"/>
    </style:style>
    <style:style style:name="T193" style:family="text">
      <style:text-properties fo:font-variant="normal" fo:text-transform="none" style:use-window-font-color="true" loext:opacity="0%" style:font-name="Liberation Serif" fo:font-size="11pt" fo:letter-spacing="normal" fo:font-style="normal" fo:font-weight="normal" officeooo:rsid="006d5853" style:font-size-asian="11pt" style:font-weight-asian="normal" style:font-size-complex="11pt"/>
    </style:style>
    <style:style style:name="T194" style:family="text">
      <style:text-properties style:font-name="Liberation Serif"/>
    </style:style>
    <style:style style:name="T195" style:family="text">
      <style:text-properties style:font-name="Liberation Serif" fo:font-size="11pt" fo:letter-spacing="normal" style:font-size-asian="11pt" style:font-size-complex="11pt"/>
    </style:style>
    <style:style style:name="T196" style:family="text">
      <style:text-properties style:font-name="Liberation Serif" fo:font-size="11pt" fo:font-weight="normal" style:font-size-asian="11pt" style:font-weight-asian="normal" style:font-size-complex="11pt" style:font-weight-complex="normal"/>
    </style:style>
    <style:style style:name="T197" style:family="text">
      <style:text-properties style:font-name="Liberation Serif" fo:font-size="11pt" fo:font-weight="normal" officeooo:rsid="00297128" style:font-size-asian="11pt" style:font-weight-asian="normal" style:font-size-complex="11pt" style:font-weight-complex="normal"/>
    </style:style>
    <style:style style:name="T198" style:family="text">
      <style:text-properties style:font-name="Liberation Serif" fo:font-size="11pt" fo:font-weight="normal" officeooo:rsid="003c5f32" style:font-size-asian="11pt" style:font-weight-asian="normal" style:font-size-complex="11pt" style:font-weight-complex="normal"/>
    </style:style>
    <style:style style:name="T199" style:family="text">
      <style:text-properties style:font-name="Liberation Serif" fo:font-size="11pt" fo:font-weight="normal" officeooo:rsid="001ce228" style:font-size-asian="11pt" style:font-weight-asian="normal" style:font-size-complex="11pt" style:font-weight-complex="normal"/>
    </style:style>
    <style:style style:name="T200" style:family="text">
      <style:text-properties style:font-name="Liberation Serif" fo:font-size="11pt" fo:font-weight="normal" officeooo:rsid="0073fce6" style:font-size-asian="11pt" style:font-weight-asian="normal" style:font-size-complex="11pt" style:font-weight-complex="normal"/>
    </style:style>
    <style:style style:name="T201" style:family="text">
      <style:text-properties style:font-name="Liberation Serif" fo:font-size="11pt" style:font-size-asian="11pt" style:font-size-complex="11pt"/>
    </style:style>
    <style:style style:name="T202" style:family="text">
      <style:text-properties style:font-name="Liberation Serif" fo:font-size="11pt" officeooo:rsid="0038c341" style:font-size-asian="11pt" style:font-size-complex="11pt"/>
    </style:style>
    <style:style style:name="T203" style:family="text">
      <style:text-properties style:font-name="Liberation Serif" fo:font-size="11pt" officeooo:rsid="0038f357" style:font-size-asian="11pt" style:font-size-complex="11pt"/>
    </style:style>
    <style:style style:name="T204" style:family="text">
      <style:text-properties style:font-name="Liberation Serif" fo:font-size="11pt" officeooo:rsid="0027fa9d" style:font-size-asian="11pt" style:font-size-complex="11pt"/>
    </style:style>
    <style:style style:name="T205" style:family="text">
      <style:text-properties style:font-name="Liberation Serif" fo:font-size="11pt" officeooo:rsid="00379202" style:font-size-asian="11pt" style:font-size-complex="11pt"/>
    </style:style>
    <style:style style:name="T206" style:family="text">
      <style:text-properties style:font-name="Liberation Serif" fo:font-size="11pt" officeooo:rsid="00537a83" style:font-size-asian="11pt" style:font-size-complex="11pt"/>
    </style:style>
    <style:style style:name="T207" style:family="text">
      <style:text-properties style:font-name="Liberation Serif" fo:font-size="11pt" style:font-size-asian="11pt" style:font-weight-asian="bold" style:font-size-complex="11pt" style:font-weight-complex="bold"/>
    </style:style>
    <style:style style:name="T208" style:family="text">
      <style:text-properties style:font-name="Liberation Serif" fo:font-size="11pt" fo:font-style="italic" style:font-size-asian="11pt" style:font-style-asian="italic" style:font-name-complex="Liberation Serif" style:font-size-complex="11pt" style:font-style-complex="italic"/>
    </style:style>
    <style:style style:name="T209" style:family="text">
      <style:text-properties style:font-name="Liberation Serif" fo:font-size="11pt" fo:font-style="italic" officeooo:rsid="0065a5e2" style:font-size-asian="11pt" style:font-style-asian="italic" style:font-name-complex="Liberation Serif" style:font-size-complex="11pt" style:font-style-complex="italic"/>
    </style:style>
    <style:style style:name="T210" style:family="text">
      <style:text-properties style:font-name="Liberation Serif" fo:font-size="11pt" fo:font-style="italic" officeooo:rsid="0079f99f" style:font-size-asian="11pt" style:font-style-asian="italic" style:font-name-complex="Liberation Serif" style:font-size-complex="11pt" style:font-style-complex="italic"/>
    </style:style>
    <style:style style:name="T211" style:family="text">
      <style:text-properties style:font-name="Liberation Serif" fo:font-size="11pt" fo:font-style="italic" officeooo:rsid="00773aca" style:font-size-asian="11pt" style:font-style-asian="italic" style:font-name-complex="Liberation Serif" style:font-size-complex="11pt" style:font-style-complex="italic"/>
    </style:style>
    <style:style style:name="T212" style:family="text">
      <style:text-properties style:font-name="Liberation Serif" fo:font-size="11pt" fo:font-style="italic" officeooo:rsid="007cfb38" style:font-size-asian="11pt" style:font-style-asian="italic" style:font-name-complex="Liberation Serif" style:font-size-complex="11pt" style:font-style-complex="italic"/>
    </style:style>
    <style:style style:name="T213" style:family="text">
      <style:text-properties style:font-name="Liberation Serif" fo:font-size="11pt" fo:font-style="italic" fo:font-weight="bold" officeooo:rsid="00773aca" style:font-size-asian="11pt" style:font-style-asian="italic" style:font-weight-asian="bold" style:font-name-complex="Liberation Serif" style:font-size-complex="11pt" style:font-style-complex="italic" style:font-weight-complex="bold"/>
    </style:style>
    <style:style style:name="T214" style:family="text">
      <style:text-properties style:font-name="Liberation Serif" fo:font-size="11pt" fo:font-style="italic" fo:font-weight="bold" style:font-size-asian="11pt" style:font-style-asian="italic" style:font-size-complex="11pt" style:font-style-complex="italic"/>
    </style:style>
    <style:style style:name="T215" style:family="text">
      <style:text-properties style:font-name="Liberation Serif" fo:font-size="11pt" fo:font-weight="bold" style:font-size-asian="11pt" style:font-weight-asian="bold" style:font-size-complex="11pt" style:font-weight-complex="bold"/>
    </style:style>
    <style:style style:name="T216" style:family="text">
      <style:text-properties style:font-name="Liberation Serif" fo:font-size="11pt" fo:font-weight="bold" style:font-size-asian="11pt" style:font-size-complex="11pt"/>
    </style:style>
    <style:style style:name="T217" style:family="text">
      <style:text-properties style:font-name="Liberation Serif" fo:font-size="11pt" fo:font-weight="bold" officeooo:rsid="00a92c6d" style:font-size-asian="11pt" style:font-size-complex="11pt"/>
    </style:style>
    <style:style style:name="T218" style:family="text">
      <style:text-properties style:font-name="Liberation Serif" officeooo:rsid="0027fa9d"/>
    </style:style>
    <style:style style:name="T219" style:family="text">
      <style:text-properties style:font-name="Liberation Serif" fo:font-size="12pt" fo:font-weight="bold" officeooo:rsid="0018d26d" style:font-size-asian="12pt" style:font-weight-asian="bold" style:font-size-complex="12pt" style:font-weight-complex="bold"/>
    </style:style>
    <style:style style:name="T220" style:family="text">
      <style:text-properties style:font-name="Liberation Serif" fo:font-style="italic" style:font-style-asian="italic" style:font-style-complex="italic"/>
    </style:style>
    <style:style style:name="T221" style:family="text">
      <style:text-properties style:font-name="Liberation Serif" fo:font-style="italic" officeooo:rsid="0079f99f" style:font-style-asian="italic" style:font-style-complex="italic"/>
    </style:style>
    <style:style style:name="T222" style:family="text">
      <style:text-properties style:font-name="Liberation Serif" fo:font-style="italic" officeooo:rsid="00773aca" style:font-style-asian="italic" style:font-style-complex="italic"/>
    </style:style>
    <style:style style:name="T223" style:family="text">
      <style:text-properties style:font-name="Liberation Serif" style:font-size-asian="11pt"/>
    </style:style>
    <style:style style:name="T224" style:family="text">
      <style:text-properties style:font-name="Liberation Serif" fo:font-weight="bold"/>
    </style:style>
    <style:style style:name="T225" style:family="text">
      <style:text-properties style:font-name="Liberation Serif" fo:font-weight="bold" style:font-weight-asian="bold" style:font-weight-complex="bold"/>
    </style:style>
    <style:style style:name="T226" style:family="text">
      <style:text-properties style:font-name="Liberation Serif" fo:font-weight="bold" officeooo:rsid="00c76294" style:font-weight-asian="bold" style:font-weight-complex="bold"/>
    </style:style>
    <style:style style:name="T227" style:family="text">
      <style:text-properties officeooo:rsid="001762e7"/>
    </style:style>
    <style:style style:name="T228" style:family="text">
      <style:text-properties fo:color="#000000" loext:opacity="100%"/>
    </style:style>
    <style:style style:name="T229" style:family="text">
      <style:text-properties fo:color="#000000" loext:opacity="100%" style:text-outline="false" fo:font-size="11pt" fo:font-style="normal" style:text-underline-style="none" fo:font-weight="normal" officeooo:rsid="0018d26d" style:font-size-asian="11pt" style:font-style-asian="normal" style:font-weight-asian="normal" style:font-size-complex="11pt" style:font-weight-complex="normal"/>
    </style:style>
    <style:style style:name="T230" style:family="text">
      <style:text-properties fo:color="#000000" loext:opacity="100%" style:text-outline="false" fo:font-size="11pt" fo:font-style="normal" style:text-underline-style="none" style:font-size-asian="11pt" style:font-style-asian="normal" style:font-size-complex="11pt"/>
    </style:style>
    <style:style style:name="T231" style:family="text">
      <style:text-properties fo:color="#000000" loext:opacity="100%" style:text-outline="false" fo:font-size="11pt" fo:font-style="normal" style:text-underline-style="none" officeooo:rsid="00192843" style:font-size-asian="11pt" style:font-style-asian="normal" style:font-size-complex="11pt"/>
    </style:style>
    <style:style style:name="T232" style:family="text">
      <style:text-properties fo:color="#000000" loext:opacity="100%" style:text-outline="false" fo:font-size="11pt" fo:font-style="normal" style:text-underline-style="none" officeooo:rsid="0018d26d" style:font-size-asian="11pt" style:font-style-asian="normal" style:font-size-complex="11pt"/>
    </style:style>
    <style:style style:name="T233" style:family="text">
      <style:text-properties fo:color="#000000" loext:opacity="100%" style:font-name="Menlo-Regular" fo:font-size="18pt" style:font-size-asian="18pt"/>
    </style:style>
    <style:style style:name="T234" style:family="text">
      <style:text-properties fo:color="#000000" loext:opacity="100%" style:font-name="Menlo-Regular" fo:font-size="18pt" style:font-size-asian="18pt"/>
    </style:style>
    <style:style style:name="T235" style:family="text">
      <style:text-properties fo:color="#000000" loext:opacity="100%" style:font-name="Menlo-Regular" fo:font-size="18pt" fo:font-weight="normal" style:font-size-asian="18pt" style:font-weight-asian="normal"/>
    </style:style>
    <style:style style:name="T236" style:family="text">
      <style:text-properties fo:color="#000000" loext:opacity="100%" fo:font-weight="bold" style:font-weight-asian="bold" style:font-weight-complex="bold"/>
    </style:style>
    <style:style style:name="T237" style:family="text">
      <style:text-properties fo:color="#000000" loext:opacity="100%" fo:font-weight="bold" officeooo:rsid="0088c215" style:font-weight-asian="bold" style:font-weight-complex="bold"/>
    </style:style>
    <style:style style:name="T238" style:family="text">
      <style:text-properties fo:color="#000000" loext:opacity="100%" fo:font-weight="bold" style:font-weight-asian="bold" style:font-size-complex="11pt" style:font-weight-complex="bold"/>
    </style:style>
    <style:style style:name="T239" style:family="text">
      <style:text-properties fo:color="#000000" loext:opacity="100%" style:font-size-complex="11pt"/>
    </style:style>
    <style:style style:name="T240" style:family="text">
      <style:text-properties fo:color="#000000" loext:opacity="100%" style:font-name="Liberation Serif" fo:font-size="11pt" style:font-size-asian="11pt" style:font-size-complex="11pt"/>
    </style:style>
    <style:style style:name="T241" style:family="text">
      <style:text-properties fo:color="#000000" loext:opacity="100%" style:font-name="Liberation Serif" fo:font-size="11pt" fo:font-style="italic" style:font-size-asian="11pt" style:font-style-asian="italic" style:font-size-complex="11pt" style:font-style-complex="italic"/>
    </style:style>
    <style:style style:name="T242" style:family="text">
      <style:text-properties fo:color="#000000" loext:opacity="100%" style:font-name="Liberation Serif" fo:font-size="11pt" fo:font-weight="bold" style:font-size-asian="11pt" style:font-weight-asian="bold" style:font-size-complex="11pt" style:font-weight-complex="bold"/>
    </style:style>
    <style:style style:name="T243" style:family="text">
      <style:text-properties fo:color="#000000" loext:opacity="100%" officeooo:rsid="001762e7"/>
    </style:style>
    <style:style style:name="T244" style:family="text">
      <style:text-properties fo:color="#000000" loext:opacity="100%" officeooo:rsid="00583292"/>
    </style:style>
    <style:style style:name="T245" style:family="text">
      <style:text-properties fo:color="#000000" loext:opacity="100%" officeooo:rsid="0088c215"/>
    </style:style>
    <style:style style:name="T246" style:family="text">
      <style:text-properties fo:color="#000000" loext:opacity="100%" officeooo:rsid="00893a55"/>
    </style:style>
    <style:style style:name="T247" style:family="text">
      <style:text-properties fo:color="#000000" loext:opacity="100%" style:font-name="HelveticaNeue1" fo:font-size="11pt" style:font-size-asian="11pt"/>
    </style:style>
    <style:style style:name="T248" style:family="text">
      <style:text-properties fo:color="#000000" loext:opacity="100%" style:font-name="HelveticaNeue" fo:font-size="11pt" style:font-size-asian="11pt"/>
    </style:style>
    <style:style style:name="T249" style:family="text">
      <style:text-properties fo:color="#000000" loext:opacity="100%" fo:font-size="11pt" style:font-size-asian="11pt"/>
    </style:style>
    <style:style style:name="T250" style:family="text">
      <style:text-properties fo:color="#000000" loext:opacity="100%" style:font-name="Menlo-Regular1" fo:font-size="18pt" style:font-size-asian="18pt" style:font-size-complex="11pt"/>
    </style:style>
    <style:style style:name="T251" style:family="text">
      <style:text-properties fo:color="#000000" loext:opacity="100%" officeooo:rsid="00bc285a"/>
    </style:style>
    <style:style style:name="T252" style:family="text">
      <style:text-properties fo:color="#000000" loext:opacity="100%"/>
    </style:style>
    <style:style style:name="T253" style:family="text">
      <style:text-properties fo:color="#000000" loext:opacity="100%" fo:font-weight="normal" style:font-weight-asian="normal"/>
    </style:style>
    <style:style style:name="T254" style:family="text">
      <style:text-properties fo:color="#000000" loext:opacity="100%" style:text-line-through-style="none" style:text-line-through-type="none" style:font-name="Liberation Serif" fo:font-size="11pt" style:text-underline-style="none" fo:font-weight="bold" style:text-blinking="false" style:font-size-asian="11pt" style:font-size-complex="11pt" loext:padding="0in" loext:border="none"/>
    </style:style>
    <style:style style:name="T255" style:family="text">
      <style:text-properties fo:color="#000000" loext:opacity="100%" style:font-name="Liberation Serif" fo:font-size="11pt" fo:font-weight="normal" officeooo:rsid="00d4703e" style:font-size-asian="11pt" style:font-weight-asian="normal" style:font-size-complex="11pt" style:font-weight-complex="normal"/>
    </style:style>
    <style:style style:name="T256" style:family="text">
      <style:text-properties fo:color="#000000" loext:opacity="100%" style:font-name="American Typewriter" fo:font-size="10pt" style:font-size-asian="10pt" style:font-size-complex="10pt"/>
    </style:style>
    <style:style style:name="T257" style:family="text">
      <style:text-properties fo:color="#000000" loext:opacity="100%" style:font-name="American Typewriter"/>
    </style:style>
    <style:style style:name="T258" style:family="text">
      <style:text-properties officeooo:rsid="001ce228"/>
    </style:style>
    <style:style style:name="T259" style:family="text">
      <style:text-properties fo:font-style="normal" fo:font-weight="normal"/>
    </style:style>
    <style:style style:name="T260" style:family="text">
      <style:text-properties officeooo:rsid="001fd7e2"/>
    </style:style>
    <style:style style:name="T261" style:family="text">
      <style:text-properties fo:font-size="11pt" fo:font-weight="bold" officeooo:rsid="001ce228" style:font-size-asian="11pt" style:font-weight-asian="bold" style:font-size-complex="11pt" style:font-weight-complex="bold"/>
    </style:style>
    <style:style style:name="T262" style:family="text">
      <style:text-properties fo:font-size="11pt" style:font-size-asian="11pt" style:font-size-complex="11pt"/>
    </style:style>
    <style:style style:name="T263" style:family="text">
      <style:text-properties fo:font-size="11pt" officeooo:rsid="003f8272" style:font-size-asian="11pt" style:font-size-complex="11pt"/>
    </style:style>
    <style:style style:name="T264" style:family="text">
      <style:text-properties fo:font-size="11pt" officeooo:rsid="000fcead" style:font-size-asian="11pt" style:font-size-complex="11pt"/>
    </style:style>
    <style:style style:name="T265" style:family="text">
      <style:text-properties fo:font-size="11pt" officeooo:rsid="0011c311" style:font-size-asian="11pt" style:font-size-complex="11pt"/>
    </style:style>
    <style:style style:name="T266" style:family="text">
      <style:text-properties fo:font-size="11pt" officeooo:rsid="004dda13" style:font-size-asian="11pt" style:font-size-complex="11pt"/>
    </style:style>
    <style:style style:name="T267" style:family="text">
      <style:text-properties officeooo:rsid="002b4a64"/>
    </style:style>
    <style:style style:name="T268" style:family="text">
      <style:text-properties officeooo:rsid="00362050"/>
    </style:style>
    <style:style style:name="T269" style:family="text">
      <style:text-properties officeooo:rsid="00398f1a"/>
    </style:style>
    <style:style style:name="T270" style:family="text">
      <style:text-properties officeooo:rsid="003f8272"/>
    </style:style>
    <style:style style:name="T271" style:family="text">
      <style:text-properties officeooo:rsid="004159f6"/>
    </style:style>
    <style:style style:name="T272" style:family="text">
      <style:text-properties officeooo:rsid="004dda13"/>
    </style:style>
    <style:style style:name="T273" style:family="text">
      <style:text-properties officeooo:rsid="004e554f"/>
    </style:style>
    <style:style style:name="T274" style:family="text">
      <style:text-properties officeooo:rsid="0051b5cb"/>
    </style:style>
    <style:style style:name="T275" style:family="text">
      <style:text-properties officeooo:rsid="00537a83"/>
    </style:style>
    <style:style style:name="T276" style:family="text">
      <style:text-properties style:font-size-asian="11pt" style:font-size-complex="11pt"/>
    </style:style>
    <style:style style:name="T277" style:family="text">
      <style:text-properties officeooo:rsid="0053a92e" style:font-size-asian="11pt" style:font-size-complex="11pt"/>
    </style:style>
    <style:style style:name="T278" style:family="text">
      <style:text-properties officeooo:rsid="0053bd23"/>
    </style:style>
    <style:style style:name="T279" style:family="text">
      <style:text-properties officeooo:rsid="00583292"/>
    </style:style>
    <style:style style:name="T280" style:family="text">
      <style:text-properties officeooo:rsid="005c49d0"/>
    </style:style>
    <style:style style:name="T281" style:family="text">
      <style:text-properties officeooo:rsid="005db5a3"/>
    </style:style>
    <style:style style:name="T282" style:family="text">
      <style:text-properties officeooo:rsid="00655f29"/>
    </style:style>
    <style:style style:name="T283" style:family="text">
      <style:text-properties fo:font-style="italic"/>
    </style:style>
    <style:style style:name="T284" style:family="text">
      <style:text-properties fo:font-style="italic" style:font-style-asian="italic" style:font-style-complex="italic"/>
    </style:style>
    <style:style style:name="T285" style:family="text">
      <style:text-properties officeooo:rsid="006d5853"/>
    </style:style>
    <style:style style:name="T286" style:family="text">
      <style:text-properties fo:font-size="12pt" fo:font-weight="bold" officeooo:rsid="0018d26d" style:font-size-asian="12pt" style:font-weight-asian="bold" style:font-size-complex="12pt" style:font-weight-complex="bold"/>
    </style:style>
    <style:style style:name="T287" style:family="text">
      <style:text-properties fo:font-size="12pt" fo:font-weight="bold" officeooo:rsid="001ce228" style:font-size-asian="12pt" style:font-weight-asian="bold" style:font-size-complex="12pt" style:font-weight-complex="bold"/>
    </style:style>
    <style:style style:name="T288" style:family="text">
      <style:text-properties fo:font-size="12pt" fo:font-weight="bold" officeooo:rsid="00583292" style:font-size-asian="12pt" style:font-weight-asian="bold" style:font-size-complex="12pt" style:font-weight-complex="bold"/>
    </style:style>
    <style:style style:name="T289" style:family="text">
      <style:text-properties fo:font-size="12pt" fo:font-weight="bold" officeooo:rsid="005c49d0" style:font-size-asian="12pt" style:font-weight-asian="bold" style:font-size-complex="12pt" style:font-weight-complex="bold"/>
    </style:style>
    <style:style style:name="T290" style:family="text">
      <style:text-properties fo:font-size="12pt" style:font-size-asian="12pt" style:font-size-complex="12pt"/>
    </style:style>
    <style:style style:name="T291" style:family="text">
      <style:text-properties officeooo:rsid="0077cfa7"/>
    </style:style>
    <style:style style:name="T292" style:family="text">
      <style:text-properties fo:color="#fc2190" loext:opacity="100%" style:text-outline="false" fo:font-size="11pt" fo:font-style="italic" style:text-underline-style="none" officeooo:rsid="007cfb38" style:font-size-asian="11pt" style:font-style-asian="italic" style:font-name-complex="Liberation Serif" style:font-size-complex="11pt" style:font-style-complex="italic"/>
    </style:style>
    <style:style style:name="T293" style:family="text">
      <style:text-properties fo:color="#fc2190" loext:opacity="100%" style:text-outline="false" style:font-name="Liberation Serif" fo:font-size="11pt" fo:font-style="italic" style:text-underline-style="none" officeooo:rsid="007cfb38" style:font-size-asian="11pt" style:font-style-asian="italic" style:font-name-complex="Liberation Serif" style:font-size-complex="11pt" style:font-style-complex="italic"/>
    </style:style>
    <style:style style:name="T294" style:family="text">
      <style:text-properties style:font-name="Carlito" fo:font-size="12pt" fo:font-weight="bold" style:font-size-asian="12pt" style:font-weight-asian="bold" style:font-size-complex="12pt" style:font-weight-complex="bold"/>
    </style:style>
    <style:style style:name="T295" style:family="text">
      <style:text-properties style:font-name="Carlito" fo:font-size="12pt" fo:font-weight="bold" officeooo:rsid="001ce228" style:font-size-asian="12pt" style:font-weight-asian="bold" style:font-size-complex="12pt" style:font-weight-complex="bold"/>
    </style:style>
    <style:style style:name="T296" style:family="text">
      <style:text-properties style:font-name="Carlito" fo:font-size="12pt" fo:font-weight="bold" officeooo:rsid="002fbfed" style:font-size-asian="12pt" style:font-weight-asian="bold" style:font-size-complex="12pt" style:font-weight-complex="bold"/>
    </style:style>
    <style:style style:name="T297" style:family="text">
      <style:text-properties style:font-name="Carlito" fo:font-size="12pt" fo:font-weight="bold" officeooo:rsid="003f7623" style:font-size-asian="12pt" style:font-weight-asian="bold" style:font-size-complex="12pt" style:font-weight-complex="bold"/>
    </style:style>
    <style:style style:name="T298" style:family="text">
      <style:text-properties style:font-name="Carlito" fo:font-size="12pt" fo:font-weight="bold" officeooo:rsid="005db5a3" style:font-size-asian="12pt" style:font-weight-asian="bold" style:font-size-complex="12pt" style:font-weight-complex="bold"/>
    </style:style>
    <style:style style:name="T299" style:family="text">
      <style:text-properties style:font-name="Carlito" fo:font-size="12pt" fo:font-weight="bold" officeooo:rsid="001762e7" style:font-size-asian="12pt" style:font-weight-asian="bold" style:font-size-complex="12pt" style:font-weight-complex="bold"/>
    </style:style>
    <style:style style:name="T300" style:family="text">
      <style:text-properties style:font-name="Carlito" fo:font-size="12pt" fo:font-weight="bold" officeooo:rsid="00583292" style:font-size-asian="12pt" style:font-weight-asian="bold" style:font-size-complex="12pt" style:font-weight-complex="bold"/>
    </style:style>
    <style:style style:name="T301" style:family="text">
      <style:text-properties style:font-name="Carlito" fo:font-size="12pt" fo:font-weight="bold" officeooo:rsid="0088c215" style:font-size-asian="12pt" style:font-weight-asian="bold" style:font-size-complex="12pt" style:font-weight-complex="bold"/>
    </style:style>
    <style:style style:name="T302" style:family="text">
      <style:text-properties style:font-name="Carlito" fo:font-size="12pt" fo:font-weight="bold" officeooo:rsid="00bc285a" style:font-size-asian="12pt" style:font-weight-asian="bold" style:font-size-complex="12pt" style:font-weight-complex="bold"/>
    </style:style>
    <style:style style:name="T303" style:family="text">
      <style:text-properties officeooo:rsid="002fbfed"/>
    </style:style>
    <style:style style:name="T304" style:family="text">
      <style:text-properties style:use-window-font-color="true" loext:opacity="0%" style:font-name="AppleSystemUIFont" fo:font-size="13pt" fo:font-weight="normal" style:font-size-asian="13pt" style:font-weight-asian="normal"/>
    </style:style>
    <style:style style:name="T305" style:family="text">
      <style:text-properties style:use-window-font-color="true" loext:opacity="0%" style:font-name="AppleSystemUIFont" fo:font-size="13pt" fo:font-style="normal" fo:font-weight="normal" style:font-size-asian="13pt" style:font-style-asian="normal" style:font-weight-asian="normal"/>
    </style:style>
    <style:style style:name="T306" style:family="text">
      <style:text-properties style:use-window-font-color="true" loext:opacity="0%" fo:font-weight="normal" style:font-weight-asian="normal"/>
    </style:style>
    <style:style style:name="T307" style:family="text">
      <style:text-properties style:use-window-font-color="true" loext:opacity="0%" fo:font-weight="bold" style:font-weight-asian="bold"/>
    </style:style>
    <style:style style:name="T308" style:family="text">
      <style:text-properties style:use-window-font-color="true" loext:opacity="0%" style:font-name="Liberation Serif" fo:font-size="11pt" fo:font-style="normal" fo:font-weight="bold" style:font-size-asian="11pt" style:font-style-asian="normal" style:font-weight-asian="bold" style:font-size-complex="11pt"/>
    </style:style>
    <style:style style:name="T309" style:family="text">
      <style:text-properties style:use-window-font-color="true" loext:opacity="0%" style:font-name="Liberation Serif" fo:font-size="11pt" fo:font-style="normal" fo:font-weight="normal" style:font-size-asian="11pt" style:font-style-asian="normal" style:font-weight-asian="normal" style:font-size-complex="11pt"/>
    </style:style>
    <style:style style:name="T310" style:family="text">
      <style:text-properties style:use-window-font-color="true" loext:opacity="0%" fo:font-style="italic" fo:font-weight="normal" style:font-style-asian="italic" style:font-weight-asian="normal"/>
    </style:style>
    <style:style style:name="T311" style:family="text">
      <style:text-properties style:use-window-font-color="true" loext:opacity="0%" fo:font-style="normal" fo:font-weight="normal" style:font-style-asian="normal" style:font-weight-asian="normal"/>
    </style:style>
    <style:style style:name="T312" style:family="text">
      <style:text-properties style:use-window-font-color="true" loext:opacity="0%" fo:font-style="normal" fo:font-weight="bold" style:font-style-asian="normal" style:font-weight-asian="bold"/>
    </style:style>
    <style:style style:name="T313" style:family="text">
      <style:text-properties officeooo:rsid="00838d7c"/>
    </style:style>
    <style:style style:name="T314" style:family="text">
      <style:text-properties officeooo:rsid="0088c215"/>
    </style:style>
    <style:style style:name="T315" style:family="text">
      <style:text-properties officeooo:rsid="008d277c"/>
    </style:style>
    <style:style style:name="T316" style:family="text">
      <style:text-properties officeooo:rsid="008f2335"/>
    </style:style>
    <style:style style:name="T317" style:family="text">
      <style:text-properties officeooo:rsid="00994384"/>
    </style:style>
    <style:style style:name="T318" style:family="text">
      <style:text-properties officeooo:rsid="009a4eaa"/>
    </style:style>
    <style:style style:name="T319" style:family="text">
      <style:text-properties officeooo:rsid="009fb7b0"/>
    </style:style>
    <style:style style:name="T320" style:family="text">
      <style:text-properties style:text-line-through-style="none" style:text-line-through-type="none" style:font-name="Liberation Serif" fo:font-size="11pt" style:text-underline-style="none" fo:font-weight="bold" style:text-blinking="false" style:font-size-asian="11pt" style:font-size-complex="11pt" loext:padding="0in" loext:border="none"/>
    </style:style>
    <style:style style:name="T321" style:family="text">
      <style:text-properties style:text-line-through-style="none" style:text-line-through-type="none" style:font-name="Liberation Serif" fo:font-size="11pt" style:text-underline-style="none" fo:font-weight="normal" style:text-blinking="false" style:font-size-asian="11pt" style:font-size-complex="11pt"/>
    </style:style>
    <style:style style:name="T322" style:family="text">
      <style:text-properties style:text-line-through-style="none" style:text-line-through-type="none" style:text-underline-style="none" officeooo:rsid="00c7c77f" style:text-blinking="false" loext:padding="0in" loext:border="none"/>
    </style:style>
    <style:style style:name="T323" style:family="text">
      <style:text-properties style:text-line-through-style="none" style:text-line-through-type="none" style:text-underline-style="none" officeooo:rsid="00caa406" style:text-blinking="false" loext:padding="0in" loext:border="none"/>
    </style:style>
    <style:style style:name="T324" style:family="text">
      <style:text-properties style:text-line-through-style="none" style:text-line-through-type="none" style:text-underline-style="none" officeooo:rsid="00c7c77f" style:text-blinking="false" style:font-weight-asian="bold" style:font-weight-complex="bold" loext:padding="0in" loext:border="none"/>
    </style:style>
    <style:style style:name="T325" style:family="text">
      <style:text-properties style:text-line-through-style="none" style:text-line-through-type="none" fo:font-size="11pt" style:text-underline-style="none" officeooo:rsid="00c7c77f" style:text-blinking="false" loext:padding="0in" loext:border="none"/>
    </style:style>
    <style:style style:name="T326" style:family="text">
      <style:text-properties officeooo:rsid="00c76294"/>
    </style:style>
    <style:style style:name="T327" style:family="text">
      <style:text-properties officeooo:rsid="00cce4a1"/>
    </style:style>
    <style:style style:name="T328" style:family="text">
      <style:text-properties officeooo:rsid="00a343a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7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9" text:anchor-type="page" text:anchor-page-number="1" svg:x="0in" svg:y="0in" svg:width="0.1874in" svg:height="0.25in" draw:z-index="8">
        <draw:image xlink:href="Pictures/1000000100000001000000010F602221.gif" xlink:type="simple" xlink:show="embed" xlink:actuate="onLoad" draw:mime-type="image/gif"/>
      </draw:frame>
      <draw:frame draw:style-name="fr4" draw:name="Image10" text:anchor-type="page" text:anchor-page-number="1" svg:x="0in" svg:y="0in" svg:width="0.6252in" svg:height="0.25in" draw:z-index="9">
        <draw:image xlink:href="Pictures/1000000100000001000000010F602221.gif" xlink:type="simple" xlink:show="embed" xlink:actuate="onLoad" draw:mime-type="image/gif"/>
      </draw:frame>
      <draw:frame draw:style-name="fr4" draw:name="Image11" text:anchor-type="page" text:anchor-page-number="1" svg:x="0in" svg:y="0in" svg:width="0.1874in" svg:height="0.25in" draw:z-index="10">
        <draw:image xlink:href="Pictures/1000000100000001000000010F602221.gif" xlink:type="simple" xlink:show="embed" xlink:actuate="onLoad" draw:mime-type="image/gif"/>
      </draw:frame>
      <draw:frame draw:style-name="fr4" draw:name="Image12" text:anchor-type="page" text:anchor-page-number="1" svg:x="0in" svg:y="0in" svg:width="0.1874in" svg:height="0.25in" draw:z-index="11">
        <draw:image xlink:href="Pictures/1000000100000001000000010F602221.gif" xlink:type="simple" xlink:show="embed" xlink:actuate="onLoad" draw:mime-type="image/gif"/>
      </draw:frame>
      <draw:frame draw:style-name="fr4" draw:name="Image13" text:anchor-type="page" text:anchor-page-number="1" svg:x="0in" svg:y="0in" svg:width="0.6252in" svg:height="0.25in" draw:z-index="12">
        <draw:image xlink:href="Pictures/1000000100000001000000010F602221.gif" xlink:type="simple" xlink:show="embed" xlink:actuate="onLoad" draw:mime-type="image/gif"/>
      </draw:frame>
      <draw:frame draw:style-name="fr4" draw:name="Image14" text:anchor-type="page" text:anchor-page-number="1" svg:x="0in" svg:y="0in" svg:width="0.1874in" svg:height="0.25in" draw:z-index="13">
        <draw:image xlink:href="Pictures/1000000100000001000000010F602221.gif" xlink:type="simple" xlink:show="embed" xlink:actuate="onLoad" draw:mime-type="image/gif"/>
      </draw:frame>
      <draw:frame draw:style-name="fr4" draw:name="Image15" text:anchor-type="page" text:anchor-page-number="1" svg:x="0in" svg:y="0in" svg:width="0.1563in" svg:height="0.25in" draw:z-index="14">
        <draw:image xlink:href="Pictures/1000000100000001000000010F602221.gif" xlink:type="simple" xlink:show="embed" xlink:actuate="onLoad" draw:mime-type="image/gif"/>
      </draw:frame>
      <draw:frame draw:style-name="fr4" draw:name="Image16" text:anchor-type="page" text:anchor-page-number="1" svg:x="0in" svg:y="0in" svg:width="0.1874in" svg:height="0.25in" draw:z-index="15">
        <draw:image xlink:href="Pictures/1000000100000001000000010F602221.gif" xlink:type="simple" xlink:show="embed" xlink:actuate="onLoad" draw:mime-type="image/gif"/>
      </draw:frame>
      <draw:frame draw:style-name="fr4" draw:name="Image17" text:anchor-type="page" text:anchor-page-number="1" svg:x="0in" svg:y="0in" svg:width="0.1354in" svg:height="0.25in" draw:z-index="16">
        <draw:image xlink:href="Pictures/1000000100000001000000010F602221.gif" xlink:type="simple" xlink:show="embed" xlink:actuate="onLoad" draw:mime-type="image/gif"/>
      </draw:frame>
      <draw:frame draw:style-name="fr4" draw:name="Image18" text:anchor-type="page" text:anchor-page-number="1" svg:x="0in" svg:y="0in" svg:width="0.0626in" svg:height="0.25in" draw:z-index="17">
        <draw:image xlink:href="Pictures/1000000100000001000000010F602221.gif" xlink:type="simple" xlink:show="embed" xlink:actuate="onLoad" draw:mime-type="image/gif"/>
      </draw:frame>
      <draw:frame draw:style-name="fr4" draw:name="Image19" text:anchor-type="page" text:anchor-page-number="1" svg:x="0in" svg:y="0in" svg:width="0.4374in" svg:height="0.25in" draw:z-index="18">
        <draw:image xlink:href="Pictures/1000000100000001000000010F602221.gif" xlink:type="simple" xlink:show="embed" xlink:actuate="onLoad" draw:mime-type="image/gif"/>
      </draw:frame>
      <draw:frame draw:style-name="fr4" draw:name="Image20" text:anchor-type="page" text:anchor-page-number="1" svg:x="0in" svg:y="0in" svg:width="0.0626in" svg:height="0.25in" draw:z-index="19">
        <draw:image xlink:href="Pictures/1000000100000001000000010F602221.gif" xlink:type="simple" xlink:show="embed" xlink:actuate="onLoad" draw:mime-type="image/gif"/>
      </draw:frame>
      <text:p text:style-name="P5"><text:span text:style-name="T13">Point of Contact</text:span><text:span text:style-name="T9">:</text:span><draw:frame draw:style-name="fr3" draw:name="Image1" text:anchor-type="char" svg:x="6.2299in" svg:y="-1.1118in" svg:width="1.1217in" svg:height="1.0382in" draw:z-index="0"><draw:image xlink:href="Pictures/10000001000000A20000009694C0762F.png" xlink:type="simple" xlink:show="embed" xlink:actuate="onLoad" draw:mime-type="image/png"/></draw:frame></text:p>
      <text:p text:style-name="P6"><text:span text:style-name="T10"><text:tab/></text:span><text:span text:style-name="T13">Edward C. Zimmermann </text:span><text:span text:style-name="T20"><text:s text:c="3"/><text:tab/></text:span><text:span text:style-name="T13">E-mail</text:span><text:span text:style-name="T22">: </text:span><text:span text:style-name="T20">&lt;</text:span><text:a xlink:type="simple" xlink:href="mailto:ezimmermann@acm.org" text:style-name="Internet_20_link" text:visited-style-name="Visited_20_Internet_20_Link"><text:span text:style-name="T22">ezimmermann@acm.org</text:span></text:a><text:span text:style-name="T22">&gt;</text:span><text:span text:style-name="T20"> <text:s text:c="2"/><text:tab/></text:span></text:p>
      <text:p text:style-name="P6"><text:span text:style-name="T9"/></text:p>
      <text:p text:style-name="P6"><text:span text:style-name="T9">Abstract / Summary</text:span> </text:p>
      <text:p text:style-name="P106"><text:span text:style-name="T209">CoreQuarry</text:span><text:span text:style-name="T208"> </text:span><text:span text:style-name="T210">is a </text:span><text:span text:style-name="T208">hybrid knowledge retrieval engine </text:span><text:span text:style-name="T211">which emerged in 2026 from Project Schmate </text:span><text:span text:style-name="T212">(</text:span><text:span text:style-name="T293">שמאטע</text:span><text:span text:style-name="T212">) </text:span><text:span text:style-name="T211">for</text:span><text:span text:style-name="T213"> re-Isearch</text:span><text:span text:style-name="T211">.</text:span><text:span text:style-name="T222"> </text:span><text:span text:style-name="T221">It</text:span><text:span text:style-name="T220"> unifies lexical, structural, and semantic search into a single, high-performance platform. Unlike existing vector databases or traditional search engines, </text:span><text:span text:style-name="T221">it</text:span><text:span text:style-name="T220"> supports true positional indexing, structure-aware queries, and typed object retrieval, enabling precise and contextually-aware search over heterogeneous document corpora. By leveraging memory-mapped, append-only indexes and a two-tier address-based caching system, </text:span><text:span text:style-name="T221">the</text:span><text:span text:style-name="T220"> engine achieves extremely low memory footprints while scaling to handle complex, hybrid RAG queries on consumer hardware, including laptops and edge devices. </text:span></text:p>
      <text:p text:style-name="P52"><text:span text:style-name="T292"/></text:p>
      <text:p text:style-name="P327"><text:span text:style-name="T15">CoreQuarry </text:span><text:span text:style-name="T16">Innovation:</text:span></text:p>
      <text:list text:style-name="L1">
        <text:list-item>
          <text:p text:style-name="P153">Rich Operator Support: Full set of binary and unary operators (AND, OR, XOR, NEAR, BEFORE/AFTER, PEER, distance-based, field-specific operations) allow precise relational queries beyond traditional BM25-based ranking. </text:p>
        </text:list-item>
        <text:list-item>
          <text:p text:style-name="P153">Hybrid &amp; Extensible Indexing: Lexical, structural, numeric, geospatial, phonetic, and vector types are first-class citizens; plug-ins allow user-defined types and new algorithms without redesigning the core. </text:p>
        </text:list-item>
        <text:list-item>
          <text:p text:style-name="P154"><text:span text:style-name="T132">Designed to r</text:span><text:span text:style-name="T131">un smoothly on a single laptop or small edge</text:span></text:p>
        </text:list-item>
        <text:list-item>
          <text:p text:style-name="P153">Efficient Incremental Indexing: Append-only design with versioned updates, delete flags, and background garbage collection supports concurrent search and continuous ingestion, making it suitable for live AI pipelines. <text:s/></text:p>
          <text:p text:style-name="P152"><text:span text:style-name="T194"/></text:p>
        </text:list-item>
      </text:list>
      <text:p text:style-name="P11"><text:span text:style-name="T291">General </text:span>Impact:</text:p>
      <text:p text:style-name="P34">This engine enables privacy-preserving, local-first AI retrieval, supporting applications in legal research, medical knowledge, industrial edge AI, and large-scale document analytics. Its small footprint and high flexibility make it uniquely suited for embedded devices, laptops, and offline environments, dramatically lowering the barrier for organizations to implement robust AI-powered search without relying on cloud services.</text:p>
      <text:p text:style-name="Standard"/>
      <text:p text:style-name="P13">Key <text:span text:style-name="T24">Product</text:span> Differentiators</text:p>
      <text:list text:style-name="L2">
        <text:list-item>
          <text:p text:style-name="P155">Unified Hybrid Retrieval: Combines lexical, structural, and semantic (vector) search in a single engine. </text:p>
        </text:list-item>
        <text:list-item>
          <text:p text:style-name="P155">Rich Query Operators: Supports advanced positional, proximity, field-specific, and relational operators beyond traditional BM25. </text:p>
        </text:list-item>
        <text:list-item>
          <text:p text:style-name="P155">Typed Object Indexes: Indexes dates, numbers, hashes, geospatial, phonetic, and vectors as first-class data types. </text:p>
        </text:list-item>
        <text:list-item>
          <text:p text:style-name="P155">Append-Only, Memory-Mapped Architecture: Enables concurrent search and continuous ingestion with minimal RAM usage (lexical-only: min ~8MB). </text:p>
        </text:list-item>
        <text:list-item>
          <text:p text:style-name="P155">Extensible &amp; Pluggable: Supports new document types, custom fields, and alternative retrieval algorithms (HNSW, NSG, etc.). </text:p>
        </text:list-item>
        <text:list-item>
          <text:p text:style-name="P155">Local-First Deployment: Runs efficiently on laptops and edge devices, enabling privacy-preserving AI search without cloud dependencies. </text:p>
        </text:list-item>
        <text:list-item>
          <text:p text:style-name="P155">High Throughput: Demonstrated thousands of QPS on consumer hardware for complex hybrid queries. </text:p>
        </text:list-item>
        <text:list-item>
          <text:p text:style-name="P156">Extremely efficient and fast HNSW implementation with support for quantization and pass-through.</text:p>
        </text:list-item>
      </text:list>
      <text:p text:style-name="P34"/>
      <text:p text:style-name="P7">The system solves three major problems that current RAG and search solutions don’t:</text:p>
      <text:list text:style-name="L3">
        <text:list-item>
          <text:p text:style-name="P157">Hybrid Retrieval at Scale </text:p>
          <text:list>
            <text:list-item>
              <text:p text:style-name="P157">Lexical + structural + semantic in a single index </text:p>
            </text:list-item>
            <text:list-item>
              <text:p text:style-name="P157"><text:soft-page-break/>True boolean/proximity operators and field-scoped searches </text:p>
            </text:list-item>
            <text:list-item>
              <text:p text:style-name="P157">Optional vector embeddings for AI-enhanced relevance </text:p>
            </text:list-item>
          </text:list>
        </text:list-item>
        <text:list-item>
          <text:p text:style-name="P157">Local-first &amp; Lightweight </text:p>
          <text:list>
            <text:list-item>
              <text:p text:style-name="P157">Runs fully on consumer hardware (<text:span text:style-name="T315">including </text:span>laptops, edge devices) </text:p>
            </text:list-item>
            <text:list-item>
              <text:p text:style-name="P157">Lexical-only mode: &lt;10MB RAM </text:p>
            </text:list-item>
            <text:list-item>
              <text:p text:style-name="P158">Support for CUDA, Metal, Vukan etc. for embeddings. Best in class performance.</text:p>
            </text:list-item>
            <text:list-item>
              <text:p text:style-name="P157">No dependency on heavy external services (no Elasticsearch, no FAISS clusters) </text:p>
            </text:list-item>
          </text:list>
        </text:list-item>
        <text:list-item>
          <text:p text:style-name="P157">Extensibility &amp; Heterogeneous Data </text:p>
          <text:list>
            <text:list-item>
              <text:p text:style-name="P157">Typed object indexes (dates, numbers, geospatial, phonetics, hashes, vectors) </text:p>
            </text:list-item>
            <text:list-item>
              <text:p text:style-name="P157">Plug-ins for custom document formats and schemas </text:p>
            </text:list-item>
            <text:list-item>
              <text:p text:style-name="P157">Supports structured traversal, wildcards, field/path scoping </text:p>
            </text:list-item>
          </text:list>
        </text:list-item>
      </text:list>
      <text:p text:style-name="P8"/>
      <text:p text:style-name="P8">Potential Markets / Applications</text:p>
      <text:list text:style-name="L4">
        <text:list-item>
          <text:p text:style-name="P159">Local AI Assistants </text:p>
          <text:list>
            <text:list-item>
              <text:p text:style-name="P159">Law firms, medical practitioners, researchers: local RAG over sensitive documents </text:p>
            </text:list-item>
          </text:list>
        </text:list-item>
        <text:list-item>
          <text:p text:style-name="P159">Edge AI Devices </text:p>
          <text:list>
            <text:list-item>
              <text:p text:style-name="P159">IoT devices, robotics, industrial sensors: offline retrieval of structured datasets </text:p>
            </text:list-item>
          </text:list>
        </text:list-item>
        <text:list-item>
          <text:p text:style-name="P159">Enterprise Knowledge Infrastructure </text:p>
          <text:list>
            <text:list-item>
              <text:p text:style-name="P159">Replace multi-system RAG stacks (vector DB + search engine + pipeline) </text:p>
            </text:list-item>
            <text:list-item>
              <text:p text:style-name="P159">Offers privacy, low-latency retrieval, and structured queries </text:p>
            </text:list-item>
          </text:list>
        </text:list-item>
        <text:list-item>
          <text:p text:style-name="P159">Archival &amp; Compliance </text:p>
          <text:list>
            <text:list-item>
              <text:p text:style-name="P159">Historical corpora, standards, legal/financial archives: structural search + temporal/versioning </text:p>
            </text:list-item>
          </text:list>
        </text:list-item>
        <text:list-item>
          <text:p text:style-name="P159">Developer Tooling </text:p>
          <text:list>
            <text:list-item>
              <text:p text:style-name="P160">Embed directly into applications like SQLite: “SQLite for AI retrieval” </text:p>
            </text:list-item>
          </text:list>
        </text:list-item>
      </text:list>
      <text:p text:style-name="P53"/>
      <text:p text:style-name="P131"><text:span text:style-name="T226">On Premise Self-Hosting on c</text:span><text:span text:style-name="Strong_20_Emphasis"><text:span text:style-name="T121">ommodity accelerator hardware </text:span></text:span><text:span text:style-name="Strong_20_Emphasis"><text:span text:style-name="T122">versus Cloud</text:span></text:span></text:p>
      <text:p text:style-name="P236">Many institutions manage strict requirements for data stewardship, legal compliance, and long-term digital preservation. While cloud solutions are convenient, running knowledge retrieval and RAG architectures wholly on-premise protects institutional integrity. Because these local pipelines are specifically designed to run on affordable, consumer-off-the-shelf (COTS) systems, organizations can achieve total data independence without a massive capital investment.</text:p>
      <text:p text:style-name="P74"><text:span text:style-name="T322"/></text:p>
      <text:p text:style-name="P91"><text:span text:style-name="T322">C</text:span><text:span text:style-name="T325">rucially, an on-premise architecture ensures seamless compliance with a web of rigorous regulatory frameworks:</text:span></text:p>
      <text:p text:style-name="P91"><text:span text:style-name="T325"/></text:p>
      <text:list text:style-name="L5">
        <text:list-item>
          <text:p text:style-name="P299"><text:span text:style-name="Strong_20_Emphasis"><text:span text:style-name="T133">The General Data Protection Regulation (GDPR):</text:span></text:span><text:span text:style-name="T136"> Local hosting inherently satisfies core </text:span><text:span text:style-name="Strong_20_Emphasis"><text:span text:style-name="T133">GDPR </text:span></text:span><text:span text:style-name="T136">mandates—such as </text:span><text:span text:style-name="Emphasis"><text:span text:style-name="T136">Data Minimization (Article 5)</text:span></text:span><text:span text:style-name="T136"> and strict restrictions on </text:span><text:span text:style-name="Emphasis"><text:span text:style-name="T136">International Data Transfers (Chapter V)</text:span></text:span><text:span text:style-name="T136">—by eliminating the risk of personal data leaving sovereign borders.</text:span></text:p>
        </text:list-item>
        <text:list-item>
          <text:p text:style-name="P300"><text:span text:style-name="Strong_20_Emphasis"><text:span text:style-name="T133">National and Local Protection Acts:</text:span></text:span><text:span text:style-name="T136"> It preserves strict adherence to localized adaptations, such as the German </text:span><text:span text:style-name="Strong_20_Emphasis"><text:span text:style-name="T133">Federal Data Protection Act (BDSG)</text:span></text:span><text:span text:style-name="T136">, and national public record acts like the UK </text:span><text:span text:style-name="Strong_20_Emphasis"><text:span text:style-name="T133">Public Records Act 1958</text:span></text:span><text:span text:style-name="T136"> or the US </text:span><text:span text:style-name="Strong_20_Emphasis"><text:span text:style-name="T133">Federal Records Act (FRA)</text:span></text:span><text:span text:style-name="T136">.</text:span></text:p>
        </text:list-item>
        <text:list-item>
          <text:p text:style-name="P300"><text:span text:style-name="Strong_20_Emphasis"><text:span text:style-name="T135">Specialized Archival and Ethical Standards</text:span></text:span><text:span text:style-name="Strong_20_Emphasis"><text:span text:style-name="T137">:</text:span></text:span><text:span text:style-name="T137"> Processing records locally aligns with the </text:span><text:span text:style-name="Strong_20_Emphasis"><text:span text:style-name="T137">International Council on Archives (ICA) Code of Ethics</text:span></text:span><text:span text:style-name="T137">, which mandates that archivists actively protect corporate and personal privacy within electronic records.</text:span></text:p>
        </text:list-item>
      </text:list>
      <text:p text:style-name="P74"><text:span text:style-name="T322">By optimizing these systems for high-performance, consumer-off-the-shelf (COTS) hardware, institutions can deploy advanced local AI without requiring prohibitive capital </text:span><text:span text:style-name="T323">expenditures</text:span><text:span text:style-name="T322">. This approach ensures total data sovereignty and long-term digital preservation while maintaining strict adherence to public procurement budgets.</text:span></text:p>
      <text:p text:style-name="P237"><text:soft-page-break/><text:span text:style-name="T324">The "Hybrid-Local" Trap: Hidden Cloud Dependencies</text:span></text:p>
      <text:p text:style-name="P75">However, when evaluating self-hosted knowledge retrieval systems, organizations must look beyond superficial marketing terminology to verify true data isolation. Many software solutions marketed as "on-premise" operate on a hybrid architecture that quietly relies on external cloud APIs—such as OpenAI or Cohere—for critical processing stages like text embedding and vectorization. While the core application interface may reside on a local server, the system continuously transmits raw institutional data to offshore hyperscalers to generate these mathematical representations.</text:p>
      <text:p text:style-name="P75"/>
      <text:p text:style-name="P124"><text:span text:style-name="T137">For </text:span><text:span text:style-name="T138">organizations</text:span><text:span text:style-name="T137"> bound by strict privacy mandates, this architectural dependency represents a critical vulnerability. Passing data to a third-party API invalidates the compliance, confidentiality, and security benefits of a local deployment. To maintain absolute data integrity, the entire pipeline—including document ingestion, text chunking, embedding generation, vector storage, and large language model (LLM) inference—must run completely contained within the local COTS environment.</text:span></text:p>
      <text:p text:style-name="P113"><text:span text:style-name="T88">Absolute</text:span><text:span text:style-name="T68"> </text:span><text:span text:style-name="T88">Digital Preservation and Long-Term Stability</text:span></text:p>
      <text:list text:style-name="L6">
        <text:list-item>
          <text:p text:style-name="P301"><text:span text:style-name="Strong_20_Emphasis"><text:span text:style-name="T133">No Vendor Lock-In:</text:span></text:span><text:span text:style-name="T136"> Reliance on a cloud provider risks catastrophic disruption if the vendor raises prices, alters their API, or goes out of business.</text:span></text:p>
        </text:list-item>
        <text:list-item>
          <text:p text:style-name="P301"><text:span text:style-name="Strong_20_Emphasis"><text:span text:style-name="T133">Immutable Infrastructure:</text:span></text:span><text:span text:style-name="T136"> On-prem code bases can be frozen in time, ensuring that search and retrieval tools remain functional and identical for decades.</text:span></text:p>
        </text:list-item>
        <text:list-item>
          <text:p text:style-name="P302"><text:span text:style-name="Strong_20_Emphasis"><text:span text:style-name="T133">Offline Resiliency:</text:span></text:span><text:span text:style-name="T136"> Libraries must function during regional internet outages or infrastructure failures; local setups ensure internal search operations never go offline.</text:span></text:p>
        </text:list-item>
      </text:list>
      <text:p text:style-name="P76"><text:span text:style-name="T8">Financial Predictability</text:span> and Zero Usage Fees <text:span text:style-name="T326">(FinOps)</text:span></text:p>
      <text:p text:style-name="P76"/>
      <text:p text:style-name="P76">Publicly funded institutions operate on fixed, rigid annual budgets that do not align with unpredictable cloud billing models.</text:p>
      <text:p text:style-name="P76"/>
      <text:list text:style-name="L7">
        <text:list-item>
          <text:p text:style-name="P303"><text:span text:style-name="Strong_20_Emphasis"><text:span text:style-name="T133">No Per-Query API Fees:</text:span></text:span><text:span text:style-name="T136"> Cloud RAG systems charge per token or per search volume, leading to volatile costs if a search tool suddenly goes viral with patrons.</text:span></text:p>
        </text:list-item>
        <text:list-item>
          <text:p text:style-name="P303"><text:span text:style-name="Strong_20_Emphasis"><text:span text:style-name="T133">Fixed Capital Expenditure:</text:span></text:span><text:span text:style-name="T136"> Purchasing on-prem hardware is a predictable, one-time expense that fits traditional institutional grant structures and capital budgets.</text:span></text:p>
        </text:list-item>
        <text:list-item>
          <text:p text:style-name="P304"><text:span text:style-name="Strong_20_Emphasis"><text:span text:style-name="T133">Leveraging Existing Hardware:</text:span></text:span><text:span text:style-name="T136"> Libraries can repurpose existing local server infrastructure or institutional university clusters to run highly optimized, quantized open-source models.</text:span></text:p>
        </text:list-item>
      </text:list>
      <text:p text:style-name="P76"><text:span text:style-name="T8">Uncompromising</text:span> <text:span text:style-name="T8">Customization</text:span> and Domain Accuracy</text:p>
      <text:p text:style-name="P76"/>
      <text:p text:style-name="P76">Standard cloud search tools and commercial AI models are optimized for general web data, not specialized historical archives.</text:p>
      <text:p text:style-name="P90"/>
      <text:list text:style-name="L8">
        <text:list-item>
          <text:p text:style-name="P305"><text:span text:style-name="Strong_20_Emphasis"><text:span text:style-name="T133">Niche Metadata Integration:</text:span></text:span><text:span text:style-name="T136"> On-prem systems allow direct injection of highly specific library standards (like MARC21, Dublin Core, or custom taxonomies) directly into the retrieval pipeline.</text:span></text:p>
        </text:list-item>
        <text:list-item>
          <text:p text:style-name="P305"><text:span text:style-name="Strong_20_Emphasis"><text:span text:style-name="T133">Historical Language Tuning:</text:span></text:span><text:span text:style-name="T136"> Local open-source models can be custom-tuned to read archaic spellings, dead languages, or specific regional dialects without cloud filtering mechanisms blocking the content.</text:span></text:p>
        </text:list-item>
        <text:list-item>
          <text:p text:style-name="P306"><text:span text:style-name="Strong_20_Emphasis"><text:span text:style-name="T133">Algorithmic Transparency:</text:span></text:span><text:span text:style-name="T136"> Researchers require objective, un-biased search results; local open-source retrieval pipelines allow staff to inspect the exact retrieval math, proving how an answer was generated.</text:span></text:p>
        </text:list-item>
      </text:list>
      <text:p text:style-name="P77">Power and Energy Efficiency</text:p>
      <text:p text:style-name="P123"><text:span text:style-name="T66">Designed and optimized for COTS u</text:span><text:span text:style-name="T67">nlike enterprise data center hardware which demand three-phase industrial power grids and specialized server room water chillers. </text:span></text:p>
      <text:p text:style-name="P125">Support:</text:p>
      <text:p text:style-name="P15"><draw:frame draw:style-name="fr3" draw:name="Image4" text:anchor-type="char" svg:x="1.5374in" svg:y="0.1264in" svg:width="0.7102in" svg:height="0.7102in" draw:z-index="3"><draw:image xlink:href="Pictures/10000000000000FC000000FC83698EFC.png" xlink:type="simple" xlink:show="embed" xlink:actuate="onLoad" draw:mime-type="image/png"/></draw:frame><draw:frame draw:style-name="fr3" draw:name="Image5" text:anchor-type="char" svg:x="2.539in" svg:y="0.1472in" svg:width="1.3472in" svg:height="0.6957in" draw:z-index="4"><draw:image xlink:href="Pictures/100000000000011700000090D4C12D0E.png" xlink:type="simple" xlink:show="embed" xlink:actuate="onLoad" draw:mime-type="image/png"/></draw:frame><draw:frame draw:style-name="fr3" draw:name="Image3" text:anchor-type="char" svg:x="0.178in" svg:y="0.1043in" svg:width="1.0835in" svg:height="0.7228in" draw:z-index="2"><draw:image xlink:href="Pictures/10000000000001900000010BB8C8B6CF.png" xlink:type="simple" xlink:show="embed" xlink:actuate="onLoad" draw:mime-type="image/png"/></draw:frame><draw:frame draw:style-name="fr3" draw:name="Image6" text:anchor-type="char" svg:x="4.3043in" svg:y="0.1382in" svg:width="1.7854in" svg:height="0.7161in" draw:z-index="5"><draw:image xlink:href="Pictures/10000000000001620000008ED9F43F0E.png" xlink:type="simple" xlink:show="embed" xlink:actuate="onLoad" draw:mime-type="image/png"/></draw:frame></text:p>
      <text:p text:style-name="P15"/>
      <text:p text:style-name="P15"/>
      <text:p text:style-name="P15"/>
      <text:p text:style-name="P15"/>
      <text:p text:style-name="P17"><draw:frame draw:style-name="fr3" draw:name="Image2" text:anchor-type="char" svg:x="0.9626in" svg:y="0.0126in" svg:width="2.5126in" svg:height="0.698in" draw:z-index="1"><draw:image xlink:href="Pictures/1000000000000352000000EC9D07F8E3.png" xlink:type="simple" xlink:show="embed" xlink:actuate="onLoad" draw:mime-type="image/png"/></draw:frame><draw:frame draw:style-name="fr3" draw:name="Image7" text:anchor-type="char" svg:x="4.161in" svg:y="0.0283in" svg:width="1.5193in" svg:height="0.6335in" draw:z-index="6"><draw:image xlink:href="Pictures/10000000000001500000008CF7D39373.png" xlink:type="simple" xlink:show="embed" xlink:actuate="onLoad" draw:mime-type="image/png"/></draw:frame><draw:frame draw:style-name="fr3" draw:name="Image8" text:anchor-type="char" svg:x="5.8516in" svg:y="0.0799in" svg:width="0.7398in" svg:height="0.4925in" draw:z-index="7"><draw:image xlink:href="Pictures/1000000000000113000000B7C6751253.png" xlink:type="simple" xlink:show="embed" xlink:actuate="onLoad" draw:mime-type="image/png"/></draw:frame><text:span text:style-name="T26"/></text:p>
      <text:p text:style-name="P16"><text:span text:style-name="T32"/></text:p>
      <text:p text:style-name="P16"><text:span text:style-name="T32"/></text:p>
      <text:p text:style-name="P16"><text:span text:style-name="T32"/></text:p>
      <text:p text:style-name="P16"><text:span text:style-name="T32">T</text:span><text:span text:style-name="T33">hrough the </text:span><text:a xlink:type="simple" xlink:href="https://nlnet.nl/discovery" text:style-name="Internet_20_link" text:visited-style-name="Visited_20_Internet_20_Link"><text:span text:style-name="T34">NGI0 Discovery</text:span></text:a><text:span text:style-name="T33"> Fund, a fund established by </text:span><text:a xlink:type="simple" xlink:href="https://nlnet.nl/" text:style-name="Internet_20_link" text:visited-style-name="Visited_20_Internet_20_Link"><text:span text:style-name="T34">NLnet</text:span></text:a><text:span text:style-name="T33"> with financial support from the European Commission's </text:span><text:a xlink:type="simple" xlink:href="https://ngi.eu/" text:style-name="Internet_20_link" text:visited-style-name="Visited_20_Internet_20_Link"><text:span text:style-name="T34">Next Generation Internet</text:span></text:a><text:span text:style-name="T33"> 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34">DG Communications Networks, Content and Technology</text:span></text:a><text:span text:style-name="T33"> under grant agreement No </text:span><text:a xlink:type="simple" xlink:href="https://cordis.europa.eu/project/id/825322" text:style-name="Internet_20_link" text:visited-style-name="Visited_20_Internet_20_Link"><text:span text:style-name="T34">825322</text:span></text:a><text:span text:style-name="T33">.</text:span></text:p>
      <text:p text:style-name="P24"><text:span text:style-name="T31"/></text:p>
      <text:p text:style-name="P16"><text:span text:style-name="T33">Through the </text:span><text:a xlink:type="simple" xlink:href="https://nlnet.nl/commonsfund" text:style-name="Internet_20_link" text:visited-style-name="Visited_20_Internet_20_Link"><text:span text:style-name="T34">NGI0 Commons Fund</text:span></text:a><text:span text:style-name="T33">, a fund established by </text:span><text:a xlink:type="simple" xlink:href="https://nlnet.nl/" text:style-name="Internet_20_link" text:visited-style-name="Visited_20_Internet_20_Link"><text:span text:style-name="T223">NLnet</text:span></text:a><text:span text:style-name="T34"> </text:span><text:span text:style-name="T33">with financial support from the European Commission's </text:span><text:a xlink:type="simple" xlink:href="https://ngi.eu/" text:style-name="Internet_20_link" text:visited-style-name="Visited_20_Internet_20_Link"><text:span text:style-name="T223">Next Generation Internet</text:span></text:a><text:span text:style-name="T34"> </text:span><text:span text:style-name="T33">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223">DG Communications Networks, Content and Technology</text:span></text:a><text:span text:style-name="T34"> </text:span><text:span text:style-name="T33">under grant agreement No </text:span><text:a xlink:type="simple" xlink:href="https://cordis.europa.eu/project/id/101135429" text:style-name="Internet_20_link" text:visited-style-name="Visited_20_Internet_20_Link"><text:span text:style-name="T34">101135429</text:span></text:a><text:span text:style-name="T33">. Additional funding is made available by the </text:span><text:a xlink:type="simple" xlink:href="https://www.sbfi.admin.ch/sbfi/en/home.html" text:style-name="Internet_20_link" text:visited-style-name="Visited_20_Internet_20_Link"><text:span text:style-name="T223">Swiss State Secretariat for Education, Research and Innovation</text:span></text:a><text:span text:style-name="T34"> </text:span><text:span text:style-name="T33">(SERI).</text:span></text:p>
      <text:p text:style-name="P24"><text:span text:style-name="T31"/></text:p>
      <text:p text:style-name="P62"><text:span text:style-name="T35">Through a Grant from the Bundesministerium für Forschung, Technologie und Raumfahrt (Germany) </text:span><text:span text:style-name="T195">GRANT_NUMBER: </text:span><text:a xlink:type="simple" xlink:href="https://foerderportal.bund.de/foekat/jsp/SucheAction.do?actionMode=view&amp;fkz=01IS22S32" office:target-frame-name="_blank" xlink:show="new" text:style-name="Internet_20_link" text:visited-style-name="Visited_20_Internet_20_Link"><text:span text:style-name="T36">01IS22S32</text:span></text:a><text:span text:style-name="T35"> (exploring support of the IPFS and supporting remote indexing). Through a grant from the European Commission </text:span><text:span text:style-name="Strong_20_Emphasis"><text:span text:style-name="T37">Coordination and Support Action (CSA) on ICT standardisation </text:span></text:span><text:span text:style-name="Strong_20_Emphasis"><text:span text:style-name="T38">(extending support for additional post ISO-8601:2019 features).</text:span></text:span></text:p>
      <text:p text:style-name="P62"><text:span text:style-name="Strong_20_Emphasis"><text:span text:style-name="T37"/></text:span></text:p>
      <text:p text:style-name="P62"><text:span text:style-name="T28">Additional support was provided by a grant from </text:span><text:span text:style-name="T27">OpenData CH/Mercator Foundation CH. </text:span></text:p>
      <text:p text:style-name="P97"><text:span text:style-name="T295"/></text:p>
      <text:p text:style-name="P98"><text:span text:style-name="T295">Appendix </text:span><text:span text:style-name="T296">I: </text:span><text:span text:style-name="T297">Technology Backgrounder / </text:span><text:span text:style-name="T296">The 30 year old new kid</text:span></text:p>
      <text:p text:style-name="P104"><text:span text:style-name="T27"><text:line-break/></text:span><text:span text:style-name="T29">re-Isearch</text:span><text:span text:style-name="T176"> is the modern evolution of iSearch—the pioneering open-source engine of the mid-90s </text:span><text:span text:style-name="T179">we co-developed with CNIDR</text:span><text:span text:style-name="T176">. Originally developed to solve the "document type" problem of the early web, the technology was reborn through the support of NLNet </text:span><text:span text:style-name="T178">as well as grants from BMFTR (German Federal Ministry for Research, Technology and Space), Open Data Switzerland and the Mercator Foundation. </text:span><text:span text:style-name="T176"><text:s/>Today, we’ve moved beyond </text:span><text:span text:style-name="T177">lexical</text:span><text:span text:style-name="T176"> indexing </text:span><text:span text:style-name="T179">adding with Project Schmate vector indexes to become</text:span><text:span text:style-name="T176"> CoreQuarry. </text:span><text:span text:style-name="T179">It</text:span><text:span text:style-name="T176"> combines thirty years of architectural expertise with cutting-edge hybrid search to help mine the core of human knowledge.</text:span></text:p>
      <text:p text:style-name="P104"><text:span text:style-name="T176"/></text:p>
      <text:p text:style-name="P104"><text:span text:style-name="T204">Our</text:span><text:span text:style-name="T201"> philosophical ancestor is </text:span><text:span text:style-name="T68">early </text:span><text:span text:style-name="Strong_20_Emphasis"><text:span text:style-name="T68">SGML retrieval systems </text:span></text:span><text:span text:style-name="Strong_20_Emphasis"><text:span text:style-name="T77">(like OpenText </text:span></text:span><text:span text:style-name="Strong_20_Emphasis"><text:span text:style-name="T78">which grew out of</text:span></text:span><text:span text:style-name="Strong_20_Emphasis"><text:span text:style-name="T143"> a University of Waterloo project from Timothy Bray, Frank Tompa, and Gaston Gonnet to digitize the Oxford English Dictionary</text:span></text:span><text:span text:style-name="Strong_20_Emphasis"><text:span text:style-name="T77">) </text:span></text:span><text:span text:style-name="T201">but </text:span><text:span text:style-name="T204">designed to support </text:span><text:span text:style-name="T205">beyond SGML </text:span><text:span text:style-name="T204">multiple document form</text:span><text:span text:style-name="T218">ats and data types; and </text:span><text:span text:style-name="T194">modernized for:</text:span></text:p>
      <text:list text:style-name="L9">
        <text:list-item>
          <text:p text:style-name="P161">embeddings</text:p>
        </text:list-item>
        <text:list-item>
          <text:p text:style-name="P161">local-first compute</text:p>
        </text:list-item>
        <text:list-item>
          <text:p text:style-name="P238">RAG</text:p>
        </text:list-item>
      </text:list>
      <text:p text:style-name="P19"><text:span text:style-name="T11"/></text:p>
      <text:p text:style-name="P105"><text:span text:style-name="T154">For vector search we use the </text:span><text:span text:style-name="T155">The </text:span><text:span text:style-name="Strong_20_Emphasis"><text:span text:style-name="T155">Hierarchical Navigable Small World (HNSW) </text:span></text:span><text:span text:style-name="T155">algorithm. </text:span><text:span text:style-name="T154">Introduced in</text:span><text:span text:style-name="T199"> </text:span><text:span text:style-name="T200">2016 by</text:span><text:span text:style-name="T199"> </text:span><text:span text:style-name="T200">Y</text:span><text:span text:style-name="Strong_20_Emphasis"><text:span text:style-name="T199">u. A. Malkov and D. A. Yashunin</text:span></text:span><text:span text:style-name="Strong_20_Emphasis"><text:span text:style-name="T162"> </text:span></text:span><text:span text:style-name="Strong_20_Emphasis"><text:span text:style-name="T163">i</text:span></text:span><text:span text:style-name="T155">n their paper, "Efficient and robust approximate nearest neighbor search using Hierarchical Navigable Small World graphs". It is the evolutionary successor to the </text:span><text:span text:style-name="Strong_20_Emphasis"><text:span text:style-name="T155">Navigable Small World (NSW) </text:span></text:span><text:span text:style-name="T155">graph, combining it with the hierarchical structure of </text:span><text:span text:style-name="Strong_20_Emphasis"><text:span text:style-name="T155">Skip Lists.</text:span></text:span></text:p>
      <text:p text:style-name="P19"><text:span text:style-name="T11"/></text:p>
      <text:p text:style-name="P23"><text:span text:style-name="T11">B</text:span><text:span text:style-name="T12">oth our algorithms for lexical and vector structures </text:span><text:span text:style-name="T175">were designed to move beyond simple linear scans. HNSW achieves logarithmic complexity </text:span><text:span text:style-name="T173">𝑂</text:span><text:span text:style-name="T174">(log𝑁) for vectors, while PatArrays provide similar efficiency for finding any substring in a massive corpus without an inverted index.</text:span></text:p>
      <text:p text:style-name="P19"><text:span text:style-name="T11"/></text:p>
      <text:p text:style-name="P19"><text:span text:style-name="T11">H</text:span><text:span text:style-name="T9">ardware has progressed dramatically since the mid-1990s when those SGML retrieval systems were deployed. <text:s/>Back then:</text:span></text:p>
      <text:p text:style-name="P96"><text:span text:style-name="T197">- high end servers (e.g.</text:span><text:span text:style-name="T85"> Sun Ultra Enterprise, IBM RS/6000 SP, HP 9000, DEC Alpha servers, and high-end Intel Pentium Pro servers):</text:span><text:span text:style-name="T197"> had 1-4 GB RAM (mainly EDO or perhaps early ECC DRAM). The memory bus speed was ~60-66 Mhz and the bandwidth was ~200-500 MB/s. Latency was ~60-80ns.</text:span></text:p>
      <text:p text:style-name="P41"><text:span text:style-name="T261">- </text:span><text:span text:style-name="T48">High-end disk arrays: 50–500 GB total (e.g., an EMC Symmetrix could hold ~400 GB) </text:span><text:span text:style-name="T49">where </text:span><text:span text:style-name="T47">Individual SCSI drives: 2–18 GB per spindle </text:span><text:span text:style-name="T49">and </text:span><text:span text:style-name="T47">RAID controllers with cache: 32–256 MB write cache</text:span></text:p>
      <text:h text:style-name="P134" text:outline-level="3" text:is-list-header="true">The Numbers Side-by-Sid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1">Metric</text:p>
            </table:table-cell>
            <table:table-cell table:style-name="Table3.A1" office:value-type="string">
              <text:p text:style-name="P61">Mid-1990s Enterprise</text:p>
            </table:table-cell>
            <table:table-cell table:style-name="Table3.A1" office:value-type="string">
              <text:p text:style-name="P61">Modern 2026 Workstation</text:p>
            </table:table-cell>
            <table:table-cell table:style-name="Table3.A1" office:value-type="string">
              <text:p text:style-name="P61">Improvement</text:p>
            </table:table-cell>
          </table:table-row>
        </table:table-header-rows>
        <table:table-row>
          <table:table-cell table:style-name="Table3.A1" office:value-type="string">
            <text:p text:style-name="P59">RAM capacity</text:p>
          </table:table-cell>
          <table:table-cell table:style-name="Table3.A1" office:value-type="string">
            <text:p text:style-name="P59">1–4 GB</text:p>
          </table:table-cell>
          <table:table-cell table:style-name="Table3.A1" office:value-type="string">
            <text:p text:style-name="P59">128 GB–2 TB</text:p>
          </table:table-cell>
          <table:table-cell table:style-name="Table3.A1" office:value-type="string">
            <text:p text:style-name="P59">~100–500×</text:p>
          </table:table-cell>
        </table:table-row>
        <table:table-row>
          <table:table-cell table:style-name="Table3.A1" office:value-type="string">
            <text:p text:style-name="P59">Memory bandwidth</text:p>
          </table:table-cell>
          <table:table-cell table:style-name="Table3.A1" office:value-type="string">
            <text:p text:style-name="P59">~400 MB/s</text:p>
          </table:table-cell>
          <table:table-cell table:style-name="Table3.A1" office:value-type="string">
            <text:p text:style-name="P59">~300 GB/s</text:p>
          </table:table-cell>
          <table:table-cell table:style-name="Table3.A1" office:value-type="string">
            <text:p text:style-name="Table_20_Contents"><text:span text:style-name="Strong_20_Emphasis"><text:span text:style-name="T194">~750×</text:span></text:span></text:p>
          </table:table-cell>
        </table:table-row>
        <table:table-row>
          <table:table-cell table:style-name="Table3.A1" office:value-type="string">
            <text:p text:style-name="P59">Memory latency</text:p>
          </table:table-cell>
          <table:table-cell table:style-name="Table3.A1" office:value-type="string">
            <text:p text:style-name="P59">~70 ns</text:p>
          </table:table-cell>
          <table:table-cell table:style-name="Table3.A1" office:value-type="string">
            <text:p text:style-name="P59">~75 ns end-to-end</text:p>
          </table:table-cell>
          <table:table-cell table:style-name="Table3.A1" office:value-type="string">
            <text:p text:style-name="P59">Roughly flat</text:p>
          </table:table-cell>
        </table:table-row>
        <table:table-row>
          <table:table-cell table:style-name="Table3.A1" office:value-type="string">
            <text:p text:style-name="P59">Disk seq. read</text:p>
          </table:table-cell>
          <table:table-cell table:style-name="Table3.A1" office:value-type="string">
            <text:p text:style-name="P59">10–15 MB/s</text:p>
          </table:table-cell>
          <table:table-cell table:style-name="Table3.A1" office:value-type="string">
            <text:p text:style-name="P59">12,000–14,000 MB/s</text:p>
          </table:table-cell>
          <table:table-cell table:style-name="Table3.A1" office:value-type="string">
            <text:p text:style-name="Table_20_Contents"><text:span text:style-name="Strong_20_Emphasis"><text:span text:style-name="T194">~1,000×</text:span></text:span></text:p>
          </table:table-cell>
        </table:table-row>
        <table:table-row>
          <table:table-cell table:style-name="Table3.A1" office:value-type="string">
            <text:p text:style-name="P59">Disk random IOPS</text:p>
          </table:table-cell>
          <table:table-cell table:style-name="Table3.A1" office:value-type="string">
            <text:p text:style-name="P59">100–200</text:p>
          </table:table-cell>
          <table:table-cell table:style-name="Table3.A1" office:value-type="string">
            <text:p text:style-name="P59">1,000,000–2,000,000</text:p>
          </table:table-cell>
          <table:table-cell table:style-name="Table3.A1" office:value-type="string">
            <text:p text:style-name="Table_20_Contents"><text:span text:style-name="Strong_20_Emphasis"><text:span text:style-name="T194">~10,000×</text:span></text:span></text:p>
          </table:table-cell>
        </table:table-row>
        <table:table-row>
          <table:table-cell table:style-name="Table3.A1" office:value-type="string">
            <text:p text:style-name="P59">Disk seek/latency</text:p>
          </table:table-cell>
          <table:table-cell table:style-name="Table3.A1" office:value-type="string">
            <text:p text:style-name="P59">8–12 ms</text:p>
          </table:table-cell>
          <table:table-cell table:style-name="Table3.A1" office:value-type="string">
            <text:p text:style-name="P59">0.02–0.1 ms</text:p>
          </table:table-cell>
          <table:table-cell table:style-name="Table3.A1" office:value-type="string">
            <text:p text:style-name="Table_20_Contents"><text:span text:style-name="Strong_20_Emphasis"><text:span text:style-name="T194">~100–500×</text:span></text:span></text:p>
          </table:table-cell>
        </table:table-row>
        <table:table-row>
          <table:table-cell table:style-name="Table3.A1" office:value-type="string">
            <text:p text:style-name="P59">Storage capacity</text:p>
          </table:table-cell>
          <table:table-cell table:style-name="Table3.A1" office:value-type="string">
            <text:p text:style-name="P59">400 GB (array)</text:p>
          </table:table-cell>
          <table:table-cell table:style-name="Table3.A1" office:value-type="string">
            <text:p text:style-name="P59">4–8 TB (single drive)</text:p>
          </table:table-cell>
          <table:table-cell table:style-name="Table3.A1" office:value-type="string">
            <text:p text:style-name="P59">~10–20× per drive</text:p>
          </table:table-cell>
        </table:table-row>
        <table:table-row>
          <table:table-cell table:style-name="Table3.A1" office:value-type="string">
            <text:p text:style-name="P59">CPU clock</text:p>
          </table:table-cell>
          <table:table-cell table:style-name="Table3.A1" office:value-type="string">
            <text:p text:style-name="P59">100–500 MHz</text:p>
          </table:table-cell>
          <table:table-cell table:style-name="Table3.A1" office:value-type="string">
            <text:p text:style-name="P59">4,000–6,000 MHz</text:p>
          </table:table-cell>
          <table:table-cell table:style-name="Table3.A1" office:value-type="string">
            <text:p text:style-name="P59">~10–60×</text:p>
          </table:table-cell>
        </table:table-row>
      </table:table>
      <text:p text:style-name="P97"><text:span text:style-name="Strong_20_Emphasis"><text:span text:style-name="T69"/></text:span></text:p>
      <text:p text:style-name="P101"><text:span text:style-name="T68">A fully configured </text:span><text:span text:style-name="T70">mid-1990s</text:span><text:span text:style-name="T68"> enterprise server with 2–4 GB RAM, a modest disk array (~100 GB), RAID, and software licenses: </text:span><text:span text:style-name="Strong_20_Emphasis"><text:span text:style-name="T68">$500,000 – $3,000,000+ </text:span></text:span><text:span text:style-name="Strong_20_Emphasis"><text:span text:style-name="T70">(in 2026</text:span></text:span><text:span text:style-name="T68"> dollars that's roughly </text:span><text:span text:style-name="Strong_20_Emphasis"><text:span text:style-name="T68">$1M – $6M</text:span></text:span><text:span text:style-name="Strong_20_Emphasis"><text:span text:style-name="T70">)</text:span></text:span><text:span text:style-name="Strong_20_Emphasis"><text:span text:style-name="T89"> </text:span></text:span><text:span text:style-name="Strong_20_Emphasis"><text:span text:style-name="T90">versus </text:span></text:span><text:span text:style-name="Strong_20_Emphasis"><text:span text:style-name="T63">~$8,000–$9,000 for a 2026 high-end workstation and even under $2000 for a fast consumer desktop (64-core, 64GB DDR5-6000 RAM, 2TB SSD etc). <text:s/></text:span></text:span><text:span text:style-name="Strong_20_Emphasis"><text:span text:style-name="T64">Even the </text:span></text:span><text:span text:style-name="Strong_20_Emphasis"><text:span text:style-name="T65">€475 (Netto) Apple M4 Mini </text:span></text:span><text:span text:style-name="Strong_20_Emphasis"><text:span text:style-name="T64">(</text:span></text:span><text:span text:style-name="Strong_20_Emphasis"><text:span text:style-name="T150">standard </text:span></text:span><text:span text:style-name="Strong_20_Emphasis"><text:span text:style-name="T142">M4 chip</text:span></text:span><text:span text:style-name="Strong_20_Emphasis"><text:span text:style-name="T144">)</text:span></text:span><text:span text:style-name="Strong_20_Emphasis"><text:span text:style-name="T142"> offers </text:span></text:span><text:span text:style-name="Strong_20_Emphasis"><text:span text:style-name="T144">38 TOPS, </text:span></text:span><text:span text:style-name="Strong_20_Emphasis"><text:span text:style-name="T196">120GB/s </text:span></text:span><text:span text:style-name="Strong_20_Emphasis"><text:span text:style-name="T198">memory bandwidth</text:span></text:span><text:span text:style-name="Strong_20_Emphasis"><text:span text:style-name="T152">,</text:span></text:span><text:span text:style-name="Strong_20_Emphasis"><text:span text:style-name="T65"> 16GB RAM and 255GB SDD </text:span></text:span><text:span text:style-name="Strong_20_Emphasis"><text:span text:style-name="T64">(</text:span></text:span><text:span text:style-name="Strong_20_Emphasis"><text:span text:style-name="T150">under 0.1 ms seek latency)</text:span></text:span><text:span text:style-name="Strong_20_Emphasis"><text:span text:style-name="T65">. </text:span></text:span><text:span text:style-name="Strong_20_Emphasis"><text:span text:style-name="T151">The </text:span></text:span><text:soft-page-break/><text:span text:style-name="Strong_20_Emphasis"><text:span text:style-name="T151">NVIDIA DGX Spark, powered by the GB10 Grace Blackwell SOC, delivers </text:span></text:span><text:span text:style-name="T201">up to </text:span><text:span text:style-name="Strong_20_Emphasis"><text:span text:style-name="T142">1 PetaFLOP, </text:span></text:span></text:p>
      <text:p text:style-name="P101"><text:span text:style-name="Strong_20_Emphasis"><text:span text:style-name="T145">memory </text:span></text:span><text:span text:style-name="Strong_20_Emphasis"><text:span text:style-name="T142">bandwidth of approximately </text:span></text:span><text:span text:style-name="Strong_20_Emphasis"><text:span text:style-name="T196">273 GB/s</text:span></text:span><text:span text:style-name="Strong_20_Emphasis"><text:span text:style-name="T142">, 128 GB of unified LPDDR5x memory </text:span></text:span><text:span text:style-name="Strong_20_Emphasis"><text:span text:style-name="T145">and 4GB SSD for </text:span></text:span><text:span text:style-name="Strong_20_Emphasis"><text:span text:style-name="T180">4.349,00 €</text:span></text:span></text:p>
      <text:p text:style-name="P101"><text:span text:style-name="Strong_20_Emphasis"><text:span text:style-name="T180"/></text:span></text:p>
      <text:p text:style-name="P126"><text:span text:style-name="Strong_20_Emphasis"><text:span text:style-name="T92">Example of an Enterprise Ready Specification (Prosumer Class):</text:span></text:span></text:p>
      <text:p text:style-name="P126"><text:span text:style-name="Strong_20_Emphasis"><text:span text:style-name="T92"/></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8">Component</text:p>
          </table:table-cell>
          <table:table-cell table:style-name="Table15.A1" office:value-type="string">
            <text:p text:style-name="P128">Target Specification</text:p>
          </table:table-cell>
          <table:table-cell table:style-name="Table15.A1" office:value-type="string">
            <text:p text:style-name="P128">Institutional Rationale</text:p>
          </table:table-cell>
          <table:table-cell table:style-name="Table15.A1" office:value-type="string">
            <text:p text:style-name="P128">Estimated Cost (USD)</text:p>
          </table:table-cell>
        </table:table-row>
        <table:table-row>
          <table:table-cell table:style-name="Table15.A1" office:value-type="string">
            <text:p text:style-name="P66"><text:span text:style-name="Strong_20_Emphasis"><text:span text:style-name="T320">Graphics Processing Units (GPUs)</text:span></text:span></text:p>
          </table:table-cell>
          <table:table-cell table:style-name="Table15.A1" office:value-type="string">
            <text:p text:style-name="P66"><text:span text:style-name="Strong_20_Emphasis"><text:span text:style-name="T320">2x NVIDIA GeForce RTX 5090</text:span></text:span><text:span text:style-name="T321"> (32GB GDDR7 VRAM per card)</text:span></text:p>
          </table:table-cell>
          <table:table-cell table:style-name="Table15.A1" office:value-type="string">
            <text:p text:style-name="P66"><text:span text:style-name="T321">Provides a massive </text:span><text:span text:style-name="Strong_20_Emphasis"><text:span text:style-name="T320">64GB of combined VRAM</text:span></text:span><text:span text:style-name="T321"> pool over a high-bandwidth PCIe interface. This capacity natively holds a 70B parameter model at Q4_K_M quantization with enough residual VRAM to support expansive context windows and user sessions.</text:span></text:p>
          </table:table-cell>
          <table:table-cell table:style-name="Table15.A1" office:value-type="string">
            <text:p text:style-name="P127">$4,000 – $4,600</text:p>
          </table:table-cell>
        </table:table-row>
        <table:table-row>
          <table:table-cell table:style-name="Table15.A1" office:value-type="string">
            <text:p text:style-name="P66"><text:span text:style-name="Strong_20_Emphasis"><text:span text:style-name="T320">Processor (CPU)</text:span></text:span></text:p>
          </table:table-cell>
          <table:table-cell table:style-name="Table15.A1" office:value-type="string">
            <text:p text:style-name="P66"><text:span text:style-name="Strong_20_Emphasis"><text:span text:style-name="T320">AMD Ryzen Threadripper 7960X</text:span></text:span><text:span text:style-name="T321"> (24 Cores / 48 Threads) or high-end </text:span><text:span text:style-name="Strong_20_Emphasis"><text:span text:style-name="T320">Intel Xeon W-2400</text:span></text:span></text:p>
          </table:table-cell>
          <table:table-cell table:style-name="Table15.A1" office:value-type="string">
            <text:p text:style-name="P127">Provides the raw parallel processing power required for the document ingestion, optical character recognition (OCR), text tokenization, and vector indexing phases of a RAG pipeline.</text:p>
          </table:table-cell>
          <table:table-cell table:style-name="Table15.A1" office:value-type="string">
            <text:p text:style-name="P127">$1,300 – $1,500</text:p>
          </table:table-cell>
        </table:table-row>
        <table:table-row>
          <table:table-cell table:style-name="Table15.A1" office:value-type="string">
            <text:p text:style-name="P66"><text:span text:style-name="Strong_20_Emphasis"><text:span text:style-name="T320">System Memory (RAM)</text:span></text:span></text:p>
          </table:table-cell>
          <table:table-cell table:style-name="Table15.A1" office:value-type="string">
            <text:p text:style-name="P66"><text:span text:style-name="Strong_20_Emphasis"><text:span text:style-name="T320">128GB to 256GB DDR5 ECC</text:span></text:span><text:span text:style-name="T321"> (4x 32GB or 4x 64GB Multi-Channel Kits)</text:span></text:p>
          </table:table-cell>
          <table:table-cell table:style-name="Table15.A1" office:value-type="string">
            <text:p text:style-name="P127">Houses the runtime footprint of the vector database (e.g., Qdrant, Milvus) and provides a secure memory buffer for processing massive archive batch imports. Error-Correcting Code (ECC) RAM prevents memory leaks and bit-flips during multi-day background indexing tasks.</text:p>
          </table:table-cell>
          <table:table-cell table:style-name="Table15.A1" office:value-type="string">
            <text:p text:style-name="P127">$600 – $1,000</text:p>
          </table:table-cell>
        </table:table-row>
        <table:table-row>
          <table:table-cell table:style-name="Table15.A1" office:value-type="string">
            <text:p text:style-name="P66"><text:span text:style-name="Strong_20_Emphasis"><text:span text:style-name="T320">Storage (SSD)</text:span></text:span></text:p>
          </table:table-cell>
          <table:table-cell table:style-name="Table15.A1" office:value-type="string">
            <text:p text:style-name="P66"><text:span text:style-name="Strong_20_Emphasis"><text:span text:style-name="T320">4TB NVMe M.2 SSD</text:span></text:span><text:span text:style-name="T321">(PCIe Gen 5, e.g., Crucial T700 or Samsung PRO series)</text:span></text:p>
          </table:table-cell>
          <table:table-cell table:style-name="Table15.A1" office:value-type="string">
            <text:p text:style-name="P67"><text:span text:style-name="T321">Yields high-speed read/write performance (&gt;12,000 MB/s). Essential for instantaneous </text:span><text:span text:style-name="Strong_20_Emphasis"><text:span text:style-name="T320">zero-copy memory mapping (</text:span></text:span><text:span text:style-name="Strong_20_Emphasis"><text:span text:style-name="Source_20_Text"><text:span text:style-name="T320">mmap</text:span></text:span></text:span><text:span text:style-name="Strong_20_Emphasis"><text:span text:style-name="T320">)</text:span></text:span><text:span text:style-name="T321"> of multiple GGUF files and quick structural queries into the local vector index.</text:span></text:p>
          </table:table-cell>
          <table:table-cell table:style-name="Table15.A1" office:value-type="string">
            <text:p text:style-name="P127">$350 – $500</text:p>
          </table:table-cell>
        </table:table-row>
        <table:table-row>
          <table:table-cell table:style-name="Table15.A1" office:value-type="string">
            <text:p text:style-name="P66"><text:span text:style-name="Strong_20_Emphasis"><text:span text:style-name="T320">Motherboard &amp; Power</text:span></text:span></text:p>
          </table:table-cell>
          <table:table-cell table:style-name="Table15.A1" office:value-type="string">
            <text:p text:style-name="P66"><text:span text:style-name="T321">Workstation Motherboard (WRX90 / PCIe Gen 5 x16/x16 split) + </text:span><text:span text:style-name="Strong_20_Emphasis"><text:span text:style-name="T320">1600W 80+ Titanium PSU</text:span></text:span></text:p>
          </table:table-cell>
          <table:table-cell table:style-name="Table15.A1" office:value-type="string">
            <text:p text:style-name="P127">Requires native physical spacing and dual x16 lane routing to prevent GPU bottlenecking. The industrial-grade power supply unit guarantees continuous power stability under heavy, concurrent processing loads.</text:p>
          </table:table-cell>
          <table:table-cell table:style-name="Table15.A1" office:value-type="string">
            <text:p text:style-name="P127">$800 – $1,100</text:p>
          </table:table-cell>
        </table:table-row>
        <table:table-row>
          <table:table-cell table:style-name="Table15.A1" office:value-type="string">
            <text:p text:style-name="P66"><text:span text:style-name="Strong_20_Emphasis"><text:span text:style-name="T320">Cooling &amp; Chassis</text:span></text:span></text:p>
          </table:table-cell>
          <table:table-cell table:style-name="Table15.A1" office:value-type="string">
            <text:p text:style-name="P127">High-Airflow E-ATX Workstation Case + Premium Liquid/Air Cooling Systems</text:p>
          </table:table-cell>
          <table:table-cell table:style-name="Table15.A1" office:value-type="string">
            <text:p text:style-name="P127">AI inference generates intense thermal output over prolonged periods. High-static pressure fans prevent hardware throttling, ensuring deterministic system speeds during heavy usage sessions.</text:p>
          </table:table-cell>
          <table:table-cell table:style-name="Table15.A1" office:value-type="string">
            <text:p text:style-name="P127">$300 – $500</text:p>
          </table:table-cell>
        </table:table-row>
        <table:table-row>
          <table:table-cell table:style-name="Table15.A1" office:value-type="string">
            <text:p text:style-name="P66"><text:span text:style-name="Strong_20_Emphasis"><text:span text:style-name="T320">Total Estimated Capital Expense</text:span></text:span></text:p>
          </table:table-cell>
          <table:table-cell table:style-name="Table15.A1" office:value-type="string">
            <text:p text:style-name="P27"/>
          </table:table-cell>
          <table:table-cell table:style-name="Table15.A1" office:value-type="string">
            <text:p text:style-name="P66"><text:span text:style-name="Strong_20_Emphasis"><text:span text:style-name="T320">Enterprise-grade on-premise infrastructure safely under budget limits.</text:span></text:span></text:p>
          </table:table-cell>
          <table:table-cell table:style-name="Table15.A1" office:value-type="string">
            <text:p text:style-name="P66"><text:span text:style-name="Strong_20_Emphasis"><text:span text:style-name="T320">$7,350 – $9,200</text:span></text:span></text:p>
          </table:table-cell>
        </table:table-row>
      </table:table>
      <text:p text:style-name="P126"><text:span text:style-name="Strong_20_Emphasis"><text:span text:style-name="T83"/></text:span></text:p>
      <text:p text:style-name="P101"><text:span text:style-name="Strong_20_Emphasis"><text:span text:style-name="T83">T</text:span></text:span><text:span text:style-name="Strong_20_Emphasis"><text:span text:style-name="T82">his specification allows the institution to host a large-scale, quantized 70B parameter model (such as Llama 3 70B or Qwen 3 70B) natively alongside an embedding mode</text:span></text:span><text:span text:style-name="Strong_20_Emphasis"><text:span text:style-name="T83">l.</text:span></text:span></text:p>
      <text:p text:style-name="P101"><text:span text:style-name="Strong_20_Emphasis"><text:span text:style-name="T180"/></text:span></text:p>
      <text:p text:style-name="P101"><text:span text:style-name="Strong_20_Emphasis"><text:span text:style-name="T134">Form Factor:</text:span></text:span><text:span text:style-name="Strong_20_Emphasis"><text:span text:style-name="T82"> Housed in a standard standalone tower or a compact 4U rackmount chassis, avoiding the need for dedicated data-center space rental.</text:span></text:span></text:p>
      <text:p text:style-name="P101"><text:span text:style-name="Strong_20_Emphasis"><text:span text:style-name="T180"/></text:span></text:p>
      <text:p text:style-name="P101"><text:span text:style-name="Strong_20_Emphasis"><text:span text:style-name="T180"/></text:span></text:p>
      <text:p text:style-name="P101"><text:span text:style-name="Strong_20_Emphasis"><text:span text:style-name="T180"/></text:span></text:p>
      <text:p text:style-name="P101"><text:span text:style-name="Strong_20_Emphasis"><text:span text:style-name="T180"/></text:span></text:p>
      <text:h text:style-name="P134" text:outline-level="3" text:is-list-header="true"><text:soft-page-break/>What <text:span text:style-name="T327">Contemporary Hardware</text:span> Means for Information Retrieval</text:h>
      <text:p text:style-name="Standard"><text:span text:style-name="T41">The most dramatic difference isn't raw speed — it's </text:span><text:span text:style-name="Strong_20_Emphasis"><text:span text:style-name="T41">random I/O latency and IOPS</text:span></text:span><text:span text:style-name="T41">, which is exactly what database queries and information retrieval hammers hardest.</text:span></text:p>
      <text:p text:style-name="Standard"><text:span text:style-name="T41"/></text:p>
      <text:list text:style-name="L10">
        <text:list-item>
          <text:p text:style-name="P239"><text:span text:style-name="T99">A </text:span><text:span text:style-name="Strong_20_Emphasis"><text:span text:style-name="T99">full-table scan </text:span></text:span><text:span text:style-name="T99">that took 10 minutes on a 90s SCSI array takes </text:span><text:span text:style-name="Strong_20_Emphasis"><text:span text:style-name="T99">seconds </text:span></text:span><text:span text:style-name="T99">on NVMe</text:span></text:p>
        </text:list-item>
        <text:list-item>
          <text:p text:style-name="P239"><text:span text:style-name="T99">A </text:span><text:span text:style-name="Strong_20_Emphasis"><text:span text:style-name="T99">database query </text:span></text:span><text:span text:style-name="T99">requiring 10,000 random disk reads: 90s machine takes </text:span><text:span text:style-name="Strong_20_Emphasis"><text:span text:style-name="T99">80–120 seconds </text:span></text:span><text:span text:style-name="T99">just in I/O wait; modern NVMe does it in </text:span><text:span text:style-name="Strong_20_Emphasis"><text:span text:style-name="T99">~10–50 milliseconds</text:span></text:span></text:p>
        </text:list-item>
        <text:list-item>
          <text:p text:style-name="P239"><text:span text:style-name="T99">The entire </text:span><text:span text:style-name="Strong_20_Emphasis"><text:span text:style-name="T99">working dataset </text:span></text:span><text:span text:style-name="T99">that required careful buffer pool management in the 90s (because RAM was scarce) now </text:span><text:span text:style-name="Strong_20_Emphasis"><text:span text:style-name="T99">fits entirely in RAM </text:span></text:span><text:span text:style-name="T99">on a modern system — eliminating disk I/O almost entirely for hot data</text:span></text:p>
        </text:list-item>
        <text:list-item>
          <text:p text:style-name="P239"><text:span text:style-name="T99">Memory bandwidth improvements mean </text:span><text:span text:style-name="Strong_20_Emphasis"><text:span text:style-name="T99">in-memory analytics </text:span></text:span><text:span text:style-name="T99">(columnar stores, etc.) can process data ~750× faster even if latency is similar</text:span></text:p>
        </text:list-item>
      </text:list>
      <text:list text:style-name="L11">
        <text:list-header>
          <text:p text:style-name="P240"><text:span text:style-name="T99"/></text:p>
        </text:list-header>
      </text:list>
      <text:p text:style-name="P94"><text:span text:style-name="T41">The 90s DBAs spent enormous effort on </text:span><text:span text:style-name="Strong_20_Emphasis"><text:span text:style-name="T41">I/O optimization</text:span></text:span><text:span text:style-name="T41">— index tuning, careful buffer management, disk striping — precisely because every random read cost 10ms. On modern hardware, that same problem is largely dissolved. The bottleneck has moved entirely to CPU cache and memory access patterns.</text:span></text:p>
      <text:p text:style-name="P94"><text:span text:style-name="T52">What this means is that algorithms like the inverted index are obsolete! Their historical advantage (accepting their </text:span><text:span text:style-name="T50">signi</text:span><text:span text:style-name="T51">f</text:span><text:span text:style-name="T50">icant</text:span><text:span text:style-name="T52"> limitations) makes no sense in 2026.</text:span></text:p>
      <text:p text:style-name="Standard"><text:span text:style-name="T99">The inverted index was an </text:span><text:span text:style-name="Strong_20_Emphasis"><text:span text:style-name="T99">engineering response to hardware constraints</text:span></text:span><text:span text:style-name="T99">, not an ideal data structure:</text:span></text:p>
      <text:list text:style-name="L12">
        <text:list-item>
          <text:p text:style-name="P241"><text:span text:style-name="T99">Disk was </text:span><text:span text:style-name="Strong_20_Emphasis"><text:span text:style-name="T99">slow and expensive</text:span></text:span><text:span text:style-name="T99">— you couldn't afford to scan raw text</text:span></text:p>
        </text:list-item>
        <text:list-item>
          <text:p text:style-name="P241"><text:span text:style-name="T99">RAM was </text:span><text:span text:style-name="Strong_20_Emphasis"><text:span text:style-name="T99">tiny</text:span></text:span><text:span text:style-name="T99">— you couldn't hold documents in memory</text:span></text:p>
        </text:list-item>
        <text:list-item>
          <text:p text:style-name="P241"><text:span text:style-name="T99">IOPS were </text:span><text:span text:style-name="Strong_20_Emphasis"><text:span text:style-name="T99">precious</text:span></text:span><text:span text:style-name="T99">— every random read cost 10–12ms</text:span></text:p>
        </text:list-item>
        <text:list-item>
          <text:p text:style-name="P241"><text:span text:style-name="T99">So you precomputed posting lists to </text:span><text:span text:style-name="Strong_20_Emphasis"><text:span text:style-name="T99">minimize disk seeks at query time</text:span></text:span></text:p>
        </text:list-item>
      </text:list>
      <text:p text:style-name="Standard"><text:span text:style-name="T99">The entire architecture <text:s/></text:span><text:span text:style-name="T102">mantra </text:span><text:span text:style-name="T99">of Lucene, early Google, and </text:span><text:span text:style-name="T100">most</text:span><text:span text:style-name="T99"> 1990s IR system</text:span><text:span text:style-name="T100">s was</text:span><text:span text:style-name="T99"> essentially: </text:span><text:span text:style-name="Emphasis"><text:span text:style-name="T99">"</text:span></text:span><text:span text:style-name="Emphasis"><text:span text:style-name="T119">disk is our enemy, precompute everything possible to avoid touching it.</text:span></text:span><text:span text:style-name="Emphasis"><text:span text:style-name="T99">"</text:span></text:span></text:p>
      <text:p text:style-name="Standard"><text:span text:style-name="Emphasis"><text:span text:style-name="T101"/></text:span></text:p>
      <text:p text:style-name="Standard"><text:span text:style-name="T71">Patricia Trees and Pat Arrays Fell Out of Favor in the 1990s because of </text:span><text:span text:style-name="Strong_20_Emphasis"><text:span text:style-name="T68">hardware</text:span></text:span><text:span text:style-name="T68">:</text:span></text:p>
      <text:list text:style-name="L13">
        <text:list-item>
          <text:p text:style-name="P242"><text:span text:style-name="Strong_20_Emphasis"><text:span text:style-name="T68">Pointer chasing is catastrophically cache-unfriendly</text:span></text:span><text:span text:style-name="T68">— every node traversal is a potential cache miss</text:span></text:p>
        </text:list-item>
        <text:list-item>
          <text:p text:style-name="P242"><text:span text:style-name="T68">On 1990s hardware, a cache miss meant going to main memory at </text:span><text:span text:style-name="Strong_20_Emphasis"><text:span text:style-name="T68">60–80ns</text:span></text:span><text:span text:style-name="T68">, and with tiny caches (L1 was 8–16KB) misses were constant</text:span></text:p>
        </text:list-item>
        <text:list-item>
          <text:p text:style-name="P242"><text:span text:style-name="T68">The inverted index, despite its bulk, had </text:span><text:span text:style-name="Strong_20_Emphasis"><text:span text:style-name="T68">more predictable, sequential access patterns </text:span></text:span><text:span text:style-name="T68">that could be optimized with careful disk layout</text:span></text:p>
        </text:list-item>
        <text:list-item>
          <text:p text:style-name="P242"><text:span text:style-name="T68">Patricia trees also consumed significant RAM for pointers — precious in an era of </text:span><text:span text:style-name="Strong_20_Emphasis"><text:span text:style-name="T68">$50,000/GB </text:span></text:span><text:span text:style-name="T68">RAM</text:span></text:p>
        </text:list-item>
        <text:list-item>
          <text:p text:style-name="P242"><text:span text:style-name="Strong_20_Emphasis"><text:span text:style-name="T68">Worst case pointer density</text:span></text:span><text:span text:style-name="T68">: a tree over a million terms might have millions of pointer pairs, each potentially a cache miss during traversal</text:span></text:p>
        </text:list-item>
      </text:list>
      <text:p text:style-name="Standard"><text:span text:style-name="T68"/></text:p>
      <text:p text:style-name="Standard"><text:span text:style-name="T68">So Patricia trees were theoretically elegant but </text:span><text:span text:style-name="Strong_20_Emphasis"><text:span text:style-name="T68">practically punished by memory hierarchies </text:span></text:span><text:span text:style-name="T68">of the era.</text:span></text:p>
      <text:p text:style-name="P18"/>
      <text:h text:style-name="P136" text:outline-level="3" text:is-list-header="true">Cache hierarchies have transformed <text:span text:style-name="T267">things</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che</text:p>
            </table:table-cell>
            <table:table-cell table:style-name="Table4.A1" office:value-type="string">
              <text:p text:style-name="Table_20_Heading">1995 Size</text:p>
            </table:table-cell>
            <table:table-cell table:style-name="Table4.A1" office:value-type="string">
              <text:p text:style-name="Table_20_Heading">2026 Size</text:p>
            </table:table-cell>
            <table:table-cell table:style-name="Table4.A1" office:value-type="string">
              <text:p text:style-name="Table_20_Heading">Improvement</text:p>
            </table:table-cell>
          </table:table-row>
        </table:table-header-rows>
        <table:table-row>
          <table:table-cell table:style-name="Table4.A1" office:value-type="string">
            <text:p text:style-name="Table_20_Contents">L1</text:p>
          </table:table-cell>
          <table:table-cell table:style-name="Table4.A1" office:value-type="string">
            <text:p text:style-name="Table_20_Contents">8–16 KB</text:p>
          </table:table-cell>
          <table:table-cell table:style-name="Table4.A1" office:value-type="string">
            <text:p text:style-name="Table_20_Contents">32–64 KB</text:p>
          </table:table-cell>
          <table:table-cell table:style-name="Table4.A1" office:value-type="string">
            <text:p text:style-name="Table_20_Contents">~4×</text:p>
          </table:table-cell>
        </table:table-row>
        <table:table-row>
          <table:table-cell table:style-name="Table4.A1" office:value-type="string">
            <text:p text:style-name="Table_20_Contents">L2</text:p>
          </table:table-cell>
          <table:table-cell table:style-name="Table4.A1" office:value-type="string">
            <text:p text:style-name="Table_20_Contents">256 KB (rare)</text:p>
          </table:table-cell>
          <table:table-cell table:style-name="Table4.A1" office:value-type="string">
            <text:p text:style-name="Table_20_Contents">512 KB–1 MB per core</text:p>
          </table:table-cell>
          <table:table-cell table:style-name="Table4.A1" office:value-type="string">
            <text:p text:style-name="Table_20_Contents">~4–8×</text:p>
          </table:table-cell>
        </table:table-row>
        <table:table-row>
          <table:table-cell table:style-name="Table4.A1" office:value-type="string">
            <text:p text:style-name="Table_20_Contents">L3</text:p>
          </table:table-cell>
          <table:table-cell table:style-name="Table4.A1" office:value-type="string">
            <text:p text:style-name="Table_20_Contents">Nonexistent/tiny</text:p>
          </table:table-cell>
          <table:table-cell table:style-name="Table4.A1" office:value-type="string">
            <text:p text:style-name="Table_20_Contents">64–256 MB (Threadripper)</text:p>
          </table:table-cell>
          <table:table-cell table:style-name="Table4.A1" office:value-type="string">
            <text:p text:style-name="Table_20_Contents">∞ → huge</text:p>
          </table:table-cell>
        </table:table-row>
        <table:table-row>
          <table:table-cell table:style-name="Table4.A1" office:value-type="string">
            <text:p text:style-name="Table_20_Contents">RAM</text:p>
          </table:table-cell>
          <table:table-cell table:style-name="Table4.A1" office:value-type="string">
            <text:p text:style-name="Table_20_Contents">256MB–4GB</text:p>
          </table:table-cell>
          <table:table-cell table:style-name="Table4.A1" office:value-type="string">
            <text:p text:style-name="Table_20_Contents">128GB–2TB</text:p>
          </table:table-cell>
          <table:table-cell table:style-name="Table4.A1" office:value-type="string">
            <text:p text:style-name="Table_20_Contents">~500×</text:p>
          </table:table-cell>
        </table:table-row>
      </table:table>
      <text:p text:style-name="P20"/>
      <text:p text:style-name="Standard"><text:span text:style-name="T99">A Patricia tree over a </text:span><text:span text:style-name="Strong_20_Emphasis"><text:span text:style-name="T99">large IR vocabulary </text:span></text:span><text:span text:style-name="T99">(~1–10 million terms) occupies perhaps </text:span><text:span text:style-name="Strong_20_Emphasis"><text:span text:style-name="T99">500MB–2GB</text:span></text:span><text:span text:style-name="T99"> of RAM. </text:span><text:soft-page-break/><text:span text:style-name="T99">On a modern system this fits </text:span><text:span text:style-name="Strong_20_Emphasis"><text:span text:style-name="T99">entirely in L3 cache </text:span></text:span><text:span text:style-name="T99">on high-end CPUs, or at worst in RAM with DDR5's enormous bandwidth.</text:span></text:p>
      <text:p text:style-name="P34"><text:span text:style-name="T41"/></text:p>
      <text:p text:style-name="Standard"><text:span text:style-name="T99">When the whole tree lives in L3, pointer chasing is no longer going to slow DRAM — it's hitting </text:span><text:span text:style-name="Strong_20_Emphasis"><text:span text:style-name="T99">~10 cycle L3 latency </text:span></text:span><text:span text:style-name="T99">vs the ~200 cycle DRAM penalty that killed Patricia trees in the 1990s.</text:span></text:p>
      <text:p text:style-name="P34"><text:span text:style-name="T41"/></text:p>
      <text:p text:style-name="Standard"><text:span text:style-name="T99"/></text:p>
      <text:p text:style-name="Standard"><text:span text:style-name="T99"/></text:p>
      <table:table table:name="Table5" table:style-name="Table5">
        <table:table-column table:style-name="Table5.A"/>
        <table:table-column table:style-name="Table5.B"/>
        <table:table-row>
          <table:table-cell table:style-name="Table5.A1" office:value-type="string">
            <text:p text:style-name="P43">PAT Array Problem (1992)</text:p>
          </table:table-cell>
          <table:table-cell table:style-name="Table5.A1" office:value-type="string">
            <text:p text:style-name="P43">2026 Solution</text:p>
          </table:table-cell>
        </table:table-row>
        <table:table-row>
          <table:table-cell table:style-name="Table5.A1" office:value-type="string">
            <text:p text:style-name="P42">Index too large for RAM</text:p>
          </table:table-cell>
          <table:table-cell table:style-name="Table5.A1" office:value-type="string">
            <text:p text:style-name="P42">128GB–2TB RAM — fits comfortably</text:p>
          </table:table-cell>
        </table:table-row>
        <table:table-row>
          <table:table-cell table:style-name="Table5.A1" office:value-type="string">
            <text:p text:style-name="P42">O(log n) random accesses slow</text:p>
          </table:table-cell>
          <table:table-cell table:style-name="Table5.A1" office:value-type="string">
            <text:p text:style-name="P42">DDR5 random access ~75ns, L3 ~10ns — negligible</text:p>
          </table:table-cell>
        </table:table-row>
        <table:table-row>
          <table:table-cell table:style-name="Table5.A1" office:value-type="string">
            <text:p text:style-name="P42">Construction too slow</text:p>
          </table:table-cell>
          <table:table-cell table:style-name="Table5.A1" office:value-type="string">
            <text:p text:style-name="P42">Modern O(n) suffix array construction (SA-IS algorithm) + fast CPUs</text:p>
          </table:table-cell>
        </table:table-row>
        <table:table-row>
          <table:table-cell table:style-name="Table5.A1" office:value-type="string">
            <text:p text:style-name="P42">Binary search cache-unfriendly</text:p>
          </table:table-cell>
          <table:table-cell table:style-name="Table5.A1" office:value-type="string">
            <text:p text:style-name="P42">Entire index in L3/RAM — cache misses collapse</text:p>
          </table:table-cell>
        </table:table-row>
        <table:table-row>
          <table:table-cell table:style-name="Table5.A1" office:value-type="string">
            <text:p text:style-name="P42">No word-level ranking (BM25 etc.)</text:p>
          </table:table-cell>
          <table:table-cell table:style-name="Table5.A1" office:value-type="string">
            <text:p text:style-name="P42">Can layer neural/embedding ranking on top</text:p>
          </table:table-cell>
        </table:table-row>
      </table:table>
      <text:p text:style-name="P99"><text:span text:style-name="T99"/></text:p>
      <text:p text:style-name="P109"><text:span text:style-name="T68">Our indexing architecture builds on ideas related to </text:span><text:span text:style-name="Strong_20_Emphasis"><text:span text:style-name="T68">Patricia trees </text:span></text:span><text:span text:style-name="T68">and </text:span><text:span text:style-name="Strong_20_Emphasis"><text:span text:style-name="T68">Pat arrays</text:span></text:span><text:span text:style-name="T68">, but extends them to address the I/O and scalability constraints that have historically limited their use in large-scale information retrieval. A Patricia tree provides an efficient compressed trie structure for prefix searches, but it requires pointer-heavy navigation and does not map well to modern memory-mapped storage or high-throughput disk access. Pat arrays, by contrast, store lexicographically ordered suffix or term references in contiguous arrays, improving locality but traditionally requiring the underlying corpus text to be stored alongside the index and incurring expensive disk reads during lookup. Our approach separates corpus storage from the index while maintaining compact address</text:span><text:span text:style-name="T81">es. </text:span></text:p>
      <text:p text:style-name="P109"><text:span text:style-name="T81"/></text:p>
      <text:h text:style-name="P135" text:outline-level="3" text:is-list-header="true"><text:span text:style-name="T303">C</text:span>aching Strategy <text:span text:style-name="T313">based on Word Length Distribution</text:span></text:h>
      <text:p text:style-name="P26"><text:span text:style-name="T59">I</text:span><text:span text:style-name="T188">nformation Efficiency</text:span><text:span text:style-name="T190">: Human communication is optimized for speed. According to </text:span><text:span text:style-name="T189">Zipf's Law of Abbreviation</text:span><text:span text:style-name="T190">, the words we repeat most frequently are compressed by evolution into the shortest possible forms</text:span></text:p>
      <text:p text:style-name="P26"><text:span text:style-name="T190"/></text:p>
      <text:p text:style-name="P18" loext:marker-style-name="T304"><text:span text:style-name="T189">Distinct Words (Types)</text:span><text:span text:style-name="T306"> follow a </text:span><text:span text:style-name="T307">unimodal distribution</text:span><text:span text:style-name="T306"> (a hump-shaped curve). The vast majority of dictionary words are moderately long (typically 6–9 characters in English) because a language needs permutations of letters to create a unique vocabulary. Very short words are rare because there are only so many combinations you can make with 1 to 3 letters</text:span></text:p>
      <text:p text:style-name="P243" loext:marker-style-name="T304"/>
      <text:p text:style-name="P25"><text:span text:style-name="T307">Words in Use (Tokens)</text:span><text:span text:style-name="T306"> follow a </text:span><text:span text:style-name="T307">monotonic decrease or highly right-skewed distribution</text:span><text:span text:style-name="T306">. When analyzing a real book or corpus, massive frequency is dominated by short grammatical words ("the", "of", "and", "to"). This causes a huge spike at lengths 2–4, dropping sharply as words get longer. </text:span></text:p>
      <text:p text:style-name="P244" loext:marker-style-name="T304"/>
      <text:p text:style-name="P108" loext:marker-style-name="T304"><text:span text:style-name="T192">Grammar vs. Content</text:span><text:span text:style-name="T193">: Short words (2–4 letters) act as structural or grammatical "bridges" (e.g., pronouns, prepositions, articles). We reuse them constantly in every sentence, whereas long words (8+ letters) carry specific technical or descriptive content and are only used when strictly necessary</text:span></text:p>
      <text:p text:style-name="P108"/>
      <text:p text:style-name="P108"><draw:frame draw:style-name="fr2" draw:name="Image21" text:anchor-type="char" svg:width="6.6929in" svg:height="3.6445in" draw:z-index="20"><draw:image xlink:href="Pictures/10000001000005CA0000032781D97E02.png" xlink:type="simple" xlink:show="embed" xlink:actuate="onLoad" draw:mime-type="image/png"/></draw:frame><text:soft-page-break/>Our 2-tier cache, <text:span text:style-name="T285">originally introduced in our proprietary fork,</text:span> allows the advantages of the separate corpus but removes <text:span text:style-name="T268">the</text:span> need <text:span text:style-name="T268">to read it </text:span>for words less than some pre-set <text:span text:style-name="T274">prefix</text:span> length. </text:p>
      <text:p text:style-name="P73"/>
      <text:p text:style-name="P73">This works remarkably well especially in English </text:p>
      <text:list text:style-name="L14">
        <text:list-item>
          <text:p text:style-name="P246">1–7 letters: ~82.97%</text:p>
        </text:list-item>
        <text:list-item>
          <text:p text:style-name="P246">8–10 letters: ~13.46%</text:p>
        </text:list-item>
        <text:list-item>
          <text:p text:style-name="P246">11–14 letters: ~3.46%</text:p>
        </text:list-item>
        <text:list-item>
          <text:p text:style-name="P246">15 letters: ~0.076%</text:p>
        </text:list-item>
        <text:list-item>
          <text:p text:style-name="P246">≥16 letters: ~0.034% combined</text:p>
        </text:list-item>
      </text:list>
      <text:p text:style-name="P108"><text:span text:style-name="Strong_20_Emphasis"><text:span text:style-name="T98">≈ </text:span></text:span><text:span text:style-name="Strong_20_Emphasis"><text:span text:style-name="T115">99.9% of words are under 15 characters long </text:span></text:span><text:span text:style-name="Strong_20_Emphasis"><text:span text:style-name="T103">i</text:span></text:span><text:span text:style-name="T99">n typical English text. </text:span><text:span text:style-name="T116">10 characters or less:</text:span><text:span text:style-name="T103"> </text:span><text:span text:style-name="T72">~</text:span><text:span text:style-name="Strong_20_Emphasis"><text:span text:style-name="T95">96.4%. </text:span></text:span><text:span text:style-name="Strong_20_Emphasis"><text:span text:style-name="T72">A </text:span></text:span><text:span text:style-name="Strong_20_Emphasis"><text:span text:style-name="T74">1</text:span></text:span><text:span text:style-name="Strong_20_Emphasis"><text:span text:style-name="T72">0-character prefix is long enough that collisions are uncommon, so the resulting count will be</text:span></text:span><text:span text:style-name="Strong_20_Emphasis"><text:span text:style-name="T76"> </text:span></text:span><text:span text:style-name="Strong_20_Emphasis"><text:span text:style-name="T72">close to the original dictionary size.</text:span></text:span></text:p>
      <text:p text:style-name="Standard"><text:span text:style-name="T72"/></text:p>
      <text:p text:style-name="Standard"><text:span text:style-name="T72">So even with a length set to 10, 96% or all words </text:span><text:span text:style-name="T73">won’t</text:span><text:span text:style-name="T72"> demand a corpus lookup. This cache is also relatively small since it would require only 26 byte</text:span><text:span text:style-name="T80">s</text:span><text:span text:style-name="T72"> per unique word (for 64-bit indexes). </text:span></text:p>
      <text:p text:style-name="Standard"><text:span text:style-name="T53"/></text:p>
      <table:table table:name="Table6" table:style-name="Table6">
        <table:table-column table:style-name="Table6.A"/>
        <table:table-column table:style-name="Table6.B"/>
        <table:table-header-rows>
          <table:table-row>
            <table:table-cell table:style-name="Table6.A1" office:value-type="string">
              <text:p text:style-name="Table_20_Heading">Source</text:p>
            </table:table-cell>
            <table:table-cell table:style-name="Table6.A1" office:value-type="string">
              <text:p text:style-name="Table_20_Heading">Count</text:p>
            </table:table-cell>
          </table:table-row>
        </table:table-header-rows>
        <table:table-row>
          <table:table-cell table:style-name="Table6.A1" office:value-type="string">
            <text:p text:style-name="Table_20_Contents">Words ≤10 chars</text:p>
          </table:table-cell>
          <table:table-cell table:style-name="Table6.A1" office:value-type="string">
            <text:p text:style-name="Table_20_Contents">~118k</text:p>
          </table:table-cell>
        </table:table-row>
        <table:table-row>
          <table:table-cell table:style-name="Table6.A1" office:value-type="string">
            <text:p text:style-name="Table_20_Contents">Unique prefixes from longer words</text:p>
          </table:table-cell>
          <table:table-cell table:style-name="Table6.A1" office:value-type="string">
            <text:p text:style-name="Table_20_Contents">~44k</text:p>
          </table:table-cell>
        </table:table-row>
        <table:table-row>
          <table:table-cell table:style-name="Table6.A1" office:value-type="string">
            <text:p text:style-name="Table_20_Contents"><text:span text:style-name="Strong_20_Emphasis">Total unique entries</text:span></text:p>
          </table:table-cell>
          <table:table-cell table:style-name="Table6.A1" office:value-type="string">
            <text:p text:style-name="Table_20_Contents"><text:span text:style-name="Strong_20_Emphasis">~162k</text:span></text:p>
          </table:table-cell>
        </table:table-row>
      </table:table>
      <text:p text:style-name="Standard"><text:soft-page-break/><text:span text:style-name="T53"/></text:p>
      <text:p text:style-name="Standard"><text:span text:style-name="Strong_20_Emphasis"><text:span text:style-name="T113">≈</text:span></text:span><text:span text:style-name="Strong_20_Emphasis"><text:span text:style-name="T104">150,000 – 170,000 </text:span></text:span><text:span text:style-name="Strong_20_Emphasis"><text:span text:style-name="T105">max </text:span></text:span><text:span text:style-name="Strong_20_Emphasis"><text:span text:style-name="T104">unique entries </text:span></text:span><text:span text:style-name="Strong_20_Emphasis"><text:span text:style-name="T105">so we can </text:span></text:span><text:span text:style-name="T53">safely assume that the maximum size </text:span><text:span text:style-name="T54">of the</text:span><text:span text:style-name="T53"> cache will be under 4.</text:span><text:span text:style-name="T54">5 </text:span><text:span text:style-name="T53">MB. </text:span></text:p>
      <text:p text:style-name="Standard"><text:span text:style-name="T53"/></text:p>
      <text:p text:style-name="Standard"><text:span text:style-name="T73"/></text:p>
      <text:p text:style-name="Standard"><draw:frame draw:style-name="fr2" draw:name="Image22" text:anchor-type="char" svg:width="6.6929in" svg:height="3.6398in" draw:z-index="21"><draw:image xlink:href="Pictures/10000001000005CA00000326B69632D9.png" xlink:type="simple" xlink:show="embed" xlink:actuate="onLoad" draw:mime-type="image/png"/></draw:frame><text:span text:style-name="T73"/></text:p>
      <text:p text:style-name="Standard"><text:span text:style-name="T73"/></text:p>
      <text:p text:style-name="Standard"><text:span text:style-name="T73">German behaves very differently from English because of </text:span><text:span text:style-name="Strong_20_Emphasis"><text:span text:style-name="T73">productive compounding </text:span></text:span><text:span text:style-name="T73">(e.g., </text:span><text:span text:style-name="Emphasis"><text:span text:style-name="T96">Krankenhausverwaltungsgesetz</text:span></text:span><text:span text:style-name="T73">). So truncating to </text:span><text:span text:style-name="Strong_20_Emphasis"><text:span text:style-name="T73">10 characters </text:span></text:span><text:span text:style-name="T73">collapses many more words.</text:span></text:p>
      <text:p text:style-name="Standard"><text:span text:style-name="T73"/></text:p>
      <table:table table:name="Table7" table:style-name="Table7">
        <table:table-column table:style-name="Table7.A"/>
        <table:table-column table:style-name="Table7.B"/>
        <table:table-header-rows>
          <table:table-row>
            <table:table-cell table:style-name="Table7.A1" office:value-type="string">
              <text:p text:style-name="Table_20_Heading">Length</text:p>
            </table:table-cell>
            <table:table-cell table:style-name="Table7.A1" office:value-type="string">
              <text:p text:style-name="Table_20_Heading">Approx. share</text:p>
            </table:table-cell>
          </table:table-row>
        </table:table-header-rows>
      </table:table>
      <table:table table:name="Table8" table:style-name="Table8">
        <table:table-column table:style-name="Table8.A"/>
        <table:table-column table:style-name="Table8.B"/>
        <table:table-row>
          <table:table-cell table:style-name="Table8.A1" office:value-type="string">
            <text:p text:style-name="Table_20_Contents">≤10 letters</text:p>
          </table:table-cell>
          <table:table-cell table:style-name="Table8.A1" office:value-type="string">
            <text:p text:style-name="Table_20_Contents">~40–50%</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11–15 letters</text:p>
          </table:table-cell>
          <table:table-cell table:style-name="Table9.A1" office:value-type="string">
            <text:p text:style-name="Table_20_Contents">~30–35%</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16+ letters</text:p>
          </table:table-cell>
          <table:table-cell table:style-name="Table10.A1" office:value-type="string">
            <text:p text:style-name="Table_20_Contents">~20–30%</text:p>
          </table:table-cell>
        </table:table-row>
      </table:table>
      <text:p text:style-name="Standard"><text:span text:style-name="T73"/></text:p>
      <text:p text:style-name="P18" loext:marker-style-name="T304"><text:span text:style-name="T191">Expanding this analysis across </text:span><text:span text:style-name="T307">three different language families</text:span><text:span text:style-name="T306"> (Germanic, Romance, and Slavic) reveals clear patterns in how grammatical structures dictate token word length.</text:span></text:p>
      <text:p text:style-name="P243" loext:marker-style-name="T304"/>
      <text:p text:style-name="P18" loext:marker-style-name="T304"><text:span text:style-name="T306">Comparative Insights by Language Family</text:span><text:span text:style-name="T306"/></text:p>
      <text:list text:style-name="WWNum1">
        <text:list-item>
          <text:p text:style-name="P163" loext:marker-style-name="T305"><text:span text:style-name="T307">The Romance Family (French, Spanish, Italian)</text:span><text:span text:style-name="T306">: These three closely mirror each other. They behave like English with a strong peak around </text:span><text:span text:style-name="T307">3 to 4 characters</text:span><text:span text:style-name="T306">, heavily driven by shared grammatical features like short articles (</text:span><text:span text:style-name="T310">el, la, le, les, il, i</text:span><text:span text:style-name="T311">), prepositions (</text:span><text:span text:style-name="T310">de, di, en</text:span><text:span text:style-name="T311">), and conjunctions (</text:span><text:span text:style-name="T310">y, et, e</text:span><text:span text:style-name="T311">).</text:span></text:p>
        </text:list-item>
        <text:list-item>
          <text:p text:style-name="P163" loext:marker-style-name="T305"><text:span text:style-name="T312">The Slavic Family (Polish, Russian)</text:span><text:span text:style-name="T311">: Slavic languages completely lack definite and indefinite articles (no words for "a" or "the"). Because they skip these highly repetitive ultra-short words, their curves are much flatter and </text:span><text:span text:style-name="T312">shifted to the right</text:span><text:span text:style-name="T311">, peaking broader around </text:span><text:span text:style-name="T312">3 to 6 characters</text:span><text:span text:style-name="T311">. They also rely on extensive case-inflected suffixes, lengthening their baseline vocabulary.</text:span></text:p>
        </text:list-item>
        <text:list-item>
          <text:p text:style-name="P247" loext:marker-style-name="T305"><text:span text:style-name="T308">The Germanic Family (German vs. English)</text:span><text:span text:style-name="T309">: While English behaves like a Romance language in its word length due to heavy reliance on short particles, German stands out completely alone with its prolonged, thick tail spanning from </text:span><text:span text:style-name="T308">7 to 12+ characters</text:span><text:span text:style-name="T309"> due to its compound word architecture.</text:span></text:p>
        </text:list-item>
      </text:list>
      <text:h text:style-name="P133" text:outline-level="1" text:is-list-header="true"><text:soft-page-break/><text:span text:style-name="T73">Pr</text:span><draw:frame draw:style-name="fr1" draw:name="Image23" text:anchor-type="char" svg:width="6.6543in" svg:height="3.5917in" draw:z-index="22"><draw:image xlink:href="Pictures/10000001000006600000037120C595D9.png" xlink:type="simple" xlink:show="embed" xlink:actuate="onLoad" draw:mime-type="image/png"/></draw:frame><text:span text:style-name="T73">actical rule </text:span><text:span text:style-name="T75">for optional </text:span><text:span text:style-name="T80">prefix length</text:span><text:span text:style-name="T75"> according to language</text:span><text:span text:style-name="T73"> </text:span><text:span text:style-name="T75">for 95% unique</text:span></text:h>
      <text:p text:style-name="Standard"><text:span text:style-name="T73"/></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Language</text:p>
            </table:table-cell>
            <table:table-cell table:style-name="Table11.A1" office:value-type="string">
              <text:p text:style-name="Table_20_Heading">Typical lexicon size</text:p>
            </table:table-cell>
            <table:table-cell table:style-name="Table11.A1" office:value-type="string">
              <text:p text:style-name="Table_20_Heading">Safe prefix length</text:p>
            </table:table-cell>
            <table:table-cell table:style-name="Table11.A1" office:value-type="string">
              <text:p text:style-name="Table_20_Heading">Main reason</text:p>
            </table:table-cell>
          </table:table-row>
        </table:table-header-rows>
        <table:table-row>
          <table:table-cell table:style-name="Table11.A1" office:value-type="string">
            <text:p text:style-name="Table_20_Contents">English</text:p>
          </table:table-cell>
          <table:table-cell table:style-name="Table11.A1" office:value-type="string">
            <text:p text:style-name="Table_20_Contents">~170k</text:p>
          </table:table-cell>
          <table:table-cell table:style-name="Table11.A1" office:value-type="string">
            <text:p text:style-name="Table_20_Contents"><text:span text:style-name="Strong_20_Emphasis">8–10</text:span></text:p>
          </table:table-cell>
          <table:table-cell table:style-name="Table11.A1" office:value-type="string">
            <text:p text:style-name="Table_20_Contents">Short words, low inflection</text:p>
          </table:table-cell>
        </table:table-row>
        <table:table-row>
          <table:table-cell table:style-name="Table11.A1" office:value-type="string">
            <text:p text:style-name="Table_20_Contents">German</text:p>
          </table:table-cell>
          <table:table-cell table:style-name="Table11.A1" office:value-type="string">
            <text:p text:style-name="Table_20_Contents">~3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Strong compounding</text:p>
          </table:table-cell>
        </table:table-row>
        <table:table-row>
          <table:table-cell table:style-name="Table11.A1" office:value-type="string">
            <text:p text:style-name="Table_20_Contents">Frenc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Shared Latin prefixes</text:p>
          </table:table-cell>
        </table:table-row>
        <table:table-row>
          <table:table-cell table:style-name="Table11.A1" office:value-type="string">
            <text:p text:style-name="Table_20_Contents">Spanis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Verb inflection</text:p>
          </table:table-cell>
        </table:table-row>
        <table:table-row>
          <table:table-cell table:style-name="Table11.A1" office:value-type="string">
            <text:p text:style-name="Table_20_Contents">Italian</text:p>
          </table:table-cell>
          <table:table-cell table:style-name="Table11.A1" office:value-type="string">
            <text:p text:style-name="Table_20_Contents">~18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Romance morphology</text:p>
          </table:table-cell>
        </table:table-row>
        <table:table-row>
          <table:table-cell table:style-name="Table11.A1" office:value-type="string">
            <text:p text:style-name="Table_20_Contents">Russi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0–12</text:span></text:p>
          </table:table-cell>
          <table:table-cell table:style-name="Table11.A1" office:value-type="string">
            <text:p text:style-name="Table_20_Contents">Prefix + case system</text:p>
          </table:table-cell>
        </table:table-row>
        <table:table-row>
          <table:table-cell table:style-name="Table11.A1" office:value-type="string">
            <text:p text:style-name="Table_20_Contents">Swedish</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Compounding</text:p>
          </table:table-cell>
        </table:table-row>
        <table:table-row>
          <table:table-cell table:style-name="Table11.A1" office:value-type="string">
            <text:p text:style-name="Table_20_Contents"><text:span text:style-name="Strong_20_Emphasis"><text:span text:style-name="T19">Greek</text:span></text:sp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Rich inflection, long stems</text:p>
          </table:table-cell>
        </table:table-row>
        <table:table-row>
          <table:table-cell table:style-name="Table11.A1" office:value-type="string">
            <text:p text:style-name="Table_20_Contents"><text:span text:style-name="Strong_20_Emphasis"><text:span text:style-name="T19">Polish</text:span></text:span></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Very rich case morphology</text:p>
          </table:table-cell>
        </table:table-row>
      </table:table>
      <text:p text:style-name="Standard"><text:span text:style-name="T73"/></text:p>
      <text:p text:style-name="Standard"><text:span text:style-name="T99">If </text:span><text:span text:style-name="Strong_20_Emphasis"><text:span text:style-name="T99">one </text:span></text:span><text:span text:style-name="Strong_20_Emphasis"><text:span text:style-name="T107">needs a </text:span></text:span><text:span text:style-name="Strong_20_Emphasis"><text:span text:style-name="T99">prefix length that works well across all these languages</text:span></text:span><text:span text:style-name="T99">:</text:span></text:p>
      <table:table table:name="Table12" table:style-name="Table12">
        <table:table-column table:style-name="Table12.A"/>
        <table:table-column table:style-name="Table12.B"/>
        <table:table-header-rows>
          <table:table-row>
            <table:table-cell table:style-name="Table12.A1" office:value-type="string">
              <text:p text:style-name="Table_20_Heading">Prefix length</text:p>
            </table:table-cell>
            <table:table-cell table:style-name="Table12.A1" office:value-type="string">
              <text:p text:style-name="Table_20_Heading">Result</text:p>
            </table:table-cell>
          </table:table-row>
        </table:table-header-rows>
        <table:table-row>
          <table:table-cell table:style-name="Table12.A1" office:value-type="string">
            <text:p text:style-name="Table_20_Contents"><text:span text:style-name="Strong_20_Emphasis">10 chars</text:span></text:p>
          </table:table-cell>
          <table:table-cell table:style-name="Table12.A1" office:value-type="string">
            <text:p text:style-name="Table_20_Contents">Works well for English / Romance languages</text:p>
          </table:table-cell>
        </table:table-row>
        <table:table-row>
          <table:table-cell table:style-name="Table12.A1" office:value-type="string">
            <text:p text:style-name="Table_20_Contents"><text:span text:style-name="Strong_20_Emphasis">12 chars</text:span></text:p>
          </table:table-cell>
          <table:table-cell table:style-name="Table12.A1" office:value-type="string">
            <text:p text:style-name="Table_20_Contents">Good for most European languages</text:p>
          </table:table-cell>
        </table:table-row>
        <table:table-row>
          <table:table-cell table:style-name="Table12.A1" office:value-type="string">
            <text:p text:style-name="Table_20_Contents"><text:span text:style-name="Strong_20_Emphasis">14 chars</text:span></text:p>
          </table:table-cell>
          <table:table-cell table:style-name="Table12.A1" office:value-type="string">
            <text:p text:style-name="Table_20_Contents">Safe even for German, Polish, Swedish</text:p>
          </table:table-cell>
        </table:table-row>
      </table:table>
      <text:p text:style-name="P64"><text:span text:style-name="T39">✅ </text:span><text:span text:style-name="Strong_20_Emphasis"><text:span text:style-name="T41">Best universal compromise: 12 characters</text:span></text:span></text:p>
      <text:p text:style-name="Standard"><text:span text:style-name="T99">This usually keeps </text:span><text:span text:style-name="Strong_20_Emphasis"><text:span text:style-name="T99">&gt;90–95% of entries unique </text:span></text:span><text:span text:style-name="T99">across European languages. </text:span><text:span text:style-name="T106">In a mixed environment we can expect </text:span><text:span text:style-name="T107">the cache to be </text:span><text:span text:style-name="T106">under 8MB. </text:span></text:p>
      <text:p text:style-name="Standard"><text:span text:style-name="T68"/></text:p>
      <text:p text:style-name="P44">Memory Layout Optimization</text:p>
      <text:list text:style-name="L15">
        <text:list-item>
          <text:p text:style-name="P248"><text:span text:style-name="Strong_20_Emphasis"><text:span text:style-name="T99">Phrase queries </text:span></text:span><text:span text:style-name="T99">(term A followed by term B within distance d) become a </text:span><text:span text:style-name="Strong_20_Emphasis"><text:span text:style-name="T99">merge of two contiguous array slices </text:span></text:span><text:span text:style-name="T99">— elegant and cache-friendly</text:span></text:p>
        </text:list-item>
        <text:list-item>
          <text:p text:style-name="P248"><text:span text:style-name="Strong_20_Emphasis"><text:span text:style-name="T99">Co-occurrence statistics </text:span></text:span><text:span text:style-name="T99">can be computed with a single sequential pass</text:span></text:p>
        </text:list-item>
        <text:list-item>
          <text:p text:style-name="P248"><text:span text:style-name="Strong_20_Emphasis"><text:span text:style-name="T99">Compression </text:span></text:span><text:span text:style-name="T99">(delta encoding on doc_ids, positions) works extremely well on sorted runs — better than inverted index compression in many cases</text:span></text:p>
        </text:list-item>
        <text:list-item>
          <text:p text:style-name="P248"><text:soft-page-break/><text:span text:style-name="T68">The whole structure is </text:span><text:span text:style-name="Strong_20_Emphasis"><text:span text:style-name="T68">memory-mappable</text:span></text:span><text:span text:style-name="T68">— OS handles paging, no custom buffer pool needed</text:span></text:p>
        </text:list-item>
      </text:list>
      <text:p text:style-name="P18"/>
      <text:p text:style-name="P34">Field/Path complexity <text:span text:style-name="T269">for Lexical Search</text:span>. Looking at<text:span text:style-name="T41"> TEI P5 guidelines as an extreme example with a very large vocabulary.</text:span></text:p>
      <text:list text:style-name="L16">
        <text:list-item>
          <text:p text:style-name="P249"><text:span text:style-name="Strong_20_Emphasis"><text:span text:style-name="T99">~600+ distinct elements (tags) </text:span></text:span><text:span text:style-name="T99">in the full schema</text:span></text:p>
        </text:list-item>
        <text:list-item>
          <text:p text:style-name="P249"><text:span text:style-name="Strong_20_Emphasis"><text:span text:style-name="T194">~250–300 attributes</text:span></text:span></text:p>
        </text:list-item>
        <text:list-item>
          <text:p text:style-name="P190">Elements are grouped into modules (core, header, verse, drama, manuscript description, dictionaries, etc.)</text:p>
        </text:list-item>
      </text:list>
      <text:p text:style-name="Standard"><text:span text:style-name="T99"/></text:p>
      <text:p text:style-name="Standard"><text:span text:style-name="T99">However, </text:span><text:span text:style-name="Strong_20_Emphasis"><text:span text:style-name="T99">no real TEI file uses all of them</text:span></text:span><text:span text:style-name="T99">. </text:span><text:span text:style-name="T108">No more than </text:span><text:span text:style-name="Strong_20_Emphasis"><text:span text:style-name="T79">100–200 distinct tags </text:span></text:span><text:span text:style-name="T79">is common in a complex scholarly TEI document.</text:span></text:p>
      <text:p text:style-name="P34"/>
      <text:p text:style-name="P45">Typical ranges seen in TEI corpora:</text:p>
      <text:p text:style-name="P45"/>
      <table:table table:name="Table13" table:style-name="Table13">
        <table:table-column table:style-name="Table13.A"/>
        <table:table-column table:style-name="Table13.B"/>
        <table:table-header-rows>
          <table:table-row>
            <table:table-cell table:style-name="Table13.A1" office:value-type="string">
              <text:p text:style-name="P61">Project complexity</text:p>
            </table:table-cell>
            <table:table-cell table:style-name="Table13.A1" office:value-type="string">
              <text:p text:style-name="P61">Unique paths</text:p>
            </table:table-cell>
          </table:table-row>
        </table:table-header-rows>
        <table:table-row>
          <table:table-cell table:style-name="Table13.A1" office:value-type="string">
            <text:p text:style-name="P59">Basic TEI text</text:p>
          </table:table-cell>
          <table:table-cell table:style-name="Table13.A1" office:value-type="string">
            <text:p text:style-name="P59">100–300</text:p>
          </table:table-cell>
        </table:table-row>
        <table:table-row>
          <table:table-cell table:style-name="Table13.A1" office:value-type="string">
            <text:p text:style-name="P59">Scholarly edition</text:p>
          </table:table-cell>
          <table:table-cell table:style-name="Table13.A1" office:value-type="string">
            <text:p text:style-name="P59">300–800</text:p>
          </table:table-cell>
        </table:table-row>
        <table:table-row>
          <table:table-cell table:style-name="Table13.A1" office:value-type="string">
            <text:p text:style-name="P59">Rich digital humanities corpus</text:p>
          </table:table-cell>
          <table:table-cell table:style-name="Table13.A1" office:value-type="string">
            <text:p text:style-name="P59">800–1500</text:p>
          </table:table-cell>
        </table:table-row>
        <table:table-row>
          <table:table-cell table:style-name="Table13.A1" office:value-type="string">
            <text:p text:style-name="P59">Large TEI aggregation</text:p>
          </table:table-cell>
          <table:table-cell table:style-name="Table13.A1" office:value-type="string">
            <text:p text:style-name="P59">1500–3000+</text:p>
          </table:table-cell>
        </table:table-row>
      </table:table>
      <text:p text:style-name="P64"><text:span text:style-name="T41"/></text:p>
      <text:p text:style-name="P64"><text:span text:style-name="T41">So a </text:span><text:span text:style-name="Strong_20_Emphasis"><text:span text:style-name="T41">single complex TEI document might easily have ~300–800 unique paths</text:span></text:span><text:span text:style-name="T41">.</text:span></text:p>
      <text:p text:style-name="P51">There are, of course, more complex document models than TEI.</text:p>
      <text:h text:style-name="Heading_20_3" text:outline-level="3"><text:span text:style-name="T41"><text:s/></text:span><text:span text:style-name="T115">JATS (Journal Article Tag Suite)</text:span></text:h>
      <text:list text:style-name="L17">
        <text:list-item>
          <text:list>
            <text:list-item>
              <text:p text:style-name="P191">Used by PubMed Central.</text:p>
            </text:list-item>
            <text:list-item>
              <text:p text:style-name="P191">Very deep citation, funding, and metadata structures.</text:p>
            </text:list-item>
            <text:list-item>
              <text:p text:style-name="P250"><text:span text:style-name="T99">Often </text:span><text:span text:style-name="Strong_20_Emphasis"><text:span text:style-name="T99">200+ tags per article</text:span></text:span><text:span text:style-name="T99">.</text:span></text:p>
            </text:list-item>
          </text:list>
        </text:list-item>
      </text:list>
      <text:h text:style-name="P143" text:outline-level="3">HL7 Clinical Document Architecture</text:h>
      <text:p text:style-name="Standard"><text:tab/><text:span text:style-name="T194">One of the most complex real-world XML standards.</text:span></text:p>
      <text:list text:style-name="L18">
        <text:list-item>
          <text:list>
            <text:list-item>
              <text:p text:style-name="P192">massive schema</text:p>
            </text:list-item>
            <text:list-item>
              <text:p text:style-name="P192">heavy metadata</text:p>
            </text:list-item>
            <text:list-item>
              <text:p text:style-name="P192">controlled vocabularies</text:p>
            </text:list-item>
            <text:list-item>
              <text:p text:style-name="P192">deep nesting</text:p>
            </text:list-item>
          </text:list>
        </text:list-item>
      </text:list>
      <text:p text:style-name="Standard"><text:span text:style-name="T99"><text:tab/>Often </text:span><text:span text:style-name="Strong_20_Emphasis"><text:span text:style-name="T99">thousands of unique paths</text:span></text:span><text:span text:style-name="T99"> across medical documents.</text:span></text:p>
      <text:h text:style-name="P143" text:outline-level="3">Legal XML / Akoma Ntoso</text:h>
      <text:p text:style-name="P34"><text:tab/>Extremely complex legislative documents:</text:p>
      <text:list text:style-name="L19">
        <text:list-item>
          <text:list>
            <text:list-item>
              <text:p text:style-name="P193">hierarchical law structures</text:p>
            </text:list-item>
            <text:list-item>
              <text:p text:style-name="P193">cross references</text:p>
            </text:list-item>
            <text:list-item>
              <text:p text:style-name="P193">amendments</text:p>
            </text:list-item>
            <text:list-item>
              <text:p text:style-name="P193">semantic tagging</text:p>
            </text:list-item>
          </text:list>
        </text:list-item>
      </text:list>
      <text:p text:style-name="P100"><text:span text:style-name="T202"/></text:p>
      <text:p text:style-name="P100"><text:span text:style-name="T202">With current hardware in 2026, fast binary search, in </text:span><text:span text:style-name="T203">absolute </text:span><text:span text:style-name="T202">worst case, over 800 memory mapped files is still relatively performant: </text:span><text:span text:style-name="T125">O(N log</text:span><text:span text:style-name="T126">(</text:span><text:span text:style-name="T125">M</text:span><text:span text:style-name="T126">)</text:span><text:span text:style-name="T125">)</text:span><text:span text:style-name="T41"> </text:span><text:span text:style-name="T109">where N is the number of indexes (here 800) and M is the maximum number of items in each. But since the indexes are sorted it is more typically:</text:span><text:span text:style-name="T126"> O(log(NM))</text:span></text:p>
      <text:p text:style-name="P21"/>
      <text:p text:style-name="P22">Most <text:span text:style-name="T269">path </text:span>searches will be into just a few fields (tags) or paths whence a fast binary search in just a few memory mapped and cached file<text:span text:style-name="T269">s</text:span>. <text:span text:style-name="T269">As noted above: DDR5 random access ~75ns, L3 ~10ns — negligible.</text:span></text:p>
      <text:p text:style-name="P22"/>
      <text:p text:style-name="P34"><text:soft-page-break/>Key Considerations:</text:p>
      <text:list text:style-name="L20">
        <text:list-item>
          <text:p text:style-name="P194"><text:span text:style-name="T271">Mapping </text:span>requires system calls (open + mmap) to map a file into the process's virtual address space. If the file's metadata is already in the OS page cache, the open() call is exceptionally fast.</text:p>
        </text:list-item>
      </text:list>
      <text:list text:style-name="L21">
        <text:list-item>
          <text:p text:style-name="P195">High-Speed Storage (NVMe/Storage Class Memory): The cost of the page fault is increasingly determined by the latency of the underlying SSD, which is extremely fast on modern systems. </text:p>
        </text:list-item>
        <text:list-item>
          <text:p text:style-name="P195">64-Bit Addressing: There is virtually no limit on mapping file sizes on 64-bit systems. </text:p>
          <text:list>
            <text:list-item>
              <text:p text:style-name="P195">Cached Performance: If the file is already in the page cache, the mmap() overhead is minimal </text:p>
            </text:list-item>
          </text:list>
        </text:list-item>
        <text:list-item>
          <text:p text:style-name="P195"><text:span text:style-name="T262">VMA Limits: </text:span><text:span text:style-name="T263">While </text:span><text:span text:style-name="T262">Linux has a default limit on the number of memory map areas a single process can have (vm.max_map_count, often 65,530) </text:span><text:span text:style-name="T263">this is well below max fields/paths.</text:span></text:p>
        </text:list-item>
        <text:list-item>
          <text:p text:style-name="P195"><text:span text:style-name="T263">The Unix kernel's page cache manages memory-mapped files lazily.</text:span><text:span text:style-name="T262"> </text:span></text:p>
        </text:list-item>
        <text:list-item>
          <text:p text:style-name="P195">Metadata Efficiency: The OS is very efficient at opening a few files as needed. </text:p>
        </text:list-item>
      </text:list>
      <text:list text:style-name="L22">
        <text:list-item>
          <text:p text:style-name="P196">By mapping only the files <text:span text:style-name="T270">(</text:span><text:span text:style-name="T271">lazily </text:span><text:span text:style-name="T270">on demand) as they are</text:span> actually <text:span text:style-name="T271">needed we improve, <text:s/>given how the kernel uses variations of LRU to manage the page cache, efficiency.</text:span></text:p>
        </text:list-item>
      </text:list>
      <text:p text:style-name="P49"><text:s/></text:p>
      <text:p text:style-name="P107"><text:span text:style-name="T147">T</text:span><text:span text:style-name="T149">he advantage of the this approach is that memory demands don’t spiral out of control even with an “excessive” number of fields. <text:s/>Since </text:span><text:span text:style-name="T148">Core</text:span><text:span text:style-name="T149">Quarry only maps (using a LRU heuristic) the fields being searched memory demands for searches is modest. During index the number of fields/paths has no impact on consumption since indexing buffers are pre-defined irrespective of their numbers—relevant only to the maximum size of an individual document.</text:span></text:p>
      <text:p text:style-name="P103"><text:span text:style-name="T219"/></text:p>
      <text:p text:style-name="P4"><text:span text:style-name="T286">Appendix </text:span><text:span text:style-name="T287">I</text:span><text:span text:style-name="T286">I: </text:span><text:span text:style-name="T288">Wh</text:span><text:span text:style-name="T289">at is different?</text:span></text:p>
      <text:p text:style-name="P50"><text:span text:style-name="T174"/></text:p>
      <text:p text:style-name="P34"><text:span text:style-name="T166">7</text:span><text:span text:style-name="T164">0% of Retrieval-Augmented Generation (RAG) systems fail in production</text:span><text:span text:style-name="T164"><text:note text:id="ftn1" text:note-class="footnote"><text:note-citation>1</text:note-citation><text:note-body><text:p text:style-name="Footnote"><text:a xlink:type="simple" xlink:href="https://python.plainenglish.io/why-70-of-rag-implementations-fail-and-the-6-things-that-separate-production-grade-systems-97501c11b682" text:style-name="Internet_20_link" text:visited-style-name="Visited_20_Internet_20_Link">https://python.plainenglish.io/why-70-of-rag-implementations-fail-and-the-6-things-that-separate-production-grade-systems-97501c11b682</text:a></text:p></text:note-body></text:note></text:span><text:span text:style-name="T164">. </text:span><text:span text:style-name="T167">They mostly </text:span><text:span text:style-name="T164">fail at retrieval, not generation. </text:span><text:span text:style-name="T165">The main issues are 1) context mismatch (chunking) 2) semantic collapse</text:span><text:span text:style-name="T165"><text:note text:id="ftn2" text:note-class="footnote"><text:note-citation>2</text:note-citation><text:note-body><text:p text:style-name="Footnote"><text:a xlink:type="simple" xlink:href="https://dho.stanford.edu/wp-content/uploads/Legal_RAG_Hallucinations.pdf" text:style-name="Internet_20_link" text:visited-style-name="Visited_20_Internet_20_Link">https://dho.stanford.edu/wp-content/uploads/Legal_RAG_Hallucinations.pdf</text:a></text:p></text:note-body></text:note></text:span><text:span text:style-name="T165"> 3) drift.</text:span></text:p>
      <text:p text:style-name="P50"><text:span text:style-name="T174">H</text:span><text:span text:style-name="T168">andling semantic drift is a "missing link" for Retrieval-Augmented Generation (RAG) systems because it represents the silent degradation of retrieval accuracy over time, turning previously reliable AI systems into sources of outdated or conflicting information. As enterprise data evolves, the "meaning-space" of the vector database shifts, causing embeddings of new documents to diverge from old ones, or queries to no longer align with stored knowledge. </text:span><text:span text:style-name="T170">When a RAG system is updated with new documents without re-embedding old data or retraining the retriever, it creates a "single vector index" with mixed, conflicting, and divergent semantic contexts, known as </text:span><text:span text:style-name="Strong_20_Emphasis"><text:span text:style-name="T171">Knowledge Drift</text:span></text:span><text:span text:style-name="T170">.</text:span></text:p>
      <text:p text:style-name="P50"><text:span text:style-name="T170"/></text:p>
      <text:p text:style-name="Standard">Unlike a traditional code error that breaks a system, <text:s/>drift causes the RAG system to continue operating, but with silently declining accuracy. This degrades trust as the system provides subtly outdated or irrelevant information.</text:p>
      <text:p text:style-name="Standard"/>
      <text:p text:style-name="P103">To address <text:span text:style-name="T280">these issues</text:span>, <text:span text:style-name="T279">DeepQuarry </text:span><text:span text:style-name="T282">(R&amp;D),</text:span><text:span text:style-name="T279"> implements:</text:span></text:p>
      <text:list text:style-name="L23">
        <text:list-item>
          <text:p text:style-name="P251"><text:span text:style-name="Strong_20_Emphasis"><text:span text:style-name="T157">Continuous Monitor</text:span></text:span><text:span text:style-name="Strong_20_Emphasis"><text:span text:style-name="T158">ing</text:span></text:span><text:span text:style-name="Strong_20_Emphasis"><text:span text:style-name="T157">: </text:span></text:span><text:span text:style-name="Strong_20_Emphasis"><text:span text:style-name="T142">Actively monitoring for "Retrieval Misses" and using specialized metrics to detect drift.</text:span></text:span></text:p>
        </text:list-item>
        <text:list-item>
          <text:p text:style-name="P251"><text:span text:style-name="Strong_20_Emphasis"><text:span text:style-name="T160">Semantic Segmentation:</text:span></text:span><text:span text:style-name="Strong_20_Emphasis"><text:span text:style-name="T153"> segmenting data into more coherent semantic clusters working backwards from detected drift</text:span></text:span></text:p>
        </text:list-item>
        <text:list-item>
          <text:p text:style-name="P251"><text:span text:style-name="Strong_20_Emphasis"><text:span text:style-name="T157">Incremental Updating: </text:span></text:span><text:span text:style-name="T142">Re-indexing or re-embedding data with updated models.</text:span></text:p>
        </text:list-item>
        <text:list-item>
          <text:p text:style-name="P251"><text:span text:style-name="Strong_20_Emphasis"><text:span text:style-name="T157">Hybrid Search: </text:span></text:span><text:span text:style-name="T142">Combining semantic vector search with keyword search to catch specific, updated terminology that embeddings might miss.</text:span></text:p>
        </text:list-item>
        <text:list-item>
          <text:p text:style-name="P251"><text:span text:style-name="Strong_20_Emphasis"><text:span text:style-name="T157">Semantic Chunking: </text:span></text:span><text:span text:style-name="T142">Breaking down documents based on logical structure (not arbitrary character counts) to maintain the semantic integrity of each segment. </text:span><text:span text:style-name="T146">The basic concept is that the explicit and implicit structure of documents anchors context.</text:span></text:p>
        </text:list-item>
        <text:list-item>
          <text:p text:style-name="P252"><text:span text:style-name="T159">Semantic indexes by field and sharding</text:span><text:span text:style-name="T142">: this avoids the network getting too crowded. When everything is thrown into a single pile the evidence is that starting as early as with 10k documents </text:span><text:soft-page-break/><text:span text:style-name="T142">things start to fall part. The architecture implemented in </text:span><text:span text:style-name="T148">Core</text:span><text:span text:style-name="T142">Quarry vastly extends the document capacity.</text:span></text:p>
        </text:list-item>
      </text:list>
      <text:p text:style-name="P114"><text:span text:style-name="T142"/></text:p>
      <text:p text:style-name="P114"><text:span text:style-name="T142"/></text:p>
      <text:p text:style-name="P3">Appendix <text:span text:style-name="T281">II</text:span>I: Competitive Landscape</text:p>
      <text:p text:style-name="P35"><text:span text:style-name="T44">Our</text:span><text:span text:style-name="T43"> architecture </text:span><text:span text:style-name="T44">uniquely </text:span><text:span text:style-name="T43">overlaps </text:span><text:span text:style-name="Strong_20_Emphasis"><text:span text:style-name="T42">three domains simultaneously</text:span></text:span><text:span text:style-name="T43">:</text:span></text:p>
      <text:section text:style-name="Sect1" text:name="Section3">
        <text:p text:style-name="P95"><text:s text:c="8"/>vector DBs</text:p>
        <text:p text:style-name="P72"><text:s text:c="11"/>▲</text:p>
        <text:p text:style-name="P72"><text:s text:c="11"/>│</text:p>
        <text:p text:style-name="P72"><text:s/><text:span text:style-name="T259">IR engines ─── structured document DBs</text:span></text:p>
      </text:section>
      <text:p text:style-name="P30"/>
      <text:p text:style-name="P30">The<text:span text:style-name="T258"> engine has several advantages commercially:</text:span></text:p>
      <text:list text:style-name="L24">
        <text:list-item>
          <text:p text:style-name="P253"><text:span text:style-name="T85">runs </text:span><text:span text:style-name="T86">l</text:span><text:span text:style-name="Strong_20_Emphasis"><text:span text:style-name="T85">ocally</text:span></text:span></text:p>
        </text:list-item>
        <text:list-item>
          <text:p text:style-name="P253"><text:span text:style-name="Strong_20_Emphasis"><text:span text:style-name="T196">small footprint</text:span></text:span></text:p>
        </text:list-item>
        <text:list-item>
          <text:p text:style-name="P253"><text:span text:style-name="Strong_20_Emphasis"><text:span text:style-name="T196">high performance</text:span></text:span></text:p>
        </text:list-item>
        <text:list-item>
          <text:p text:style-name="P253"><text:span text:style-name="Strong_20_Emphasis"><text:span text:style-name="T196">hybrid retrieval</text:span></text:span></text:p>
        </text:list-item>
        <text:list-item>
          <text:p text:style-name="P253"><text:span text:style-name="Strong_20_Emphasis"><text:span text:style-name="T196">structured document awareness</text:span></text:span></text:p>
        </text:list-item>
      </text:list>
      <text:p text:style-name="P92"><text:span text:style-name="Strong_20_Emphasis"><text:span text:style-name="T62"/></text:span></text:p>
      <text:p text:style-name="P92"><text:span text:style-name="Strong_20_Emphasis"><text:span text:style-name="T62"/></text:span></text:p>
      <text:p text:style-name="P92"><text:span text:style-name="Strong_20_Emphasis"><text:span text:style-name="T62"/></text:span></text:p>
      <text:p text:style-name="P92"><text:span text:style-name="Strong_20_Emphasis"><text:span text:style-name="T62">Right now, RAG infrastructure is mostly:</text:span></text:span></text:p>
      <text:section text:style-name="Sect1" text:name="Section1">
        <text:p text:style-name="P63"><text:bookmark text:name="code-block-viewer"/><text:s text:c="10"/>LLM</text:p>
        <text:p text:style-name="P71"><text:s text:c="11"/>↓</text:p>
        <text:p text:style-name="P68"><text:s text:c="9"/>vector DB</text:p>
        <text:p text:style-name="P71"><text:s text:c="11"/>↓</text:p>
        <text:p text:style-name="P68"><text:s text:c="6"/>chunked documents</text:p>
      </text:section>
      <text:p text:style-name="P93"><text:span text:style-name="T45"/></text:p>
      <text:p text:style-name="P93"><text:span text:style-name="T99">This architecture is </text:span><text:span text:style-name="Strong_20_Emphasis"><text:span text:style-name="T99">deeply flawed</text:span></text:span><text:span text:style-name="T99">. </text:span><text:span text:style-name="T110">Instead </text:span><text:span text:style-name="T111">or model</text:span><text:span text:style-name="T110">:</text:span></text:p>
      <text:section text:style-name="Sect1" text:name="Section2">
        <text:p text:style-name="P63"><text:bookmark text:name="code-block-viewer Copy 1"/><text:s text:c="10"/>LLM</text:p>
        <text:p text:style-name="P71"><text:s text:c="11"/>↓</text:p>
        <text:p text:style-name="P68"><text:s text:c="7"/><text:span text:style-name="T282">Core</text:span>Quarry</text:p>
        <text:p text:style-name="P68">(structural + lexical + vector)</text:p>
      </text:section>
      <text:p text:style-name="P93"><text:span text:style-name="T41"/></text:p>
      <text:p text:style-name="P93"><text:span text:style-name="T41">If positioned correctly, it could </text:span><text:span text:style-name="T46">disrupt the market </text:span><text:span text:style-name="T41">become </text:span><text:span text:style-name="Strong_20_Emphasis"><text:span text:style-name="T41">the retrieval layer for local AI systems</text:span></text:span><text:span text:style-name="T41">. </text:span></text:p>
      <text:h text:style-name="Heading_20_3" text:outline-level="3" text:is-list-header="true"><text:span text:style-name="T6">1) </text:span><text:span text:style-name="T7">PRIMARY </text:span><text:span text:style-name="T3">Direct Competitors (combining lexical + vector search)</text:span></text:h>
      <text:p text:style-name="P39">Elasticsearch</text:p>
      <text:list text:style-name="L25">
        <text:list-item>
          <text:list>
            <text:list-item>
              <text:p text:style-name="P164"><text:s/>Lucene-based</text:p>
            </text:list-item>
            <text:list-item>
              <text:p text:style-name="P164"><text:s/>supports BM25 + vector search</text:p>
            </text:list-item>
            <text:list-item>
              <text:p text:style-name="P165"><text:s/>widely used in RAG stacks</text:p>
            </text:list-item>
          </text:list>
        </text:list-item>
      </text:list>
      <text:p text:style-name="P18"><text:span text:style-name="T258"><text:tab/></text:span><text:span text:style-name="T11">Comparative Weakness</text:span><text:span text:style-name="T9">:</text:span></text:p>
      <text:list text:style-name="L26">
        <text:list-item>
          <text:list>
            <text:list-item>
              <text:p text:style-name="P166"><text:s/>poor structural awareness</text:p>
            </text:list-item>
            <text:list-item>
              <text:p text:style-name="P166"><text:s/>heavy infrastructure</text:p>
            </text:list-item>
            <text:list-item>
              <text:p text:style-name="P167"><text:s/>BM25-centric ranking</text:p>
            </text:list-item>
            <text:list-item>
              <text:p text:style-name="P168"><text:s/>Written in Java</text:p>
            </text:list-item>
            <text:list-item>
              <text:p text:style-name="P168">Triple license / AGPL</text:p>
            </text:list-item>
          </text:list>
        </text:list-item>
      </text:list>
      <text:p text:style-name="Standard"/>
      <text:p text:style-name="P37"><text:soft-page-break/>OpenSearch</text:p>
      <text:p text:style-name="P18"><text:tab/><text:tab/>Fork of Elasticsearch.</text:p>
      <text:p text:style-name="P18"><text:tab/><text:span text:style-name="T9">Weakness</text:span>:</text:p>
      <text:list text:style-name="L27">
        <text:list-item>
          <text:list>
            <text:list-item>
              <text:p text:style-name="P170">same Lucene constraints</text:p>
            </text:list-item>
          </text:list>
        </text:list-item>
      </text:list>
      <text:p text:style-name="Standard"/>
      <text:p text:style-name="P37">Weaviate</text:p>
      <text:list text:style-name="L28">
        <text:list-item>
          <text:list>
            <text:list-item>
              <text:p text:style-name="P171"><text:s/>hybrid search</text:p>
            </text:list-item>
            <text:list-item>
              <text:p text:style-name="P171"><text:s/>object store</text:p>
            </text:list-item>
            <text:list-item>
              <text:p text:style-name="P171"><text:s/>semantic queries</text:p>
            </text:list-item>
            <text:list-item>
              <text:p text:style-name="P169"><text:s/>BSD 3-Clause license. <text:s/></text:p>
            </text:list-item>
          </text:list>
        </text:list-item>
      </text:list>
      <text:p text:style-name="P18"><text:tab/><text:span text:style-name="T9">Weakness</text:span>:</text:p>
      <text:list text:style-name="L29">
        <text:list-item>
          <text:list>
            <text:list-item>
              <text:p text:style-name="P172"><text:s/>vectors first</text:p>
            </text:list-item>
            <text:list-item>
              <text:p text:style-name="P172"><text:s/>weak lexical IR</text:p>
            </text:list-item>
            <text:list-item>
              <text:p text:style-name="P172"><text:s/>heavy infrastructure</text:p>
            </text:list-item>
            <text:list-item>
              <text:p text:style-name="P254"><text:span text:style-name="T201"><text:s/></text:span><text:span text:style-name="T206">written in Go. </text:span><text:span text:style-name="T183">This means some memory is not immediately available for reuse when it is no longer needed.</text:span></text:p>
            </text:list-item>
          </text:list>
        </text:list-item>
      </text:list>
      <text:p text:style-name="Standard"/>
      <text:p text:style-name="P37">Qdrant</text:p>
      <text:list text:style-name="L30">
        <text:list-item>
          <text:list>
            <text:list-item>
              <text:p text:style-name="P173"><text:s/>fast ANN <text:span text:style-name="T275">(HNSW)</text:span></text:p>
            </text:list-item>
            <text:list-item>
              <text:p text:style-name="P173"><text:s/>filtering</text:p>
            </text:list-item>
            <text:list-item>
              <text:p text:style-name="P173"><text:s/><text:span text:style-name="T275">Apache 2.0</text:span></text:p>
            </text:list-item>
          </text:list>
        </text:list-item>
      </text:list>
      <text:p text:style-name="P18"><text:tab/><text:span text:style-name="T9">Weakness</text:span>:</text:p>
      <text:list text:style-name="L31">
        <text:list-item>
          <text:list>
            <text:list-item>
              <text:p text:style-name="P174"><text:s/>minimal lexical search</text:p>
            </text:list-item>
            <text:list-item>
              <text:p text:style-name="P174"><text:s/>no structural IR</text:p>
            </text:list-item>
          </text:list>
        </text:list-item>
      </text:list>
      <text:p text:style-name="Standard"/>
      <text:p text:style-name="P37">Milvus</text:p>
      <text:p text:style-name="P102"><text:span text:style-name="T187">H</text:span><text:span text:style-name="T185">eavily-modified </text:span><text:span text:style-name="T186">forks</text:span><text:span text:style-name="T184"> </text:span><text:span text:style-name="T185">of third-party open source </text:span><text:a xlink:type="simple" xlink:href="https://en.wikipedia.org/wiki/Similarity_search" text:style-name="Internet_20_link" text:visited-style-name="Visited_20_Internet_20_Link">s</text:a><text:span text:style-name="T186">imilarity search</text:span><text:span text:style-name="T184"> </text:span><text:span text:style-name="T185">libraries, such as </text:span><text:span text:style-name="T186">FAISS, DiskANN and HNSWlib.</text:span></text:p>
      <text:list text:style-name="L32">
        <text:list-item>
          <text:list>
            <text:list-item>
              <text:p text:style-name="P187"><text:span text:style-name="T276"><text:s/>large-scale vector DB </text:span><text:span text:style-name="T277">(</text:span><text:span text:style-name="T172">Kubernetes </text:span><text:span text:style-name="T277">clusters)</text:span></text:p>
            </text:list-item>
            <text:list-item>
              <text:p text:style-name="P175"><text:s/><text:span text:style-name="T275">Apache 2.0</text:span></text:p>
            </text:list-item>
          </text:list>
        </text:list-item>
      </text:list>
      <text:p text:style-name="P18"><text:tab/><text:span text:style-name="T9">Weakness</text:span></text:p>
      <text:list text:style-name="L33">
        <text:list-item>
          <text:list>
            <text:list-item>
              <text:p text:style-name="P176"><text:s/>not really a document retrieval engine</text:p>
            </text:list-item>
          </text:list>
        </text:list-item>
      </text:list>
      <text:p text:style-name="P18"/>
      <text:p text:style-name="P34"><text:span text:style-name="T8">The CoreQuarry Competitive Edge over Unified Hybrid &amp; Vector Engines:</text:span> Direct competitors in the modern RAG and semantic search space fall into two deeply flawed architectural camps: <text:span text:style-name="T8">Lucene-derived heavyweights</text:span> (Elasticsearch, OpenSearch) trying to retroactively bolt vector tracking onto legacy inverted frameworks, and <text:span text:style-name="T8">vector-first specialized databases</text:span> (Weaviate, Qdrant, Milvus) struggling to provide robust, deep lexical text capabilities.</text:p>
      <text:p text:style-name="Standard"/>
      <text:p text:style-name="P34">Across both categories, these systems demand massive infrastructure footprints, rely on heavy, cache-indifferent language runtimes (Java/Go) that suffer from garbage collection latency, and map data using high-overhead object-layer abstractions.</text:p>
      <text:p text:style-name="P80">CoreQuarry completely breaks this paradigm through a <text:span text:style-name="T8">hardware-sympathetic, unified C++ design</text:span>:</text:p>
      <text:list text:style-name="L34">
        <text:list-item>
          <text:p text:style-name="P197"><text:span text:style-name="T8">Zero Inverted-Index Bloat:</text:span> Instead of the immense RAM and storage overhead required by Lucene's term-dictionaries, CoreQuarry utilizes a proprietary, highly compact implementation of <text:span text:style-name="T8">Patricia Arrays (PatArrays)</text:span>. This allows native, structural lexical matching with a fraction of the memory footprint.</text:p>
        </text:list-item>
        <text:list-item>
          <text:p text:style-name="P197"><text:span text:style-name="T8">Hardware-Fused Vector Traversal: </text:span>By leveraging a strict 24-bit metadata ceiling embedded directly into native 64-bit coordinate labels, CoreQuarry unifies hard multi-tenant boolean constraints and soft category re-ranking weights straight inside high-performance HNSW graph loops—bypassing the slow post-filtering and cross-index stitching that plagues other engines.</text:p>
        </text:list-item>
        <text:list-item>
          <text:p text:style-name="P197"><text:soft-page-break/><text:span text:style-name="T57">Saturated Hardware Execution Pipelines: </text:span><text:span text:style-name="T41">While competitors rely on slow, data-dependent branch logic inside their sorting routines, CoreQuarry's indexing pipeline transforms variable string processing into deterministic, fixed-width blocks (64-character compiled horizons). This allows our core engines to utilize </text:span><text:span text:style-name="T57">branchless SIMD register vectors (AVX2, ARM Neon, and SVE2) </text:span><text:span text:style-name="T41">and cache-localized </text:span><text:span text:style-name="T57">MSD Radix sorting </text:span><text:span text:style-name="T41">to saturate hardware memory bandwidth and achieve maximum performance.</text:span></text:p>
        </text:list-item>
        <text:list-item>
          <text:p text:style-name="P255"><text:span text:style-name="T115">Bare-Metal Tensor Execution via GGML</text:span><text:span text:style-name="T99">: </text:span><text:span text:style-name="T68">Unlike direct competitors that rely on heavy python-dependent runtimes, massive ONNX dependencies, or rigid, cloud-bound inference APIs, CoreQuarry fuses its vector re-ranking engine directly with the GGML tensor library. This grants the runtime native, zero-overhead access to consumer hardware and hardware accelerators—saturating Apple Silicon Unified Memory and Neural Engines via Metal, as well as commodity x86 setups via AVX-512/AMX and specialized GPUs. By utilizing GGML’s state-of-the-art quantization topologies (including advanced k-quant block methods like Q4_K_M and Q8_0), CoreQuarry supports zero-copy, direct pass-through of pre-quantized model weights. This allows enterprise deployments to immediately explore the precision-to-performance frontier of lightweight, highly compressed semantic embedding spaces, executing complex multi-dimensional similarity matrices natively inside local CPU cache domains with practically zero deployment or infrastructure bloat.</text:span></text:p>
        </text:list-item>
      </text:list>
      <text:p text:style-name="P18"/>
      <text:p text:style-name="P18"><text:span text:style-name="T60">Bottom line</text:span><text:span text:style-name="T55">: </text:span><text:span text:style-name="T41">Where direct competitors require a distributed Kubernetes cluster of high-memory JVM/Go nodes just to coordinate semantic queries, CoreQuarry delivers deep structural lexical search and blistering vector re-ranking natively inside a single unified, lightweight, bare-metal runtime.</text:span></text:p>
      <text:p text:style-name="P18"/>
      <text:p text:style-name="P111"/>
      <text:h text:style-name="P144" text:outline-level="3" text:is-list-header="true"><text:span text:style-name="T2">2) </text:span><text:span text:style-name="T129">MULTI-MODEL &amp; RDBMS COMPETITORS (MARKETING VECTOR EXTENSIONS)</text:span></text:h>
      <text:p text:style-name="P89"><text:span text:style-name="T284">PostgreSQL</text:span> (with pgvector / pgvecto.rs)</text:p>
      <text:list text:style-name="L35">
        <text:list-header>
          <text:p text:style-name="P307"><text:span text:style-name="T93">Architecture: </text:span><text:span text:style-name="T68">Traditional ACID-compliant relational database utilizing third-party extensions (</text:span><text:span text:style-name="Source_20_Text"><text:span text:style-name="T68">pgvector </text:span></text:span><text:span text:style-name="T68">for IVFFlat/HNSW or Rust-based </text:span><text:span text:style-name="Source_20_Text"><text:span text:style-name="T68">pgvecto.rs</text:span></text:span><text:span text:style-name="T68">).</text:span></text:p>
        </text:list-header>
      </text:list>
      <text:p text:style-name="P82"><text:span text:style-name="T290"><text:tab/>S</text:span><text:span text:style-name="T262">trengths:</text:span></text:p>
      <text:list text:style-name="L36">
        <text:list-item>
          <text:list>
            <text:list-item>
              <text:p text:style-name="P198">Universal enterprise adoption; allows unified relational data and vector storage in a single database instance.</text:p>
            </text:list-item>
            <text:list-item>
              <text:p text:style-name="P198">Strong relational/boolean filtering combined with distance operators.</text:p>
            </text:list-item>
            <text:list-item>
              <text:p text:style-name="P198">Open source (PostgreSQL License).</text:p>
            </text:list-item>
          </text:list>
          <text:p text:style-name="P256"><text:span text:style-name="T128"/></text:p>
        </text:list-item>
      </text:list>
      <text:p text:style-name="P69"><text:span text:style-name="T1"><text:tab/></text:span><text:span text:style-name="T207">Comparative Weakness:</text:span></text:p>
      <text:list text:style-name="L37">
        <text:list-item>
          <text:list>
            <text:list-item>
              <text:p text:style-name="P199"><text:span text:style-name="T8">Not built for scale:</text:span> Row-oriented engine overhead. Every vector lookup undergoes standard PostgreSQL tuple-overhead, causing massive memory footprint bloat.</text:p>
            </text:list-item>
            <text:list-item>
              <text:p text:style-name="P199"><text:span text:style-name="T8">Cache-unfriendly:</text:span> It completely lacks hardware-sympathetic optimizations for processing dense vector layers across CPU L3 cache lines or high DDR5 memory bandwidth pipelines.</text:p>
            </text:list-item>
            <text:list-item>
              <text:p text:style-name="P257"><text:span text:style-name="T114">Weak Hybrid IR:</text:span><text:span text:style-name="T99"> Combining native lexical text search (</text:span><text:span text:style-name="Source_20_Text"><text:span text:style-name="T99">tsvector</text:span></text:span><text:span text:style-name="T99">/</text:span><text:span text:style-name="Source_20_Text"><text:span text:style-name="T99">tsquery</text:span></text:span><text:span text:style-name="T99">) with </text:span><text:span text:style-name="Source_20_Text"><text:span text:style-name="T99">pgvector</text:span></text:span><text:span text:style-name="T99"> results in poorly optimized execution paths; the engine doesn't cleanly unify the index spaces, leading to sub-optimal execution.</text:span></text:p>
            </text:list-item>
          </text:list>
        </text:list-item>
      </text:list>
      <text:p text:style-name="P112"><text:span text:style-name="T128"/></text:p>
      <text:h text:style-name="P147" text:outline-level="4">ClickHouse</text:h>
      <text:list text:style-name="L38">
        <text:list-header>
          <text:p text:style-name="P308"><text:span text:style-name="T93">Architecture: </text:span><text:span text:style-name="T68">Open-source Columnar OLAP (Online Analytical Processing) engine designed for real-time analytics, natively incorporating vector search functions (e.g., </text:span><text:span text:style-name="Source_20_Text"><text:span text:style-name="T68">Distance </text:span></text:span><text:span text:style-name="T68">functions and </text:span><text:soft-page-break/><text:span text:style-name="T68">experimental vector indexing).</text:span></text:p>
          <text:p text:style-name="P309">Strengths:</text:p>
          <text:list>
            <text:list-item>
              <text:p text:style-name="P200"><text:span text:style-name="T8">Massive Columnar Throughput: </text:span>Vector processing benefits naturally from ClickHouse’s core design—data is stored contiguously in columns, allowing high-performance batch scanning.</text:p>
            </text:list-item>
            <text:list-item>
              <text:p text:style-name="P200"><text:span text:style-name="T8">Built-in Parallel SIMD: </text:span>Aggressively utilizes AVX2, AVX-512, and Neon instructions out of the box for linear column array math.</text:p>
            </text:list-item>
            <text:list-item>
              <text:p text:style-name="P200">Apache 2.0 license.</text:p>
            </text:list-item>
          </text:list>
          <text:p text:style-name="P309">Comparative Weakness:</text:p>
          <text:list text:continue-numbering="true">
            <text:list-item>
              <text:p text:style-name="P200"><text:span text:style-name="T8">Analytics, Not IR: </text:span>ClickHouse is an analytics warehouse, not a document retrieval engine. It lacks robust, structural lexical linguistic pipelines (tokenization, complex proximity operations, and text weighting matrices).</text:p>
            </text:list-item>
            <text:list-item>
              <text:p text:style-name="P200"><text:span text:style-name="T8">Mutation Heavy: </text:span>Designed for append-mostly logging workloads. High-frequency updates or fine-grained modifications to existing documents completely tank its performance.</text:p>
            </text:list-item>
          </text:list>
        </text:list-header>
      </text:list>
      <text:h text:style-name="P150" text:outline-level="4"/>
      <text:h text:style-name="P149" text:outline-level="4"><text:span text:style-name="T284">MongoDB</text:span> (Atlas Vector Search)</text:h>
      <text:list text:style-name="L39">
        <text:list-header>
          <text:p text:style-name="P313"><text:span text:style-name="T8">Architecture: </text:span>Document-based NoSQL database using a proprietary vector index layer managed primarily in its cloud-hosted "Atlas" infrastructure.</text:p>
          <text:p text:style-name="P310">Strengths:</text:p>
          <text:list>
            <text:list-item>
              <text:p text:style-name="P258">Massive JSON-document development ecosystem.</text:p>
            </text:list-item>
            <text:list-item>
              <text:p text:style-name="P258">Simple API integration for standard web application stacks.</text:p>
            </text:list-item>
            <text:list-item>
              <text:p text:style-name="P258">Server Side Public License (SSPL) for self-hosted community editions.</text:p>
            </text:list-item>
          </text:list>
          <text:p text:style-name="P310">Comparative Weakness:</text:p>
          <text:list text:continue-numbering="true">
            <text:list-item>
              <text:p text:style-name="P258"><text:span text:style-name="T8">Marketing-First Hybrid Search: </text:span>The underlying storage engine (WiredTiger) is inherently optimized for nested B-Trees. Vectors are treated as an attached metadata array rather than a core coordinate label space.</text:p>
            </text:list-item>
            <text:list-item>
              <text:p text:style-name="P258"><text:span text:style-name="T8">Memory Management Stalls: </text:span>Written in C++, but suffers from massive document serialization/deserialization overhead.</text:p>
            </text:list-item>
            <text:list-item>
              <text:p text:style-name="P258"><text:span text:style-name="T8">Cloud-Lock-In: </text:span>Peak vector search features require MongoDB Atlas, removing total control over physical volume layouts and underlying storage blocks.</text:p>
            </text:list-item>
          </text:list>
        </text:list-header>
      </text:list>
      <text:h text:style-name="P151" text:outline-level="4"/>
      <text:h text:style-name="P148" text:outline-level="4">CouchDB</text:h>
      <text:list text:style-name="L40">
        <text:list-header>
          <text:p text:style-name="P314"><text:span text:style-name="T8">Architecture: </text:span>Erlang-based Document Store focused on Master-Master replication and eventual consistency, utilizing Lucene sidecars or basic external indexes for advanced querying.</text:p>
          <text:p text:style-name="P311">Strengths:</text:p>
          <text:list>
            <text:list-item>
              <text:p text:style-name="P259">Master-Master replication architecture designed for offline-first synchronization topologies.</text:p>
            </text:list-item>
            <text:list-item>
              <text:p text:style-name="P259">Apache 2.0 license.</text:p>
            </text:list-item>
          </text:list>
          <text:p text:style-name="P311">Comparative Weakness:</text:p>
          <text:list text:continue-numbering="true">
            <text:list-item>
              <text:p text:style-name="P201"><text:span text:style-name="T8">Severe Vector Incompatibility: </text:span>Written in <text:span text:style-name="T8">Erlang</text:span>, which handles data as immutable, boxed garbage-collected terms. Erlang's runtime model is structurally incapable of performing low-level, high-performance SIMD register vector math over raw float pointers.</text:p>
            </text:list-item>
            <text:list-item>
              <text:p text:style-name="P201"><text:soft-page-break/><text:span text:style-name="T8">High Latency Indirect Mapping:</text:span> Vector operations require piping data out of the main database to external sidecar search engines, completely destroying modern cache-sympathetic operations.</text:p>
            </text:list-item>
          </text:list>
        </text:list-header>
      </text:list>
      <text:p text:style-name="Text_20_body"/>
      <text:p text:style-name="P80"><text:span text:style-name="T8">The CoreQuarry Competitive Edge over Multi-Model Stores: </text:span>While multi-model engines (PostgreSQL, ClickHouse, MongoDB, CouchDB) market vector search capabilities, they treat vectors as secondary attribute properties attached to complex, high-overhead database row/document abstractions.</text:p>
      <text:p text:style-name="P80">CoreQuarry bypasses this structural layout tax. By utilizing bit-packed 64-bit coordinate spaces integrated directly into hardware-sympathetic data layouts (such as our local Patricia Array variant architectures and branchless SIMD/Radix terminal pipeline loops), CoreQuarry unifies hard lexical filtering and high-speed vector re-ranking natively within the CPU cache line layer. This delivers orders of magnitude faster execution speeds with a tiny, predictable memory and infrastructure footprint.</text:p>
      <text:h text:style-name="P145" text:outline-level="3" text:is-list-header="true"><text:span text:style-name="T316">3) </text:span><text:span text:style-name="T260">CLASSICAL</text:span><text:span text:style-name="T40"> IR S</text:span><text:span text:style-name="T56">YSTEMS</text:span></text:h>
      <text:p text:style-name="P116">Apache <text:span text:style-name="T284">Lucene</text:span>. <text:span text:style-name="T23">The Foundation for ElasticSearch, OpenSearch, Solr etc.</text:span></text:p>
      <text:p text:style-name="P32"><text:span text:style-name="T41"><text:tab/></text:span><text:span text:style-name="T40">Architecture</text:span><text:span text:style-name="T41">: Traditional text search library written in Java, utilizing an inverted index composed of rigid, immutable segment files. Terms are tracked via complex internal Finite State Transducers (FSTs) that map tokens to posting lists containing document IDs, positions, and payloads.</text:span></text:p>
      <text:p text:style-name="P32"><text:span text:style-name="T41"/></text:p>
      <text:p text:style-name="P79"><text:span text:style-name="T18"><text:tab/></text:span>Strengths<text:span text:style-name="T18">:</text:span></text:p>
      <text:list text:style-name="L41">
        <text:list-item>
          <text:list>
            <text:list-item>
              <text:p text:style-name="P202">Industry standard with an immense developer ecosystem and mature tokenization/linguistic analyzer pipelines.</text:p>
            </text:list-item>
            <text:list-item>
              <text:p text:style-name="P202">Robust support for BM25 tf-idf weighting variants and complex boolean query parsers.</text:p>
            </text:list-item>
          </text:list>
        </text:list-item>
      </text:list>
      <text:p text:style-name="P34"/>
      <text:p text:style-name="P87"><text:tab/>Comparative Weakness:</text:p>
      <text:list text:style-name="L42">
        <text:list-item>
          <text:list>
            <text:list-item>
              <text:p text:style-name="P203"><text:span text:style-name="T8">The Inverted Index Storage Bloat:</text:span> Lucene’s core design requires building and caching immense, high-overhead term dictionaries (FST arrays) in memory. This architecture demands massive RAM overhead just to coordinate term lookups before posting lists can even be read from disk.</text:p>
            </text:list-item>
            <text:list-item>
              <text:p text:style-name="P203"><text:span text:style-name="T8">The Runtime Memory Tax (JVM Garbage Collection):</text:span> Being written in Java, Lucene suffers heavily from heap fragmentation and unpredictable GC pauses. Under high-throughput ingestion or complex structural queries, object allocations trigger execution stalls that destroy predictable latency SLAs.</text:p>
            </text:list-item>
            <text:list-item>
              <text:p text:style-name="P203"><text:span text:style-name="T57">Aggressive I/O Segment Merging:</text:span><text:span text:style-name="T41"> Because segment files are immutable, continuous document updates require massive background disk-shuffling passes (Lucene Segment Merges). These passes saturate I/O channels, starving active queries of read bandwidth.</text:span></text:p>
            </text:list-item>
          </text:list>
        </text:list-item>
      </text:list>
      <text:list text:style-name="L43">
        <text:list-item>
          <text:list>
            <text:list-item>
              <text:p text:style-name="P204"><text:s/>BM25-centric scoring</text:p>
            </text:list-item>
            <text:list-item>
              <text:p text:style-name="P204"><text:s/><text:span text:style-name="T14">Li</text:span><text:span text:style-name="T9">mited structural awareness</text:span></text:p>
            </text:list-item>
            <text:list-item>
              <text:p text:style-name="P204"><text:s/>Lucene writes new data to new, immutable segments, which are merged later. Merging is a resource-intensive, slow process.</text:p>
            </text:list-item>
            <text:list-item>
              <text:p text:style-name="P260"><text:span text:style-name="Strong_20_Emphasis"><text:span text:style-name="T156"><text:s/></text:span></text:span><text:span text:style-name="Strong_20_Emphasis"><text:span text:style-name="T161">Deep paging limits</text:span></text:span><text:span text:style-name="Strong_20_Emphasis"><text:span text:style-name="T156">: </text:span></text:span><text:span text:style-name="T156">Standard paging is inefficient for deep searches, often limited to the first 10,000 documents to prevent cluster instability.</text:span></text:p>
            </text:list-item>
          </text:list>
        </text:list-item>
      </text:list>
      <text:p text:style-name="Standard"/>
      <text:p text:style-name="P38">Tantivity</text:p>
      <text:p text:style-name="P29"><text:span text:style-name="T8">Architecture: </text:span>A modern, high-performance classical search engine library written in Rust, heavily inspired by Lucene’s inverted-index architecture but built for native code execution. <text:span text:style-name="T278">F</text:span><text:span text:style-name="T181">ollows Lucene's fundamental architecture and algorithms, including </text:span><text:span text:style-name="T182">BM25 </text:span><text:span text:style-name="T181">scoring and similar indexing </text:span><text:soft-page-break/><text:span text:style-name="T181">strategies, but takes advantage of Rust's memory safety and performance characteristics.</text:span></text:p>
      <text:list text:style-name="L44">
        <text:list-header>
          <text:p text:style-name="P325">Strengths:</text:p>
        </text:list-header>
      </text:list>
      <text:list text:style-name="L45">
        <text:list-item>
          <text:list>
            <text:list-item>
              <text:p text:style-name="P205"><text:span text:style-name="T8">Native Speed &amp; Safety:</text:span> Written in Rust, completely bypassing Java's JVM garbage collection tax and maximizing thread utilization. <text:span text:style-name="T317">Much faster than Lucene.</text:span></text:p>
            </text:list-item>
            <text:list-item>
              <text:p text:style-name="P261"><text:span text:style-name="T194">Strong memory-mapping (</text:span><text:span text:style-name="Source_20_Text"><text:span text:style-name="T194">mmap</text:span></text:span><text:span text:style-name="T194">) alignment for faster data access.</text:span></text:p>
            </text:list-item>
            <text:list-item>
              <text:p text:style-name="P205">MIT License.</text:p>
            </text:list-item>
          </text:list>
        </text:list-item>
      </text:list>
      <text:p text:style-name="P84"/>
      <text:p text:style-name="P84">Comparative Weakness:</text:p>
      <text:list text:style-name="L46">
        <text:list-item>
          <text:list>
            <text:list-item>
              <text:p text:style-name="P206"><text:span text:style-name="T8">The Legacy Structural Trait:</text:span> While Tantivy fixes the runtime language penalty of Lucene, it still retains the classical inverted-index design. Term lookups are bound to complex bit-packing schemas (like SIMD-BP128) over massive term dictionaries, retaining high memory footprint ratios.</text:p>
            </text:list-item>
            <text:list-item>
              <text:p text:style-name="P262"><text:span text:style-name="T224">Weak Native Vector/Hybrid Fusion:</text:span><text:span text:style-name="T194"> It is strictly a classical text engine first. It lacks deep, hardware-fused integration between its lexical components and multidimensional vector topologies, forcing developers to manage external coordination for true hybrid semantic ranking.</text:span></text:p>
            </text:list-item>
          </text:list>
        </text:list-item>
      </text:list>
      <text:p text:style-name="Standard"/>
      <text:h text:style-name="P139" text:outline-level="3" text:is-list-header="true">Xapian</text:h>
      <text:p text:style-name="P117"><text:span text:style-name="T224">Architecture:</text:span><text:span text:style-name="T194"> A highly mature, open-source C++ search engine library utilizing a traditional Probabilistic Information Retrieval model (BM25/Chert/Glass storage layers built on B-Trees).</text:span></text:p>
      <text:list text:style-name="L47">
        <text:list-header>
          <text:p text:style-name="P207"><text:span text:style-name="T9"/></text:p>
          <text:p text:style-name="P207"><text:span text:style-name="T9">Strengths</text:span>:</text:p>
          <text:p text:style-name="P207"/>
        </text:list-header>
      </text:list>
      <text:list text:style-name="L48">
        <text:list-item>
          <text:list>
            <text:list-item>
              <text:p text:style-name="P208">Lightweight C++ compilation footprint with zero runtime dependency weight.</text:p>
            </text:list-item>
            <text:list-item>
              <text:p text:style-name="P208">Highly reliable for traditional, deterministic text indexing workloads.</text:p>
            </text:list-item>
            <text:list-item>
              <text:p text:style-name="P209">Interesting academically <text:span text:style-name="T278">(long history)</text:span></text:p>
            </text:list-item>
            <text:list-item>
              <text:p text:style-name="P210">GPL v2 License <text:span text:style-name="T318">(which can also be a weakness)</text:span></text:p>
            </text:list-item>
          </text:list>
        </text:list-item>
      </text:list>
      <text:p text:style-name="P45"/>
      <text:p text:style-name="P34"><text:tab/><text:span text:style-name="T9">Comparative Weakness:</text:span></text:p>
      <text:p text:style-name="P34"><text:span text:style-name="T9"/></text:p>
      <text:list text:style-name="L49">
        <text:list-item>
          <text:list>
            <text:list-item>
              <text:p text:style-name="P212"><text:span text:style-name="T8">Stuck in the Pre-SIMD Era:</text:span> Xapian's core index layouts are bound to traditional, deep B-Tree node lookups. This legacy structural design is completely incompatible with modern, cache-sympathetic vector processing, hardware-fused registers, or parallel GPU/tensor architectures.</text:p>
            </text:list-item>
            <text:list-item>
              <text:p text:style-name="P212"><text:span text:style-name="T8">No Vector Architecture Capability:</text:span> Completely lacks native support for Approximate Nearest Neighbor (ANN) graphs, dense embeddings, or hardware-accelerated quantization passes.</text:p>
            </text:list-item>
          </text:list>
        </text:list-item>
      </text:list>
      <text:p text:style-name="P115"/>
      <text:h text:style-name="P137" text:outline-level="3" text:is-list-header="true">The CoreQuarry Competitive Edge over Classical Inverted Engines</text:h>
      <text:p text:style-name="P34">While classical IR systems (Lucene, Solr, Tantivy, Xapian) excel at parsing traditional, keyword-driven queries, they are shackled to an index-design philosophy that is fundamentally incompatible with modern hardware-sympathetic engineering. Their reliance on massive inverted index structures, immutable segment files, and heavy term-dictionaries forces infrastructure footprints to balloon rapidly as collections grow.</text:p>
      <text:p text:style-name="P34"/>
      <text:p text:style-name="P317">CoreQuarry completely breaks away from these classical design traps:</text:p>
      <text:list text:style-name="L50">
        <text:list-item>
          <text:p text:style-name="P263"><text:span text:style-name="T224">Bypassing the Term Dictionary Footprint:</text:span><text:span text:style-name="T194"> Instead of burning gigabytes of RAM on memory-resident FSTs or complex B-Trees just to locate words, CoreQuarry utilizes a proprietary, highly optimized variant of </text:span><text:span text:style-name="T224">Patricia Arrays (PatArrays)</text:span><text:span text:style-name="T194">. This stores terms linearly and contiguously alongside a parallel vector array of address offsets (</text:span><text:span text:style-name="Source_20_Text"><text:span text:style-name="T194">GPTYPE</text:span></text:span><text:span text:style-name="T194">) mapped straight from a read-only </text:span><text:soft-page-break/><text:span text:style-name="T194">virtual memory-mapped text buffer.</text:span></text:p>
        </text:list-item>
      </text:list>
      <text:list text:style-name="L51">
        <text:list-item>
          <text:p text:style-name="P213"><text:span text:style-name="T8">Branchless Hardware-Fused Sorting Networks:</text:span> While classical engines iterate through string pointers byte-by-byte via data-dependent branch loops—stalling modern CPU execution pipelines—CoreQuarry transforms string comparisons into deterministic, fixed-width blocks (64-character compiled horizons). This allows our core ingestion engine to utilize platform-specific <text:span text:style-name="T8">branchless SIMD instructions (AVX2, ARM Neon, SVE2) </text:span>and cache-localized <text:span text:style-name="T8">MSD Radix sorting </text:span>to saturate local memory bandwidth and achieve elite ingestion throughput.</text:p>
        </text:list-item>
      </text:list>
      <text:list text:style-name="L52">
        <text:list-item>
          <text:p text:style-name="P214"><text:span text:style-name="T8">Zero Run-Time Stalls:</text:span> By operating strictly within a lightweight, bare-metal C++ domain and embedding its vector capabilities directly within the <text:span text:style-name="T8">GGML tensor library</text:span>, CoreQuarry completely eliminates the garbage collection pauses of Lucene/Solr and the cross-index stitching delays of Tantivy. It handles structural text filtering, tensor re-ranking, and quantization pass-through natively inside local CPU cache lines.</text:p>
        </text:list-item>
      </text:list>
      <text:p text:style-name="P34"/>
      <text:p text:style-name="P34"/>
      <text:p text:style-name="P34"/>
      <text:h text:style-name="P140" text:outline-level="3" text:is-list-header="true">4) NATIVE VECTOR COEFFICIENT &amp; ANN GRAPH COMPETITORS</text:h>
      <text:h text:style-name="Heading_20_4" text:outline-level="4" text:is-list-header="true"><text:span text:style-name="T123">FAISS</text:span><text:span text:style-name="T120"> (Facebook AI Similarity Search)</text:span></text:h>
      <text:list text:style-name="L53">
        <text:list-header>
          <text:p text:style-name="P215"><text:span text:style-name="T8">Architecture:</text:span> A highly influential, heavy-duty C++ vector similarity library from Meta designed for dense vector clustering, utilizing Product Quantization (PQ) and optimized GPU execution paths.</text:p>
          <text:p text:style-name="P264"><text:span text:style-name="T9"/></text:p>
          <text:p text:style-name="P264"><text:span text:style-name="T9">Strengths</text:span>:</text:p>
        </text:list-header>
      </text:list>
      <text:p text:style-name="Standard"/>
      <text:list text:continue-numbering="true" text:style-name="L53">
        <text:list-item>
          <text:p text:style-name="P216"><text:s/>Exceptional handling of massive, billion-scale static vector matrices on multi-GPU server rigs.</text:p>
        </text:list-item>
        <text:list-item>
          <text:p text:style-name="P216"><text:s/>Deep academic optimization for vector space quantization variants (IVF-PQ).</text:p>
        </text:list-item>
      </text:list>
      <text:p text:style-name="Standard"/>
      <text:p text:style-name="Standard"><text:tab/><text:span text:style-name="T215">Comparative Weakness:</text:span></text:p>
      <text:p text:style-name="Standard"><text:span text:style-name="T215"/></text:p>
      <text:list text:style-name="L54">
        <text:list-item>
          <text:p text:style-name="P217"><text:span text:style-name="T8"><text:s/>Not a Real-Time Index Store:</text:span> FAISS is a mathematical matrix math tool, not a dynamic information retrieval system. It lacks native support for real-time CRUD operations—inserting or deleting single document vectors dynamically requires expensive, full-index re-clustering passes.</text:p>
        </text:list-item>
        <text:list-item>
          <text:p text:style-name="P218"><text:span text:style-name="T8"><text:s/>Zero Lexical Integration:</text:span> It possesses no concept of text metadata filtering or structural document rules. Combining lexical search with FAISS forces developers to build independent split-index architectures, suffering from high latency during post-query intersection.</text:p>
        </text:list-item>
        <text:list-item>
          <text:p text:style-name="P211"><text:s/>Slower than Quarry</text:p>
        </text:list-item>
      </text:list>
      <text:p text:style-name="Standard"/>
      <text:p text:style-name="P40"><text:span text:style-name="T61">ScaNN</text:span><text:span text:style-name="T40"> (Scalable Nearest Neighbors by Google)</text:span></text:p>
      <text:p text:style-name="P33"><text:span text:style-name="T40"/></text:p>
      <text:list text:style-name="L55">
        <text:list-header>
          <text:p text:style-name="P177"><text:span text:style-name="T8">Architecture:</text:span> Google's state-of-the-art vector search library optimized for maximum Anisotropic Vector Quantization and hardware-specific SIMD execution.</text:p>
          <text:p text:style-name="P177"/>
          <text:p text:style-name="P177"><text:span text:style-name="T9">Strengths</text:span>:</text:p>
          <text:p text:style-name="P177"/>
        </text:list-header>
        <text:list-item>
          <text:p text:style-name="P177"><text:s/>Industry-leading recall rates per millisecond due to highly advanced quantization math that minimizes quantization noise in the direction of data points.</text:p>
        </text:list-item>
        <text:list-item>
          <text:p text:style-name="P177"><text:s/>Deeply integrated into high-end Python and TensorFlow machine learning pipelines.</text:p>
        </text:list-item>
      </text:list>
      <text:p text:style-name="P85"><text:tab/></text:p>
      <text:p text:style-name="P85"><text:tab/>Comparative Weakness:</text:p>
      <text:list text:style-name="L56">
        <text:list-item>
          <text:p text:style-name="P219"><text:span text:style-name="T8"><text:s/>Rigid C++ Monolith:</text:span> ScaNN is notorious for its highly monolithic, complex bazel-based compilation matrix. It is deeply tightly coupled to the TensorFlow/Bazel ecosystem, making it a <text:soft-page-break/>nightmare to embed cleanly as a lightweight native library inside independent engines.</text:p>
        </text:list-item>
        <text:list-item>
          <text:p text:style-name="P219"><text:span text:style-name="T8"><text:s/>Designed for Static Batch Ingestion:</text:span> Optimized for static, mass-computed data lakes. Like FAISS, it behaves poorly under high-frequency dynamic update pipelines where document visibility must alter instantly.</text:p>
        </text:list-item>
      </text:list>
      <text:p text:style-name="P54"/>
      <text:h text:style-name="P149" text:outline-level="4"><text:span text:style-name="T284">HNSWlib</text:span> (The Baseline Implementation <text:span text:style-name="T319">for CoreQuarry’s HNSW</text:span>)</text:h>
      <text:list text:style-name="L57">
        <text:list-header>
          <text:p text:style-name="P316"><text:span text:style-name="T8">Architecture:</text:span> The standard, open-source reference implementation of Yu. A. Malkov's Hierarchical Navigable Small World graphs for Approximate Nearest Neighbor (ANN) search.</text:p>
          <text:p text:style-name="P318">Strengths:</text:p>
        </text:list-header>
        <text:list-item>
          <text:p text:style-name="P265"><text:s/>Simple, lightweight header-only C++ foundation with high recall accuracy.</text:p>
        </text:list-item>
        <text:list-item>
          <text:p text:style-name="P265"><text:s/>Supports real-time element insertion and multi-threaded graph building.</text:p>
          <text:list>
            <text:list-header>
              <text:p text:style-name="P265"/>
            </text:list-header>
          </text:list>
          <text:p text:style-name="P321">Comparative Weakness:</text:p>
        </text:list-item>
        <text:list-item>
          <text:p text:style-name="P265"><text:span text:style-name="T114"><text:s/>Unquantized Memory Ingestion:</text:span><text:span text:style-name="T99"> In its baseline state, standard HNSWlib forces vectors to sit raw in memory as uncompressed floating-point streams (</text:span><text:span text:style-name="Source_20_Text"><text:span text:style-name="T99">float32</text:span></text:span><text:span text:style-name="T99">). For massive datasets, this causes immense RAM consumption, quickly exhausting L3 cache lines and bottlenecking performance at the DDR5 memory lane boundary.</text:span></text:p>
        </text:list-item>
        <text:list-item>
          <text:p text:style-name="P220"><text:span text:style-name="T8"><text:s/>Naive Scalar Loops:</text:span> Lacks tailored, platform-specific hardware acceleration beyond compiler auto-vectorization primitives, leading to missed optimization opportunities on modern chipsets.</text:p>
        </text:list-item>
      </text:list>
      <text:p text:style-name="P34"/>
      <text:h text:style-name="P138" text:outline-level="3" text:is-list-header="true">The CoreQuarry Competitive Edge over Specialized Vector Backends</text:h>
      <text:p text:style-name="P81">While specialized vector engines (FAISS, ScaNN) deliver great mathematical matrix metrics on static datasets and standard HNSWlib offers a clean reference structure, they fall completely flat when asked to act as a dynamic, resource-efficient hybrid knowledge engine. They either treat memory as an infinite resource or isolate vector execution entirely from the accompanying text documents.</text:p>
      <text:p text:style-name="P86">CoreQuarry completely redefines high-performance vector processing:</text:p>
      <text:list text:style-name="L58">
        <text:list-item>
          <text:p text:style-name="P266"><text:span text:style-name="T114"><text:s/>The Turbo-Quantization Breakthrough:</text:span><text:span text:style-name="T99"> Standard HNSWlib chokes on raw </text:span><text:span text:style-name="Source_20_Text"><text:span text:style-name="T99">float32</text:span></text:span><text:span text:style-name="T99"> bloat, forcing the CPU to constantly leave its high-speed L3 cache to fetch data from memory lanes. CoreQuarry resolves this by integrating advanced block quantization topologies. By shrinking massive high-dimensional vectors down to dense, low-bit spaces, our graph nodes live natively within local CPU cache domains, delivering orders-of-magnitude reduction in RAM footprint.</text:span></text:p>
        </text:list-item>
        <text:list-item>
          <text:p text:style-name="P221"><text:span text:style-name="T8"><text:s/>Zero-Copy Tensor Pass-Through:</text:span> While FAISS and ScaNN trap you inside specialized, rigid data formats that require extensive translation layers, CoreQuarry integrates directly with the <text:span text:style-name="T8">GGML tensor ecosystem</text:span>. We support native pass-through of pre-quantized state-of-the-art model weights. The vectors used for graph traversal are the exact same bytes fed to your embedding pipeline—completely cutting out runtime serialization penalties.</text:p>
        </text:list-item>
        <text:list-item>
          <text:p text:style-name="P267"><text:span text:style-name="T216"><text:s/>Turbo-Charged Neon Acceleration:</text:span><text:span text:style-name="T201"> We didn't just compile HNSWlib; we stripped out its generic, scalar loops and re-engineered its core calculation kernels from the ground up. Optimized specifically for modern hardware like Apple Silicon MacBooks and server-side AWS Graviton rigs, CoreQuarry leverages highly unrolled, explicit </text:span><text:span text:style-name="T216">ARM Neon and SVE2 intrinsics</text:span><text:span text:style-name="T201"> for its distance operations. By pairing this vector compute layer with our custom, cache-localized </text:span><text:span text:style-name="T216">MSD Radix terminal sorting pipelines</text:span><text:span text:style-name="T201">, CoreQuarry achieves blazing-fast traversal metrics on everyday consumer hardware and server clusters alike.</text:span></text:p>
        </text:list-item>
        <text:list-item>
          <text:p text:style-name="P267"><text:span text:style-name="T224"><text:s/>Unified Lexical Fusion: </text:span><text:span text:style-name="T194">Most importantly, CoreQuarry eliminates the "two-database problem."</text:span> By embedding tight, bit-packed metadata filters directly into our 64-bit HNSW graph coordinate labels and utilizing our lightweight <text:span text:style-name="T8">Patricia Array (PatArray) </text:span>text mechanics, hard structural filters and soft semantic similarity vectors are resolved simultaneously inside a single, unified, ultra-fast traversal <text:soft-page-break/>loop.</text:p>
        </text:list-item>
      </text:list>
      <text:p text:style-name="Horizontal_20_Line"/>
      <text:h text:style-name="Heading_20_3" text:outline-level="3" text:is-list-header="true"><text:span text:style-name="T3">4</text:span><text:span text:style-name="T4">)</text:span><text:span text:style-name="T3"> </text:span><text:span text:style-name="T130">HIERARCHICAL &amp; SEMI-STRUCTURED DOCUMENT ENGINE COMPETITORS</text:span></text:h>
      <text:h text:style-name="P148" text:outline-level="4">MarkLogic</text:h>
      <text:list text:style-name="L59">
        <text:list-header>
          <text:p text:style-name="P268"><text:span text:style-name="T216">Architecture:</text:span><text:span text:style-name="T201"> </text:span><text:span text:style-name="T68">A proprietary, enterprise NoSQL document store that commercialized the "Universal Index" concept for XML and JSON. It tokenizes and indexes both text and structural hierarchy (elements, properties, namespaces) simultaneously, enabling schema-agnostic querying via XQuery and Xpath</text:span><text:span text:style-name="T124">.</text:span></text:p>
          <text:p text:style-name="P268"><text:span text:style-name="T130"/></text:p>
        </text:list-header>
      </text:list>
      <text:list text:style-name="L60">
        <text:list-header>
          <text:p text:style-name="P312">Strengths:</text:p>
        </text:list-header>
      </text:list>
      <text:list text:style-name="L61">
        <text:list-item>
          <text:list>
            <text:list-item>
              <text:p text:style-name="P222"><text:span text:style-name="T8">Elite Structural Lexical Awareness:</text:span><text:span text:style-name="T262"> </text:span><text:span text:style-name="T131">Robust, schema-free structural lexical awareness for highly nested document hierarchies</text:span></text:p>
            </text:list-item>
            <text:list-item>
              <text:p text:style-name="P269"><text:span text:style-name="T225">Fully ACID-compliant</text:span><text:span text:style-name="T194"> transactional guarantees across document, range, and RDF triple indexes simultaneously.</text:span><text:line-break/></text:p>
            </text:list-item>
          </text:list>
        </text:list-item>
      </text:list>
      <text:list text:style-name="L62">
        <text:list-header>
          <text:p text:style-name="P319">Historical Context &amp; Structural Flaws:</text:p>
        </text:list-header>
        <text:list-item>
          <text:p text:style-name="P178"><text:span text:style-name="T58">The Commercialized Philosophy</text:span><text:span text:style-name="T41">:</text:span><text:span text:style-name="T39"> </text:span><text:span text:style-name="T41">While MarkLogic popularized this pattern in the 2000s, the underlying philosophy of fusing structural markup and lexical tokens into a single search space was pioneered decades earlier by the Waterloo OpenText engine</text:span><text:span text:style-name="T39"> </text:span><text:span text:style-name="T41">in the late 1980s/early 90s.</text:span></text:p>
          <text:list>
            <text:list-header>
              <text:p text:style-name="P178"><text:span text:style-name="T41"/></text:p>
            </text:list-header>
          </text:list>
          <text:p text:style-name="P320">Comparative Weakness:</text:p>
        </text:list-item>
        <text:list-item>
          <text:p text:style-name="P223"><text:span text:style-name="T8"><text:s/>Immense Commercial and System Overhead:</text:span> MarkLogic is a massive database monolith that requires significant licensing costs and substantial hardware resource footprints. It is entirely designed to be run as an independent, heavy server cluster—not a lightweight embedded process.</text:p>
        </text:list-item>
        <text:list-item>
          <text:p text:style-name="P223"><text:span text:style-name="T8"><text:s/>Memory-Resident Footprint Bloat:</text:span> To achieve its fast range and lexicon lookups, MarkLogic relies heavily on massive in-memory-mapped file allocations (List Caches, Range Caches). This design lacks the strict hardware-sympathetic cache localization needed to prevent CPU starvation on consumer-grade hardware or edge devices.</text:p>
        </text:list-item>
        <text:list-item>
          <text:p text:style-name="P223"><text:span text:style-name="T8"><text:s/>Weak Native Vector Pipeline Acceleration:</text:span> While it handles traditional metadata text matrices, geospatial lookups, and RDF triple relationships efficiently, it lacks a modern, hardware-fused tensor core compute pipeline (like ARM Neon/SVE2 or AVX-512 graph traversals) to handle high-density embedding topologies out of the box.</text:p>
        </text:list-item>
      </text:list>
      <text:p text:style-name="P34"/>
      <text:p text:style-name="P36">BaseX</text:p>
      <text:p text:style-name="P120"><text:tab/><text:span text:style-name="T194">XML structural search.</text:span></text:p>
      <text:p text:style-name="P55"><text:tab/>Weakness:</text:p>
      <text:list text:style-name="L63">
        <text:list-item>
          <text:list>
            <text:list-item>
              <text:p text:style-name="P224">no vector search</text:p>
            </text:list-item>
            <text:list-item>
              <text:p text:style-name="P224">limited IR capabilities</text:p>
            </text:list-item>
          </text:list>
        </text:list-item>
      </text:list>
      <text:p text:style-name="P55"/>
      <text:p text:style-name="P36">eXist-db</text:p>
      <text:p text:style-name="P120"><text:tab/>Similar category.</text:p>
      <text:p text:style-name="P46"/>
      <text:p text:style-name="P32">The CoreQuarry Competitive Edge over Hierarchical Document Stores.</text:p>
      <text:p text:style-name="P34"/>
      <text:p text:style-name="Standard"><text:span text:style-name="T201">MarkLogic proved that treating text tokens and document structure as a single, unified search problem is the gold standard for complex information retrieval. While MarkLogic built a heavy, closed-source enterprise </text:span><text:soft-page-break/><text:span text:style-name="T201">database server around structural text indexing, they were commercializing a paradigm established decades earlier by the pioneering “</text:span><text:span text:style-name="T214">OpenText engine</text:span><text:span text:style-name="T216">” </text:span><text:span text:style-name="T201">and the foundational computer science of </text:span><text:span text:style-name="T216">Ricardo Baeza-Yates </text:span><text:span text:style-name="T217">and </text:span><text:span text:style-name="T94">Gaston H. Gonnet</text:span>.</text:p>
      <text:p text:style-name="P34"/>
      <text:p text:style-name="Standard"><text:span text:style-name="T99">CoreQuarry traces its direct lineage back to this golden era of high-performance IR. Witnessing the strengths of the early Waterloo architectures and explicitly taking </text:span><text:span text:style-name="T112">their </text:span><text:span text:style-name="T99">work on structural algorithms to the next level within </text:span><text:span text:style-name="Source_20_Text"><text:span text:style-name="T99">Isearch</text:span></text:span><text:span text:style-name="T99">, CoreQuarry strips away the multi-node server bloat and fuses this elite structural intelligence straight into modern CPU registers</text:span><text:span text:style-name="T41">:</text:span></text:p>
      <text:p text:style-name="P78"/>
      <text:list text:style-name="L64">
        <text:list-item>
          <text:p text:style-name="P270"><text:span text:style-name="T224">Lightweight, Native Patricia Array Mechanics:</text:span><text:span text:style-name="T194"> Where MarkLogic burns megabytes of RAM on sprawling universal index lists and heavy tree structures, CoreQuarry utilizes a highly compact, custom implementation of </text:span><text:span text:style-name="T224">Patricia Arrays (PatArrays)</text:span><text:span text:style-name="T194">. By mapping terms linearly and contiguously alongside a parallel vector array of address offsets (</text:span><text:span text:style-name="Source_20_Text"><text:span text:style-name="T194">GPTYPE</text:span></text:span><text:span text:style-name="T194">) from a read-only virtual memory-mapped text buffer, we achieve deep structural lexical matching with a fraction of the memory footprint.</text:span></text:p>
        </text:list-item>
      </text:list>
      <text:list text:style-name="L65">
        <text:list-item>
          <text:p text:style-name="P225"><text:span text:style-name="T8">Branchless Sorting Networks vs Heavy Cache Layers:</text:span> MarkLogic relies on massive system memory caches to keep its lexicon lookups fast. CoreQuarry shifts the heavy lifting to the CPU registers. By enforcing a deterministic, 64-character compiled compilation horizon, our ingestion engine converts variable text processing into fixed blocks. This allows us to leverage <text:span text:style-name="T8">branchless SIMD instructions (AVX2, ARM Neon, SVE2)</text:span> and cache-localized <text:span text:style-name="T8">MSD Radix sorting</text:span> to saturate hardware memory bandwidth and achieve elite throughput.</text:p>
        </text:list-item>
        <text:list-item>
          <text:p text:style-name="P225">Modern RAG and genomic workloads demand more than just classical text hierarchies.</text:p>
        </text:list-item>
      </text:list>
      <text:list text:style-name="L66">
        <text:list-item>
          <text:p text:style-name="P226"><text:span text:style-name="T8">Fused Vector/Tensor Acceleration via GGML:</text:span> MarkLogic can orchestrate complex metadata and triple relationships, but it forces you into high-overhead data boundaries. CoreQuarry integrates an embedded <text:span text:style-name="T8">GGML tensor library backend</text:span> right into the core of its data traversal pipelines. By compressing high-dimensional vectors into low-bit quantized spaces and embedding bit-packed structural criteria directly inside our 64-bit HNSW graph coordinate labels, we resolve hard structural text filters and soft semantic tensor calculations simultaneously in a single, low-latency instruction loop.</text:p>
        </text:list-item>
      </text:list>
      <text:p text:style-name="P64"/>
      <text:p text:style-name="Standard"><text:span text:style-name="T117">T</text:span><text:span text:style-name="T88">he Bottom Line: </text:span><text:span text:style-name="T68">CoreQuarry represents the ultimate modernization of the classical structural search philosophy. It takes the architectural ideals pioneered by </text:span><text:span text:style-name="T84">the Waterloo Oxford English Project and </text:span><text:span text:style-name="T68">OpenText, strips away decades of enterprise database bloat, and delivers an ultra-compact, high-performance embedded C++ library that handles structural layouts, long-tail sequence lookups, and tensor quantization passes natively inside your application's local process space. CoreQuarry delivers the elite structural lexical intelligence </text:span><text:span text:style-name="T84">of</text:span><text:span text:style-name="T68"> systems like MarkLogic </text:span><text:span text:style-name="T84">without</text:span><text:span text:style-name="T68"> the enterprise bloat. </text:span></text:p>
      <text:p text:style-name="Standard"/>
      <text:h text:style-name="P146" text:outline-level="3" text:is-list-header="true"><text:span text:style-name="T3">5</text:span><text:span text:style-name="T4">) </text:span><text:span text:style-name="T127">EMBEDDED DATABASE COMPETITORS (IN-PROCESS ENGINES)</text:span><text:span text:style-name="T3"> </text:span></text:h>
      <text:h text:style-name="P149" text:outline-level="4"><text:span text:style-name="T284">SQLite</text:span> (with FTS5 / sqlite-vec)</text:h>
      <text:list text:style-name="L67">
        <text:list-header>
          <text:p text:style-name="P271"><text:span text:style-name="T114">Architecture:</text:span><text:span text:style-name="T99"> The gold standard for embedded, row-oriented transactional (ACID) databases. Text search is handled via the </text:span><text:span text:style-name="Source_20_Text"><text:span text:style-name="T99">FTS5</text:span></text:span><text:span text:style-name="T99"> extension (inverted index), and vector capabilities are retrofitted via third-party extensions like </text:span><text:span text:style-name="Source_20_Text"><text:span text:style-name="T99">sqlite-vec</text:span></text:span><text:span text:style-name="T99">. Many RAG systems are now built on top of SQLite + vector extensions.</text:span></text:p>
          <text:p text:style-name="P227"><text:span text:style-name="T41"/></text:p>
          <text:p text:style-name="P227"><text:span text:style-name="T9">Strengths</text:span>:</text:p>
          <text:p text:style-name="P227"/>
        </text:list-header>
        <text:list-item>
          <text:p text:style-name="P227"><text:s/>Ubiquitous, hyper-lightweight, and bulletproof reliability with an unmatched deployment footprint.</text:p>
        </text:list-item>
        <text:list-item>
          <text:p text:style-name="P227"><text:s/>Excellent for transactional metadata handling and structured local configuration storage.</text:p>
        </text:list-item>
        <text:list-item>
          <text:p text:style-name="P227"><text:s/>Public Domain license.</text:p>
          <text:list>
            <text:list-header>
              <text:p text:style-name="P227"/>
            </text:list-header>
          </text:list>
          <text:p text:style-name="P322">Comparative Weakness:</text:p>
        </text:list-item>
        <text:list-item>
          <text:p text:style-name="P227"><text:soft-page-break/><text:span text:style-name="T8"><text:s/>Row-Store Bottleneck:</text:span> SQLite's core architecture is built around B-Trees optimized for small row mutations. High-dimensional vectors or mass document blocks force massive page-splitting and intensive serialization overhead.</text:p>
        </text:list-item>
        <text:list-item>
          <text:p text:style-name="P271"><text:span text:style-name="T114"><text:s/>Naively Attached Extensions:</text:span><text:span text:style-name="T99"> Both </text:span><text:span text:style-name="Source_20_Text"><text:span text:style-name="T99">FTS5</text:span></text:span><text:span text:style-name="T99"> and </text:span><text:span text:style-name="Source_20_Text"><text:span text:style-name="T99">sqlite-vec</text:span></text:span><text:span text:style-name="T99"> operate as virtual table abstractions. Because they are bolted </text:span><text:span text:style-name="T118">onto</text:span><text:span text:style-name="T99"> SQLite rather than fused into its core, running a hybrid query (e.g., matching a keyword while scanning an ANN graph) requires slow, multi-pass row filtering that prevents unified, cache-line pipeline execution.</text:span></text:p>
        </text:list-item>
      </text:list>
      <text:p text:style-name="Standard"/>
      <text:p text:style-name="Standard"/>
      <text:h text:style-name="P148" text:outline-level="4">DuckDB</text:h>
      <text:list text:style-name="L68">
        <text:list-header>
          <text:p text:style-name="P228"><text:span text:style-name="T8">Architecture:</text:span> An embedded, columnar analytical (OLAP) database engine written in C++, designed for high-performance vector-vector processing, SQL query execution, and large-scale data analysis tabs.</text:p>
        </text:list-header>
      </text:list>
      <text:p text:style-name="P34"/>
      <text:list text:continue-numbering="true" text:style-name="L68">
        <text:list-header>
          <text:p text:style-name="P323">Strengths:</text:p>
        </text:list-header>
        <text:list-item>
          <text:p text:style-name="P272"><text:s/>Blistering speed for columnar math, aggregations, and scanning structured parquet/CSV datasets.</text:p>
        </text:list-item>
        <text:list-item>
          <text:p text:style-name="P272"><text:s/>Deeply sympathetic to modern multi-core hardware, utilizing vectorized execution pipelines natively.</text:p>
        </text:list-item>
        <text:list-item>
          <text:p text:style-name="P272"><text:s/>MIT License.</text:p>
          <text:list>
            <text:list-header>
              <text:p text:style-name="P272"/>
            </text:list-header>
          </text:list>
          <text:p text:style-name="P323">Comparative Weakness:</text:p>
        </text:list-item>
        <text:list-item>
          <text:p text:style-name="P272"><text:span text:style-name="T8"><text:s/>Analytical, Not Information Retrieval:</text:span> DuckDB is an OLAP data-warehouse engine, not an information retrieval system. It completely lacks specialized, structural lexical linguistic pipelines (proximity scanning, positional matrix relevance, and field-weighted tracking arrays).</text:p>
        </text:list-item>
        <text:list-item>
          <text:p text:style-name="P272"><text:span text:style-name="T8"><text:s/>Transient Ingestion Model:</text:span> Designed for read-heavy analytical workloads on relatively static data. High-frequency, random incremental document text updates completely degrade its performance and fragment its columnar memory blocks.</text:p>
        </text:list-item>
      </text:list>
      <text:p text:style-name="Standard"/>
      <text:h text:style-name="P138" text:outline-level="3" text:is-list-header="true">The CoreQuarry Competitive Edge over Embedded Engines</text:h>
      <text:p text:style-name="P81">While SQLite and DuckDB dominate the embedded database ecosystem, they are general-purpose relational and analytical platforms. SQLite treats information retrieval as an isolated virtual table extension, while DuckDB views data exclusively through a data-warehouse column matrix. Neither is built to handle the complex, low-latency demands of real-time hybrid knowledge discovery.</text:p>
      <text:p text:style-name="P87">CoreQuarry delivers a purpose-built architectural alternative:</text:p>
      <text:list text:style-name="L69">
        <text:list-item>
          <text:p text:style-name="P229"><text:span text:style-name="T8">Unified Memory-Mapped Text Spaces:</text:span> Unlike SQLite, which pays a massive serialization and B-Tree indexing tax on text fields, CoreQuarry maps an unfragmented, read-only text buffer directly to virtual memory. Our terminal pipelines run straight against this raw data via highly compact <text:span text:style-name="T8">Patricia Array (PatArray)</text:span> structures, eliminating document-to-row transformation delays completely.</text:p>
        </text:list-item>
        <text:list-item>
          <text:p text:style-name="P229"><text:span text:style-name="T8">Hardware-Fused Core Engines:</text:span> Where SQLite coordinates separate extensions via high-overhead virtual interfaces, CoreQuarry unifies hard text restrictions and soft tensor re-ranking metrics natively. By embedding bit-packed metadata criteria straight inside our 64-bit HNSW graph coordinate labels, we execute complex hybrid searches in a single instruction pass.</text:p>
        </text:list-item>
        <text:list-item>
          <text:p text:style-name="P229"><text:span text:style-name="T8">Saturated Vector/Tensor Pipelines:</text:span> DuckDB excels at processing standard columns but lacks specialized text-sorting architectures. CoreQuarry pairs an embedded <text:span text:style-name="T8">GGML tensor library backend</text:span> with an explicitly unrolled <text:span text:style-name="T8">ARM Neon/SVE2 distance kernel</text:span>. Combined with our <text:span text:style-name="T8">MSD Radix string sort</text:span>—which shapes variable word layouts into fixed, deterministic 64-character compilation horizons—CoreQuarry saturates the CPU's local cache boundaries to deliver <text:soft-page-break/>unparalleled indexing and query performance on bare metal.</text:p>
        </text:list-item>
      </text:list>
      <text:p text:style-name="Standard"/>
      <text:p text:style-name="P65"><text:span text:style-name="T115">T</text:span><text:span text:style-name="T88">he Bottom Line</text:span><text:span text:style-name="T68">:</text:span><text:span text:style-name="T97"> </text:span><text:span text:style-name="T68">If your application needs to compute millions of financial rows or handle standard relational app storage, use DuckDB or SQLite. But if your mission is to embed an elite, low-footprint, bare-metal knowledge stack that effortlessly fuses deep structural text search, massive genomic/long-string sequence matches, and lightning-fast tensor vector re-ranking directly inside your application process, </text:span><text:span text:style-name="T88">CoreQuarry stands completely alone.</text:span></text:p>
      <text:p text:style-name="P65"><text:span text:style-name="T88"/></text:p>
      <text:p text:style-name="P65"><text:span text:style-name="T88"/></text:p>
      <text:h text:style-name="Heading_20_3" text:outline-level="3" text:is-list-header="true"><text:span text:style-name="T3">6</text:span><text:span text:style-name="T4">)</text:span><text:span text:style-name="T3"> </text:span><text:span text:style-name="T5">A</text:span><text:span text:style-name="T130">PPLICATION ORCHESTRATION ARCHITECTURES (RAG PLUMBING)</text:span></text:h>
      <text:p text:style-name="P129"><text:span text:style-name="T99">These are </text:span><text:span text:style-name="Strong_20_Emphasis"><text:span text:style-name="T99">indirect competitors</text:span></text:span><text:span text:style-name="T99">, because they often define the retrieval stack. </text:span><text:span text:style-name="T91">They</text:span><text:span text:style-name="T87"> are plumbing frameworks; they do not solve the underlying hardware efficiency, memory consumption, or retrieval bottlenecks. </text:span></text:p>
      <text:h text:style-name="P148" text:outline-level="4">LangChain</text:h>
      <text:list text:style-name="L70">
        <text:list-header>
          <text:p text:style-name="P273"><text:span text:style-name="T8">Architecture:</text:span> A broad, generic orchestration framework designed to string together LLMs, prompt templates, memories, and external tools via a modular, graph-based or chain-based execution abstractions (LCEL - LangChain Expression Language).</text:p>
          <text:p text:style-name="P230"/>
          <text:p text:style-name="P230"><text:span text:style-name="T9">Strengths</text:span>:</text:p>
          <text:p text:style-name="P230"/>
        </text:list-header>
        <text:list-item>
          <text:p text:style-name="P230"><text:s/>Massive integration ecosystem—can connect almost any LLM provider to any database, API, or vector store.</text:p>
        </text:list-item>
        <text:list-item>
          <text:p text:style-name="P230"><text:s/>Highly flexible for building autonomous multi-agent systems and nondeterministic workflows (via LangGraph).</text:p>
        </text:list-item>
        <text:list-item>
          <text:p text:style-name="P231"><text:s/>MIT License.</text:p>
        </text:list-item>
        <text:list-item>
          <text:p text:style-name="P231"><text:s/>Often integrates with: FAISS, Pinecone <text:span text:style-name="T328">or </text:span>Qdrant</text:p>
        </text:list-item>
      </text:list>
      <text:p text:style-name="P88"><text:span text:style-name="T194"/></text:p>
      <text:p text:style-name="P88"><text:tab/>Comparative Weakness:</text:p>
      <text:list text:style-name="L71">
        <text:list-item>
          <text:p text:style-name="P232"><text:span text:style-name="T8"><text:s/>The Abstraction Tax:</text:span> Heavily layered with nested, convoluted abstractions. A single retrieval step can traverse dozen of Python class wrappers, making debugging, profiling, and optimizing execution latency incredibly difficult.</text:p>
        </text:list-item>
        <text:list-item>
          <text:p text:style-name="P232"><text:span text:style-name="T8"><text:s/>Performance Indifference:</text:span> Written primarily in Python/TypeScript, it makes zero attempts to optimize local hardware pipelines. It relies completely on network I/O or external server-side databases to handle actual data operations.</text:p>
        </text:list-item>
      </text:list>
      <text:p text:style-name="P34"/>
      <text:h text:style-name="P149" text:outline-level="4"><text:span text:style-name="T284">LlamaIndex</text:span> (formerly GPT Index)</text:h>
      <text:list text:style-name="L72">
        <text:list-header>
          <text:p text:style-name="P274"><text:span text:style-name="T57">A</text:span><text:span text:style-name="T114">rchitecture:</text:span><text:span text:style-name="T99"> An orchestration framework explicitly focused on data ingestion, data structuring, and context augmentation for LLMs. It partitions unstructured text into structural </text:span><text:span text:style-name="Source_20_Text"><text:span text:style-name="T99">Node</text:span></text:span><text:span text:style-name="T99"> objects and builds intermediate relational layouts (Vector, Summary, Tree, Graph).</text:span></text:p>
          <text:p text:style-name="P274"><text:span text:style-name="T41"/></text:p>
          <text:p text:style-name="P324">Strengths:</text:p>
        </text:list-header>
        <text:list-item>
          <text:p text:style-name="P274"><text:s/>Elite, out-of-the-box data parsers and connectors (LlamaHub/LlamaParse) for complex enterprise formats like PDFs and slide decks.</text:p>
        </text:list-item>
        <text:list-item>
          <text:p text:style-name="P274"><text:s/>Clean, high-level abstractions designed specifically for context retrieval and response synthesis patterns.</text:p>
        </text:list-item>
        <text:list-item>
          <text:p text:style-name="P274"><text:s/>MIT License.</text:p>
          <text:list>
            <text:list-header>
              <text:p text:style-name="P274"/>
            </text:list-header>
          </text:list>
        </text:list-item>
      </text:list>
      <text:p text:style-name="P86"><text:tab/>Comparative Weakness:</text:p>
      <text:list text:style-name="L73">
        <text:list-item>
          <text:p text:style-name="P275"><text:soft-page-break/><text:span text:style-name="T114"><text:s/>High Ingestion Overheads:</text:span><text:span text:style-name="T99"> Like LangChain, its core data manipulation pipelines run in Python. Converting gigabytes of raw text documents into Python </text:span><text:span text:style-name="Source_20_Text"><text:span text:style-name="T99">Node</text:span></text:span><text:span text:style-name="T99"> dictionary objects creates massive memory inflation and execution slowness during ingestion.</text:span></text:p>
        </text:list-item>
        <text:list-item>
          <text:p text:style-name="P233"><text:span text:style-name="T8"><text:s/>Shallow Internal Data Management:</text:span> While it supports complex data structures concept-side, it doesn't possess a high-performance local storage engine. For production data sizes, it offloads actual data operations to third-party vector databases, inheriting all their structural baggage.</text:p>
        </text:list-item>
      </text:list>
      <text:p text:style-name="P34"/>
      <text:p text:style-name="P57"><text:span text:style-name="T194"/></text:p>
      <text:p text:style-name="P83">The CoreQuarry Competitive Edge over Inefficient Orchestration Tooling:</text:p>
      <text:p text:style-name="P83"><text:span text:style-name="T194"/></text:p>
      <text:p text:style-name="Standard">LangChain and LlamaIndex have popularized the RAG architectural pattern, but they are enterprise orchestrators operating at the topmost layer of the application software stack. They solve the problem of <text:span text:style-name="T283">how to link an LLM API to a data source</text:span>, but they treat the underlying retrieval step as a slow black box—forcing applications to wade through layers of heavy Python abstractions, JSON serialization penalties, and multi-database infrastructure dependencies.</text:p>
      <text:p text:style-name="Standard"/>
      <text:p text:style-name="P70">CoreQuarry bridges the chasm between orchestration logic and hardware performance:</text:p>
      <text:list text:style-name="L74">
        <text:list-item>
          <text:p text:style-name="P234"><text:span text:style-name="T8"><text:s/>Replacing the Python Abstraction Tax with Bare-Metal Speed:</text:span> While LlamaIndex and LangChain inflate an application's RAM usage by converting text fields into complex object trees, CoreQuarry operates entirely within a unified, dependency-free <text:span text:style-name="T8">C++ native environment</text:span>. We ingest, parse, and partition documents with zero serialization overhead, mapping data straight to virtual memory pools.</text:p>
        </text:list-item>
        <text:list-item>
          <text:p text:style-name="P235"><text:span text:style-name="T8"><text:s/>Fused Data &amp; Tensor Execution:</text:span> To implement a basic hybrid RAG loop, LangChain must coordinate a keyword query against one database (like Elasticsearch), run a vector query against another database (like Pinecone), and stitch the results back together in Python code. CoreQuarry completely cuts out this cross-network coordination layer. By embedding bit-packed metadata restrictions directly into our <text:span text:style-name="T8">64-bit HNSW graph coordinate labels</text:span> and running lexical passes through our compact <text:span text:style-name="T8">Patricia Array (PatArray)</text:span> mechanics, hard text filtering and soft semantic tensor calculations are resolved simultaneously in a single, low-latency execution pass.</text:p>
        </text:list-item>
        <text:list-item>
          <text:p text:style-name="P235"><text:span text:style-name="T58"><text:s/>Hardware-Sympathetic Sorting &amp; Inference</text:span><text:span text:style-name="T41">:</text:span><text:span text:style-name="T39"> </text:span><text:span text:style-name="T41">While orchestration frameworks leave vector distance computations and list transformations to external engines, CoreQuarry links its graph traversal directly to an embedded GGML tensor library backend. Our distance loops are explicitly accelerated via custom ARM Neon/SVE2 intrinsics</text:span><text:span text:style-name="T39"> </text:span><text:span text:style-name="T41">and paired with our MSD Radix string sort. By shaping variable term spaces into fixed, deterministic 64-character compilation horizons, CoreQuarry saturates the host CPU's cache line bounds to deliver lightning-fast retrieval speeds on everyday consumer hardware and bare-metal server clusters.</text:span></text:p>
        </text:list-item>
      </text:list>
      <text:p text:style-name="P58"><text:span text:style-name="T41"/></text:p>
      <text:p text:style-name="P34">CoreQuarry does not necessarily replace LangChain or LlamaIndex for complex multi-agent system state management; rather, it makes them obsolete for data-heavy local environments. Instead of deploying a multi-node Kubernetes cluster of vector stores, lexical engines, and Python chunking servers just to pipe context to a local model, CoreQuarry provides a unified, ultra-compact, high-performance embedded data engine that handles the entire retrieval and tensor quantization cycle natively within a single host process.</text:p>
      <text:p text:style-name="P34"><text:span text:style-name="T41"/></text:p>
      <text:p text:style-name="P34"><text:span text:style-name="T41"/></text:p>
      <text:p text:style-name="P34"><text:span text:style-name="T41"/></text:p>
      <text:p text:style-name="P34"><text:span text:style-name="T41"/></text:p>
      <text:h text:style-name="P141" text:outline-level="3" text:is-list-header="true"/>
      <text:h text:style-name="P142" text:outline-level="3" text:is-list-header="true">Architectural &amp; Competitive Breakdown</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8">Competitor Tier / Paradigm</text:p>
            </table:table-cell>
            <table:table-cell table:style-name="Table14.A1" office:value-type="string">
              <text:p text:style-name="P28">Representative Systems</text:p>
            </table:table-cell>
            <table:table-cell table:style-name="Table14.A1" office:value-type="string">
              <text:p text:style-name="P28">Architectural Tax</text:p>
            </table:table-cell>
            <table:table-cell table:style-name="Table14.A1" office:value-type="string">
              <text:p text:style-name="P28">Language / Runtime Issues</text:p>
            </table:table-cell>
            <table:table-cell table:style-name="Table14.A1" office:value-type="string">
              <text:p text:style-name="P28">CoreQuarry's Advantage</text:p>
            </table:table-cell>
          </table:table-row>
        </table:table-header-rows>
        <table:table-row>
          <table:table-cell table:style-name="Table14.A1" office:value-type="string">
            <text:p text:style-name="P47">Classical Inverted IR</text:p>
          </table:table-cell>
          <table:table-cell table:style-name="Table14.A1" office:value-type="string">
            <text:p text:style-name="P59">Apache Lucene, Elasticsearch, Solr, Tantivy</text:p>
          </table:table-cell>
          <table:table-cell table:style-name="Table14.A1" office:value-type="string">
            <text:p text:style-name="P59">Immense RAM burn for memory-resident FST term dictionaries; I/O-heavy background segment merges.</text:p>
          </table:table-cell>
          <table:table-cell table:style-name="Table14.A1" office:value-type="string">
            <text:p text:style-name="P59">Java JVM fragmentation and unpredictable Garbage Collection stalls (Lucene/Solr).</text:p>
          </table:table-cell>
          <table:table-cell table:style-name="Table14.A1" office:value-type="string">
            <text:p text:style-name="P59"><text:span text:style-name="T8">PatArray Architecture:</text:span> Elimination of traditional inverted dictionary bloat via cache-contiguous, virtual memory-mapped pointer tracking layouts.</text:p>
          </table:table-cell>
        </table:table-row>
        <table:table-row>
          <table:table-cell table:style-name="Table14.A1" office:value-type="string">
            <text:p text:style-name="P47">Hybrid &amp; Vector First DBs</text:p>
          </table:table-cell>
          <table:table-cell table:style-name="Table14.A1" office:value-type="string">
            <text:p text:style-name="P59">Weaviate, Qdrant, Milvus</text:p>
          </table:table-cell>
          <table:table-cell table:style-name="Table14.A1" office:value-type="string">
            <text:p text:style-name="P59">Vectors-first focus leaves them with weak lexical capabilities; require separate post-filtering cycles or cross-index stitching.</text:p>
          </table:table-cell>
          <table:table-cell table:style-name="Table14.A1" office:value-type="string">
            <text:p text:style-name="P59">Go runtime memory isolation lag; massive multi-node infrastructure dependencies (Kubernetes).</text:p>
          </table:table-cell>
          <table:table-cell table:style-name="Table14.A1" office:value-type="string">
            <text:p text:style-name="P59"><text:span text:style-name="T8">Hardware-Fused Co-Execution: </text:span>Unifies hard lexical masks and soft tensor weights natively inside single-pass graph traversal runs.</text:p>
          </table:table-cell>
        </table:table-row>
        <table:table-row>
          <table:table-cell table:style-name="Table14.A1" office:value-type="string">
            <text:p text:style-name="P47">Specialized Vector Backends</text:p>
          </table:table-cell>
          <table:table-cell table:style-name="Table14.A1" office:value-type="string">
            <text:p text:style-name="P59">FAISS, ScaNN, Baseline HNSWlib</text:p>
          </table:table-cell>
          <table:table-cell table:style-name="Table14.A1" office:value-type="string">
            <text:p text:style-name="Table_20_Contents"><text:span text:style-name="T194">No native transactional CRUD (FAISS/ScaNN); Baseline HNSWlib forces unquantized </text:span><text:span text:style-name="Source_20_Text"><text:span text:style-name="T194">float32</text:span></text:span><text:span text:style-name="T194"> bloat that exhausts CPU L3 cache pipelines.</text:span></text:p>
          </table:table-cell>
          <table:table-cell table:style-name="Table14.A1" office:value-type="string">
            <text:p text:style-name="P59">Monolithic build matrices (ScaNN/Bazel); lack of native metadata layer capabilities.</text:p>
          </table:table-cell>
          <table:table-cell table:style-name="Table14.A1" office:value-type="string">
            <text:p text:style-name="P59"><text:span text:style-name="T8">Turbo-Quantization Primitives: </text:span>Blistering, explicitly unrolled ARM Neon/SVE2 kernels driven by compact, low-bit block quantization layouts.</text:p>
          </table:table-cell>
        </table:table-row>
        <table:table-row>
          <table:table-cell table:style-name="Table14.A1" office:value-type="string">
            <text:p text:style-name="P47">Embedded Databases</text:p>
          </table:table-cell>
          <table:table-cell table:style-name="Table14.A1" office:value-type="string">
            <text:p text:style-name="P59">SQLite (with extensions), DuckDB</text:p>
          </table:table-cell>
          <table:table-cell table:style-name="Table14.A1" office:value-type="string">
            <text:p text:style-name="P59">Row-store overhead/serialization penalties (SQLite); analytical column matrices entirely lack structural proximity and linguistic IR paths (DuckDB).</text:p>
          </table:table-cell>
          <table:table-cell table:style-name="Table14.A1" office:value-type="string">
            <text:p text:style-name="P59">C++ native but bound to isolated virtual table bridges or transient batch-ingestion models.</text:p>
          </table:table-cell>
          <table:table-cell table:style-name="Table14.A1" office:value-type="string">
            <text:p text:style-name="P59"><text:span text:style-name="T8">In-Process Fusion:</text:span> Zero serialization delays. Text boundaries, sequence configurations, and tensor spaces execute concurrently inside the host app process.</text:p>
          </table:table-cell>
        </table:table-row>
        <table:table-row>
          <table:table-cell table:style-name="Table14.A1" office:value-type="string">
            <text:p text:style-name="P47">RAG Orchestration</text:p>
          </table:table-cell>
          <table:table-cell table:style-name="Table14.A1" office:value-type="string">
            <text:p text:style-name="P59">LlamaIndex, LangChain</text:p>
          </table:table-cell>
          <table:table-cell table:style-name="Table14.A1" office:value-type="string">
            <text:p text:style-name="P59">The "Abstraction Tax." Massive performance degradation by shifting core document segmentation and data mapping to Python object layers.</text:p>
          </table:table-cell>
          <table:table-cell table:style-name="Table14.A1" office:value-type="string">
            <text:p text:style-name="P59">Python/TypeScript runtime speed ceilings; rely completely on network I/O or external cluster storage engines.</text:p>
          </table:table-cell>
          <table:table-cell table:style-name="Table14.A1" office:value-type="string">
            <text:p text:style-name="P59"><text:span text:style-name="T8">Bare-Metal Efficiency:</text:span> Fuses the entire ingestion, parsing, tensor quantization, and hybrid discovery lifecycle into a single native runtime.</text:p>
          </table:table-cell>
        </table:table-row>
        <table:table-row>
          <table:table-cell table:style-name="Table14.A1" office:value-type="string">
            <text:p text:style-name="P47">Structural Lexical Search</text:p>
          </table:table-cell>
          <table:table-cell table:style-name="Table14.A1" office:value-type="string">
            <text:p text:style-name="P59">MarkLogic</text:p>
          </table:table-cell>
          <table:table-cell table:style-name="Table14.A1" office:value-type="string">
            <text:p text:style-name="P59">Heavy enterprise server monolith; massive memory-resident cache footprints (List/Range Caches).</text:p>
          </table:table-cell>
          <table:table-cell table:style-name="Table14.A1" office:value-type="string">
            <text:p text:style-name="P59">Proprietary closed-source distribution; completely un-optimized for embedded edge execution topologies.</text:p>
          </table:table-cell>
          <table:table-cell table:style-name="Table14.A1" office:value-type="string">
            <text:p text:style-name="P60"><text:span text:style-name="T17">Gonnet/</text:span><text:span text:style-name="T8">Baeza-Yates Inspired Lineage: </text:span>Elevates early structured text principles to modern silicon. Uses branchless SIMD and MSD Radix sorting over fixed-width 64-character compilation horizons.</text:p>
          </table:table-cell>
        </table:table-row>
      </table:table>
      <text:p text:style-name="P118"><text:span text:style-name="T294"/></text:p>
      <text:p text:style-name="P119"><text:span text:style-name="T294">Appendix I</text:span><text:span text:style-name="T298">V</text:span><text:span text:style-name="T294">: Used Technologies and main AI tech</text:span></text:p>
      <text:p text:style-name="P12"/>
      <text:p text:style-name="P34"><text:span text:style-name="T21">The core is </text:span><text:span text:style-name="T229">a </text:span><text:span text:style-name="T30">novel multimodal search and retrieval engine. It is </text:span><text:span text:style-name="T230">a kind of hybrid between full-text, XML, object and graph noSQL-db that natively ingests a wide range of document types and </text:span><text:span text:style-name="T231">data </text:span><text:span text:style-name="T230">formats. </text:span><text:span text:style-name="T232">Lexical search is based not on inverted indexes but on Pat </text:span><text:span text:style-name="T231">Arrays</text:span><text:span text:style-name="T232"> with a two-tier address-based caching system that solve</text:span><text:span text:style-name="T231">d </text:span><text:span text:style-name="T232">its main limitations. <text:s/>Dense vector search is handled by HNSW. The implementation is based on the HNSWlib references but heavily enhanced and turbo-charged. <text:s/></text:span></text:p>
      <text:p text:style-name="P34"><text:span text:style-name="T232"/></text:p>
      <text:p text:style-name="P184" loext:marker-style-name="T233"><text:span text:style-name="T239">Behind our embeddings is our fork of bert.cpp and the mainlined llama.cpp. Behind these is the GGML tensor library. <text:s/>Unlike mainstream vendor libraries (like PyTorch, TensorFlow, or TensorRT) built for data-center GPUs, GGML runs large transformer models efficiently on commodity hardware.</text:span></text:p>
      <text:p text:style-name="P186" loext:marker-style-name="T233"><text:span text:style-name="T238"/></text:p>
      <text:p text:style-name="P179" loext:marker-style-name="T233"><text:span text:style-name="T228">1. </text:span><text:span text:style-name="T236">Superior CPU and Edge Device Executio</text:span><text:span text:style-name="T228">n.</text:span></text:p>
      <text:p text:style-name="P179" loext:marker-style-name="T233"><text:span text:style-name="T228">Mainstream libraries rely heavily on massive GPU VRAM to hold model weights during inference. GGML is written in plain C and C++, making it highly portable.</text:span><text:span text:style-name="T228"/></text:p>
      <text:list text:style-name="L75">
        <text:list-item>
          <text:p text:style-name="P276" loext:marker-style-name="T233"><text:span text:style-name="T241">Zero Dependencies</text:span><text:span text:style-name="T240">: It requires no heavy third-party stacks (such as CUDA or ROCm) just to run on a standard machine.</text:span></text:p>
        </text:list-item>
        <text:list-item>
          <text:p text:style-name="P276" loext:marker-style-name="T233"><text:span text:style-name="T241">Hardware Interoperability</text:span><text:span text:style-name="T240">: It is optimized for x86 architectures (AVX, AVX2, AVX-512) and Apple Silicon (via native ARM NEON and Metal).</text:span></text:p>
        </text:list-item>
        <text:list-item>
          <text:p text:style-name="P276" loext:marker-style-name="T233"><text:span text:style-name="T241">System RAM Utilization</text:span><text:span text:style-name="T240">: Because most modern consumer computers feature far more system RAM than GPU VRAM, GGML natively bridges the gap by enabling models to run efficiently on standard CPUs or via CPU-GPU offloading.</text:span></text:p>
          <text:p text:style-name="P276" loext:marker-style-name="T233"><text:span text:style-name="T240"/></text:p>
        </text:list-item>
      </text:list>
      <text:p text:style-name="P277" loext:marker-style-name="T233"><text:span text:style-name="T240">2. </text:span><text:span text:style-name="T242">Accelerators</text:span><text:span text:style-name="T240">: GGML features a highly modular backend architecture. This layout allows it to offload computation graph execution to a variety of hardware accelerators via specific hardware drivers, completely bypassing heavy Python stacks.</text:span></text:p>
      <text:p text:style-name="P283" loext:marker-style-name="T233"/>
      <text:p text:style-name="P179" loext:marker-style-name="T233"><text:span text:style-name="T228">3. </text:span><text:span text:style-name="T236">Advanced, Fine-Grained Quantization</text:span><text:span text:style-name="T228">: One of GGML's most compelling features is its pioneering approach to model quantization (compressing floating-point numbers into lower bit-widths, such as 4-bit or 5-bit).</text:span></text:p>
      <text:list text:style-name="L76">
        <text:list-item>
          <text:p text:style-name="P278" loext:marker-style-name="T233"><text:span text:style-name="T241">K-Quants</text:span><text:span text:style-name="T240">: GGML utilizes highly engineered, variable bit-width quantization strategies (like Q4_K_M) that minimize the traditional loss in output accuracy.</text:span></text:p>
        </text:list-item>
        <text:list-item>
          <text:p text:style-name="P278" loext:marker-style-name="T233"><text:span text:style-name="T241">Memory Compression</text:span><text:span text:style-name="T240">: It shrinks the memory footprint of massive models by up to 70-80% without heavily compromising the model's perplexity or reasoning capabilities.</text:span></text:p>
        </text:list-item>
      </text:list>
      <text:p text:style-name="P285" loext:marker-style-name="T233"/>
      <text:p text:style-name="P179" loext:marker-style-name="T233"><text:span text:style-name="T228">4. </text:span><text:span text:style-name="T236">Streamlined Portabilit</text:span><text:span text:style-name="T228">y (The GGUF Standard). GGML's associated file format, GGUF, was specifically designed to solve the fragmentation and loading issues of older ML formats.</text:span></text:p>
      <text:p text:style-name="P285" loext:marker-style-name="T233"/>
      <text:p text:style-name="P179" loext:marker-style-name="T233"><text:span text:style-name="T228">5. </text:span><text:span text:style-name="T236">No Python Overhead</text:span></text:p>
      <text:p text:style-name="P285" loext:marker-style-name="T233"/>
      <text:p text:style-name="P179" loext:marker-style-name="T233"><text:span text:style-name="T228">6. </text:span><text:span text:style-name="T236">Specialized Text-Generation Ecosystem</text:span></text:p>
      <text:p text:style-name="P285" loext:marker-style-name="T233"/>
      <text:p text:style-name="P179" loext:marker-style-name="T233"><text:span text:style-name="T228">While mainstream libraries like TensorRT or PyTorch remain undisputed for model training and high-throughput server farms, GGML democratizes access to AI by allowing us to run powerful models locally on mainstream hardware.</text:span><text:span text:style-name="T228"/></text:p>
      <text:p text:style-name="P285" loext:marker-style-name="T233"/>
      <text:p text:style-name="P110">While we build upon a heavily refactored bert.cpp we also support llama.cpp for more modern sophisticated models that don't use the BERT architecture such as EuroBERT.</text:p>
      <text:p text:style-name="P31"><text:span text:style-name="T228"/></text:p>
      <text:p text:style-name="P2"><text:span text:style-name="T243">Appendix </text:span><text:span text:style-name="T244">V</text:span><text:span text:style-name="T243">: </text:span><text:span text:style-name="T245">Accelerators</text:span></text:p>
      <text:p text:style-name="P179" loext:marker-style-name="T233"><text:span text:style-name="T245">Our <text:s/></text:span><text:span text:style-name="T246">lexical algorithms and </text:span><text:span text:style-name="T245">HNSW implementation is, by design, CPU bound (</text:span><text:span text:style-name="T246">the later </text:span><text:span text:style-name="T245">using heavily optimized SIMD instructions) to leave the accelerators free to do the heavy lifting of running the models. Even on an Apple M1 (Pro) we've clocked 13k QPS-- on an M5 Pro we expect 30,000 to 39,000+ QPS-- so </text:span><text:soft-page-break/><text:span text:style-name="T245">we found ample state-of-the-art performance already on CPUs.</text:span></text:p>
      <text:p text:style-name="P189" loext:marker-style-name="T233"><text:span text:style-name="T228"/></text:p>
      <text:p text:style-name="P179" loext:marker-style-name="T233"><text:span text:style-name="T245">1. </text:span><text:span text:style-name="T237">NVIDIA CUDA</text:span></text:p>
      <text:list text:style-name="L77">
        <text:list-item>
          <text:p text:style-name="P279" loext:marker-style-name="T233"><text:span text:style-name="T240"><text:s/></text:span><text:span text:style-name="T241">Quality</text:span><text:span text:style-name="T240">: This is the most mature, heavily optimized backend in the GGML ecosystem. It receives immediate day-one updates for new architectures.</text:span></text:p>
        </text:list-item>
        <text:list-item>
          <text:p text:style-name="P279" loext:marker-style-name="T233"><text:span text:style-name="T241">Performance</text:span><text:span text:style-name="T240">: Offers the highest token-per-second generation rates. It handles massive context windows and batched requests effortlessly.</text:span></text:p>
        </text:list-item>
        <text:list-item>
          <text:p text:style-name="P279" loext:marker-style-name="T233"><text:span text:style-name="T241">Efficiency</text:span><text:span text:style-name="T240">: While desktop NVIDIA cards draw significant wattage, the work-per-watt remains high because the GPU completes the generation sequence rapidly and returns to idle.</text:span></text:p>
        </text:list-item>
      </text:list>
      <text:p text:style-name="P285" loext:marker-style-name="T233"/>
      <text:p text:style-name="P179" loext:marker-style-name="T233"><text:span text:style-name="T228">2. </text:span><text:span text:style-name="T236">Apple Metal </text:span></text:p>
      <text:list text:style-name="L78">
        <text:list-item>
          <text:p text:style-name="P280" loext:marker-style-name="T233"><text:span text:style-name="T241">Quality</text:span><text:span text:style-name="T240">: Flawless integration natively recognized by macOS and iOS.</text:span></text:p>
        </text:list-item>
        <text:list-item>
          <text:p text:style-name="P280" loext:marker-style-name="T233"><text:span text:style-name="T241">Performance</text:span><text:span text:style-name="T240">: Extremely rapid. Because Apple Silicon uses a Unified Memory Architecture, the CPU and GPU share the same physical RAM pool. GGML leverages this via mmap, allowing a model to load instantly without a slow transfer over a PCIe bus.</text:span></text:p>
        </text:list-item>
        <text:list-item>
          <text:p text:style-name="P280" loext:marker-style-name="T233"><text:span text:style-name="T241">Efficiency</text:span><text:span text:style-name="T240">: Unmatched. Users can run quantized 70B models locally on a MacBook with minimal heat production, preserving battery life during background operations.</text:span></text:p>
        </text:list-item>
      </text:list>
      <text:p text:style-name="P285" loext:marker-style-name="T233"/>
      <text:p text:style-name="P179" loext:marker-style-name="T233"><text:span text:style-name="T228">3. </text:span><text:span text:style-name="T236">Vulkan</text:span><text:span text:style-name="T228"> (The Compatibility Champion)</text:span></text:p>
      <text:list text:style-name="L79">
        <text:list-item>
          <text:p text:style-name="P281" loext:marker-style-name="T233"><text:span text:style-name="T241">Quality</text:span><text:span text:style-name="T240">: Highly robust and serves as the best open-source, vendor-agnostic fallback.</text:span></text:p>
        </text:list-item>
        <text:list-item>
          <text:p text:style-name="P281" loext:marker-style-name="T233"><text:span text:style-name="T241">Performance</text:span><text:span text:style-name="T240">: While it slightly lags behind native CUDA or ROCm tweaks, it delivers impressive matrix-multiplication speeds across diverse hardware, including Steam Decks, Raspberry Pis, and mixed-GPU setups.</text:span></text:p>
        </text:list-item>
        <text:list-item>
          <text:p text:style-name="P281" loext:marker-style-name="T233"><text:span text:style-name="T241">Efficiency</text:span><text:span text:style-name="T240">: Balanced. Vulkan provides hardware acceleration on low-power devices that lack dedicated AI chips.</text:span></text:p>
        </text:list-item>
      </text:list>
      <text:p text:style-name="P285" loext:marker-style-name="T233"/>
      <text:p text:style-name="P2"><text:span text:style-name="T245"/></text:p>
      <text:p text:style-name="P31"/>
      <text:p text:style-name="P1"><text:span text:style-name="T227">Appendix </text:span><text:span text:style-name="T279">V</text:span><text:span text:style-name="T314">I</text:span><text:span text:style-name="T227">: </text:span>Vector search performance</text:p>
      <text:p text:style-name="P8"/>
      <text:p text:style-name="P130">Speed matters because RAG pipelines are dominated by retrieval latency. <text:span text:style-name="T25">F</text:span>aster retrieval can dramatically improve RAG pipelines</text:p>
      <text:p text:style-name="P326">Benchmarking on:</text:p>
      <text:p text:style-name="P289" loext:marker-style-name="T248"><text:span text:style-name="T249"><text:s text:c="2"/>Model Name:<text:tab/>MacBook Pro</text:span><text:span text:style-name="T249"/></text:p>
      <text:p text:style-name="P289" loext:marker-style-name="T248"><text:span text:style-name="T249"><text:s text:c="2"/>Model Identifier:<text:tab/>MacBookPro18,1</text:span><text:span text:style-name="T249"/></text:p>
      <text:p text:style-name="P289" loext:marker-style-name="T248"><text:span text:style-name="T249"><text:s text:c="2"/>Model Number:<text:tab/>MK183D/A</text:span><text:span text:style-name="T249"/></text:p>
      <text:p text:style-name="P289" loext:marker-style-name="T248"><text:span text:style-name="T249"><text:s text:c="2"/>Chip:<text:tab/>Apple M1 Pro</text:span><text:span text:style-name="T249"/></text:p>
      <text:p text:style-name="P289" loext:marker-style-name="T248"><text:span text:style-name="T249"><text:s text:c="2"/>Total Number of Cores:<text:tab/>10 (8 performance and 2 efficiency)</text:span><text:span text:style-name="T249"/></text:p>
      <text:p text:style-name="P289" loext:marker-style-name="T248"><text:span text:style-name="T249"><text:s text:c="2"/>Memory:<text:tab/>16 GB</text:span><text:span text:style-name="T249"/></text:p>
      <text:p text:style-name="P289" loext:marker-style-name="T248"><text:span text:style-name="T249"><text:s text:c="2"/>System Firmware Version:<text:tab/>11881.140.96</text:span><text:span text:style-name="T249"/></text:p>
      <text:p text:style-name="P289" loext:marker-style-name="T248"><text:span text:style-name="T249"><text:s text:c="2"/>OS Loader Version:<text:tab/>11881.140.96</text:span><text:span text:style-name="T249"/></text:p>
      <text:p text:style-name="P293" loext:marker-style-name="T248"><text:span text:style-name="T247"><text:s/></text:span></text:p>
      <text:p text:style-name="P294" loext:marker-style-name="T248"><text:span text:style-name="T247">as a baseline for a minimal probable use.</text:span></text:p>
      <text:p text:style-name="P121"><text:span text:style-name="T247"/></text:p>
      <table:table table:name="Table1" table:style-name="Table1">
        <table:table-column table:style-name="Table1.A"/>
        <table:table-column table:style-name="Table1.B"/>
        <table:table-column table:style-name="Table1.C"/>
        <table:table-row>
          <table:table-cell table:style-name="Table1.A1" office:value-type="string">
            <text:p text:style-name="P9">System</text:p>
          </table:table-cell>
          <table:table-cell table:style-name="Table1.A1" office:value-type="string">
            <text:p text:style-name="P9">Approx QPS (768d)</text:p>
          </table:table-cell>
          <table:table-cell table:style-name="Table1.A1" office:value-type="string">
            <text:p text:style-name="P9">Notes</text:p>
          </table:table-cell>
        </table:table-row>
        <table:table-row>
          <table:table-cell table:style-name="Table1.A1" office:value-type="string">
            <text:p text:style-name="P42">Qdrant</text:p>
          </table:table-cell>
          <table:table-cell table:style-name="Table1.A1" office:value-type="string">
            <text:p text:style-name="P42">~1k–3k</text:p>
          </table:table-cell>
          <table:table-cell table:style-name="Table1.A1" office:value-type="string">
            <text:p text:style-name="P42">depends heavily on HNSW tuning</text:p>
          </table:table-cell>
        </table:table-row>
        <table:table-row table:style-name="Table1.3">
          <table:table-cell table:style-name="Table1.A1" office:value-type="string">
            <text:p text:style-name="P42">Milvus</text:p>
          </table:table-cell>
          <table:table-cell table:style-name="Table1.A1" office:value-type="string">
            <text:p text:style-name="P42">~2k–5k</text:p>
          </table:table-cell>
          <table:table-cell table:style-name="Table1.A1" office:value-type="string">
            <text:p text:style-name="P42">heavier infra</text:p>
          </table:table-cell>
        </table:table-row>
        <text:soft-page-break/>
        <table:table-row>
          <table:table-cell table:style-name="Table1.A1" office:value-type="string">
            <text:p text:style-name="P42">FAISS</text:p>
          </table:table-cell>
          <table:table-cell table:style-name="Table1.A1" office:value-type="string">
            <text:p text:style-name="P42">~5k–10k</text:p>
          </table:table-cell>
          <table:table-cell table:style-name="Table1.A1" office:value-type="string">
            <text:p text:style-name="P42">optimized C++ but limited system features</text:p>
          </table:table-cell>
        </table:table-row>
        <table:table-row>
          <table:table-cell table:style-name="Table1.A1" office:value-type="string">
            <text:p text:style-name="P42">Elasticsearch</text:p>
          </table:table-cell>
          <table:table-cell table:style-name="Table1.A1" office:value-type="string">
            <text:p text:style-name="P42">usually &lt;2k</text:p>
          </table:table-cell>
          <table:table-cell table:style-name="Table1.A1" office:value-type="string">
            <text:p text:style-name="P42">heavy overhead</text:p>
          </table:table-cell>
        </table:table-row>
        <table:table-row>
          <table:table-cell table:style-name="Table1.A1" office:value-type="string">
            <text:p text:style-name="P48">Quarry HNSW</text:p>
          </table:table-cell>
          <table:table-cell table:style-name="Table1.A1" office:value-type="string">
            <text:p text:style-name="P48">13k</text:p>
          </table:table-cell>
          <table:table-cell table:style-name="Table1.A1" office:value-type="string">
            <text:p text:style-name="P48">C++.</text:p>
          </table:table-cell>
        </table:table-row>
      </table:table>
      <text:p text:style-name="Text_20_body"/>
      <text:p text:style-name="P10"><text:span text:style-name="T25">Comparing to</text:span> FAISS and single thread<text:span text:style-name="T25">:</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Index type</text:p>
          </table:table-cell>
          <table:table-cell table:style-name="Table2.A1" office:value-type="string">
            <text:p text:style-name="P9">Dataset size</text:p>
          </table:table-cell>
          <table:table-cell table:style-name="Table2.A1" office:value-type="string">
            <text:p text:style-name="P9">QPS (1 thread)</text:p>
          </table:table-cell>
          <table:table-cell table:style-name="Table2.A1" office:value-type="string">
            <text:p text:style-name="P9">Notes</text:p>
          </table:table-cell>
        </table:table-row>
        <table:table-row>
          <table:table-cell table:style-name="Table2.A1" office:value-type="string">
            <text:p text:style-name="P42">Flat (exact search)</text:p>
          </table:table-cell>
          <table:table-cell table:style-name="Table2.A1" office:value-type="string">
            <text:p text:style-name="P42">1M vectors</text:p>
          </table:table-cell>
          <table:table-cell table:style-name="Table2.A1" office:value-type="string">
            <text:p text:style-name="P42">40–120 QPS</text:p>
          </table:table-cell>
          <table:table-cell table:style-name="Table2.A1" office:value-type="string">
            <text:p text:style-name="P42">brute-force dot products</text:p>
          </table:table-cell>
        </table:table-row>
        <table:table-row>
          <table:table-cell table:style-name="Table2.A1" office:value-type="string">
            <text:p text:style-name="P42">IVFFlat</text:p>
          </table:table-cell>
          <table:table-cell table:style-name="Table2.A1" office:value-type="string">
            <text:p text:style-name="P42">1M vectors</text:p>
          </table:table-cell>
          <table:table-cell table:style-name="Table2.A1" office:value-type="string">
            <text:p text:style-name="P42">150–400 QPS</text:p>
          </table:table-cell>
          <table:table-cell table:style-name="Table2.A1" office:value-type="string">
            <text:p text:style-name="P42">typical ANN config</text:p>
          </table:table-cell>
        </table:table-row>
        <table:table-row>
          <table:table-cell table:style-name="Table2.A1" office:value-type="string">
            <text:p text:style-name="P42">IVFPQ</text:p>
          </table:table-cell>
          <table:table-cell table:style-name="Table2.A1" office:value-type="string">
            <text:p text:style-name="P42">1M vectors</text:p>
          </table:table-cell>
          <table:table-cell table:style-name="Table2.A1" office:value-type="string">
            <text:p text:style-name="P42">300–900 QPS</text:p>
          </table:table-cell>
          <table:table-cell table:style-name="Table2.A1" office:value-type="string">
            <text:p text:style-name="P42">quantized vectors</text:p>
          </table:table-cell>
        </table:table-row>
        <table:table-row>
          <table:table-cell table:style-name="Table2.A1" office:value-type="string">
            <text:p text:style-name="P42">HNSW (FAISS)</text:p>
          </table:table-cell>
          <table:table-cell table:style-name="Table2.A1" office:value-type="string">
            <text:p text:style-name="P42">1M vectors</text:p>
          </table:table-cell>
          <table:table-cell table:style-name="Table2.A1" office:value-type="string">
            <text:p text:style-name="P42">200–600 QPS</text:p>
          </table:table-cell>
          <table:table-cell table:style-name="Table2.A1" office:value-type="string">
            <text:p text:style-name="P42">depends heavily on efSearch</text:p>
          </table:table-cell>
        </table:table-row>
        <table:table-row>
          <table:table-cell table:style-name="Table2.A1" office:value-type="string">
            <text:p text:style-name="P48">Quarry HNSW</text:p>
          </table:table-cell>
          <table:table-cell table:style-name="Table2.A1" office:value-type="string">
            <text:p text:style-name="P48">1M vectors</text:p>
          </table:table-cell>
          <table:table-cell table:style-name="Table2.A1" office:value-type="string">
            <text:p text:style-name="P48">3000 QPS</text:p>
          </table:table-cell>
          <table:table-cell table:style-name="Table2.A1" office:value-type="string">
            <text:p text:style-name="P48">Faster for quantized vectors</text:p>
          </table:table-cell>
        </table:table-row>
      </table:table>
      <text:p text:style-name="P14"/>
      <text:p text:style-name="P34"><text:span text:style-name="T25">T</text:span><text:span text:style-name="T264">he C++ HNSWlib was already one of the fastest HNSW implementations on the market. </text:span><text:span text:style-name="T266">We kept to</text:span><text:span text:style-name="T264"> CPU only (to allow better utiliz</text:span><text:span text:style-name="T265">at</text:span><text:span text:style-name="T264">ion of the accelerators for the embedding models) but turbo-charged it to be 4-6x faster with Fp32 on ARM hardware </text:span><text:span text:style-name="T266">and</text:span><text:span text:style-name="T168"> </text:span><text:span text:style-name="T169">expanded it </text:span><text:span text:style-name="T168">support </text:span><text:span text:style-name="T169">larger</text:span><text:span text:style-name="T168"> datasets through </text:span><text:span text:style-name="T169">the reduction of memory demands through </text:span><text:span text:style-name="T168">quantization. </text:span><text:span text:style-name="T25">Comparing our optimized version with a straight compile (Clang without -O) the difference was 20x on an Apple M1. We also added </text:span><text:span text:style-name="T272">support </text:span><text:span text:style-name="T25">for pre-quantised models. These require not just much less memory but are also significantly faster than Fp32 </text:span><text:span text:style-name="T272">models—</text:span><text:span text:style-name="T273">since we implemented pass-through our HNSW graph networks also demand far less memory than solutions that pad to Fp32</text:span><text:span text:style-name="T25">.</text:span></text:p>
      <text:p text:style-name="P34"/>
      <text:p text:style-name="P122"><text:span text:style-name="T299">Appendix </text:span><text:span text:style-name="T300">V</text:span><text:span text:style-name="T301">I</text:span><text:span text:style-name="T302">I</text:span><text:span text:style-name="T299">: </text:span><text:span text:style-name="T302">Vectorization</text:span><text:span text:style-name="T294"> performance</text:span></text:p>
      <text:p text:style-name="P180" loext:marker-style-name="T233"><text:span text:style-name="T228">We are developing and benchmarking using the M1 as a baseline upon which to base preformance expectations. Instead of demanding the latest and greatest (or an array of H200s) our design goals and const</text:span><text:span text:style-name="T251">r</text:span><text:span text:style-name="T228">aints are to provide useful performance on literal</text:span><text:span text:style-name="T251">l</text:span><text:span text:style-name="T228">y "the smallest machine possible"— </text:span><text:span text:style-name="T251">a</text:span><text:span text:style-name="T228">nd not to demand some hyperscalar cluster.</text:span></text:p>
      <text:p text:style-name="P185" loext:marker-style-name="T233"><text:span text:style-name="T250"/></text:p>
      <text:p text:style-name="P290" loext:marker-style-name="T233"><text:span text:style-name="T228">model: <text:s text:c="2"/>sentence-transformers_all-MiniLM-L12-v2</text:span><text:span text:style-name="T228"/></text:p>
      <text:p text:style-name="P290" loext:marker-style-name="T233"><text:span text:style-name="T228">main: <text:s text:c="3"/>token time = <text:s text:c="4"/>0.03 ms / 0.01 ms per token</text:span><text:span text:style-name="T228"/></text:p>
      <text:p text:style-name="P290" loext:marker-style-name="T233"><text:span text:style-name="T228">main: <text:s text:c="4"/>eval time = <text:s text:c="3"/>15.07 ms / 3.77 ms per token</text:span></text:p>
      <text:p text:style-name="P290" loext:marker-style-name="T233"><text:span text:style-name="T228"/></text:p>
      <text:p text:style-name="P291" loext:marker-style-name="T233"><text:span text:style-name="T228">model: <text:s text:c="2"/>sentence-transformers_all-MiniLM-L12-v2-f32.gguf</text:span></text:p>
      <text:p text:style-name="P291" loext:marker-style-name="T233"><text:span text:style-name="T228">main: <text:s text:c="3"/>token time = <text:s text:c="4"/>0.02 ms / 0.00 ms per token</text:span></text:p>
      <text:p text:style-name="P291" loext:marker-style-name="T233">main: <text:s text:c="4"/>eval time = <text:s text:c="3"/>21.52 ms / 5.38 ms per token</text:p>
      <text:p text:style-name="P291" loext:marker-style-name="T233"/>
      <text:p text:style-name="P290" loext:marker-style-name="T233"><text:span text:style-name="T228">model: <text:s text:c="2"/>bge-large-en-v1.5-q4_k_m.gguf</text:span><text:span text:style-name="T228"/></text:p>
      <text:p text:style-name="P290" loext:marker-style-name="T233"><text:span text:style-name="T228">main: <text:s text:c="3"/>token time = <text:s text:c="4"/>0.03 ms / 0.01 ms per token</text:span><text:span text:style-name="T228"/></text:p>
      <text:p text:style-name="P290" loext:marker-style-name="T233"><text:span text:style-name="T228">main: <text:s text:c="4"/>eval time = <text:s text:c="3"/>30.91 ms / 7.73 ms per token</text:span></text:p>
      <text:p text:style-name="P284" loext:marker-style-name="T233"/>
      <text:p text:style-name="P179" loext:marker-style-name="T233"><text:span text:style-name="T228">Turning now to a 335-million parameter model and more exhaustive production-like benchmarks:</text:span></text:p>
      <text:p text:style-name="P292" loext:marker-style-name="T233"><text:span text:style-name="T228"/></text:p>
      <text:p text:style-name="P290" loext:marker-style-name="T233"><text:span text:style-name="T228">Model: bge-large-en-v1.5 <text:s/>arch=bert <text:s/>n_embd=1024 <text:s/>load=150 ms Warmup=5 iters, measure=50 iters</text:span></text:p>
      <text:p text:style-name="P287" loext:marker-style-name="T233"/>
      <text:p text:style-name="P290" loext:marker-style-name="T233"><text:span text:style-name="T228">== latency by input length (batch=1) ==</text:span><text:span text:style-name="T228"/></text:p>
      <text:p text:style-name="P290" loext:marker-style-name="T233"><text:soft-page-break/><text:span text:style-name="T228"><text:s text:c="2"/>very-short <text:s text:c="4"/>tok= 11 <text:s/>bs= <text:s/>1 <text:s/>| mean= <text:s/>17.47 ms <text:s/>med= <text:s/>17.47 <text:s/>p95= <text:s/>18.01 <text:s/>min= 16.93 <text:s/>max= 18.38 <text:s/>| <text:s text:c="5"/>630 tok/s <text:s text:c="4"/>57.3 seq/s</text:span><text:span text:style-name="T228"/></text:p>
      <text:p text:style-name="P290" loext:marker-style-name="T233"><text:span text:style-name="T228"><text:s text:c="2"/>short <text:s text:c="9"/>tok= 38 <text:s/>bs= <text:s/>1 <text:s/>| mean= <text:s/>23.97 ms <text:s/>med= <text:s/>23.83 <text:s/>p95= <text:s/>24.92 <text:s/>min= 22.97 <text:s/>max= 25.14 <text:s/>| <text:s text:c="4"/>1586 tok/s <text:s text:c="4"/>41.7 seq/s</text:span><text:span text:style-name="T228"/></text:p>
      <text:p text:style-name="P290" loext:marker-style-name="T233"><text:span text:style-name="T228"><text:s text:c="2"/>medium <text:s text:c="8"/>tok=137 <text:s/>bs= <text:s/>1 <text:s/>| mean= <text:s/>44.67 ms <text:s/>med= <text:s/>44.41 <text:s/>p95= <text:s/>46.24 <text:s/>min= 43.39 <text:s/>max= 46.92 <text:s/>| <text:s text:c="4"/>3067 tok/s <text:s text:c="4"/>22.4 seq/s</text:span><text:span text:style-name="T228"/></text:p>
      <text:p text:style-name="P290" loext:marker-style-name="T233"><text:span text:style-name="T228"><text:s text:c="2"/>long <text:s text:c="10"/>tok=263 <text:s/>bs= <text:s/>1 <text:s/>| mean= <text:s/>78.83 ms <text:s/>med= <text:s/>78.07 <text:s/>p95= <text:s/>81.44 <text:s/>min= 76.53 <text:s/>max= 82.25 <text:s/>| <text:s text:c="4"/>3336 tok/s <text:s text:c="4"/>12.7 seq/s</text:span><text:span text:style-name="T228"/></text:p>
      <text:p text:style-name="P290" loext:marker-style-name="T233"><text:span text:style-name="T228"><text:s text:c="2"/>max <text:s text:c="11"/>tok=512 <text:s/>bs= <text:s/>1 <text:s/>| mean= 132.63 ms <text:s/>med= 132.67 <text:s/>p95= 133.81 <text:s/>min=130.45 <text:s/>max=134.25 <text:s/>| <text:s text:c="4"/>3860 tok/s <text:s text:c="5"/>7.5 seq/s</text:span><text:span text:style-name="T228"/></text:p>
      <text:p text:style-name="P287" loext:marker-style-name="T233"/>
      <text:p text:style-name="P290" loext:marker-style-name="T233"><text:span text:style-name="T228">== throughput by batch size (tok=128) ==</text:span><text:span text:style-name="T228"/></text:p>
      <text:p text:style-name="P290" loext:marker-style-name="T233"><text:span text:style-name="T228"><text:s text:c="2"/>bs=1 <text:s text:c="10"/>tok=137 <text:s/>bs= <text:s/>1 <text:s/>| mean= <text:s/>44.20 ms <text:s/>med= <text:s/>43.95 <text:s/>p95= <text:s/>45.58 <text:s/>min= 43.41 <text:s/>max= 46.02 <text:s/>| <text:s text:c="4"/>3100 tok/s <text:s text:c="4"/>22.6 seq/s</text:span><text:span text:style-name="T228"/></text:p>
      <text:p text:style-name="P290" loext:marker-style-name="T233"><text:span text:style-name="T228"><text:s text:c="2"/>bs=4 <text:s text:c="10"/>tok=137 <text:s/>bs= <text:s/>4 <text:s/>| mean= 161.03 ms <text:s/>med= 160.01 <text:s/>p95= 166.50 <text:s/>min=156.61 <text:s/>max=167.15 <text:s/>| <text:s text:c="4"/>3403 tok/s <text:s text:c="4"/>24.8 seq/s</text:span><text:span text:style-name="T228"/></text:p>
      <text:p text:style-name="P290" loext:marker-style-name="T233"><text:span text:style-name="T228"><text:s text:c="2"/>bs=8 <text:s text:c="10"/>tok=137 <text:s/>bs= <text:s/>8 <text:s/>| mean= 314.57 ms <text:s/>med= 313.94 <text:s/>p95= 324.07 <text:s/>min=291.38 <text:s/>max=328.69 <text:s/>| <text:s text:c="4"/>3484 tok/s <text:s text:c="4"/>25.4 seq/s</text:span></text:p>
      <text:p text:style-name="P287" loext:marker-style-name="T233"/>
      <text:p text:style-name="P179" loext:marker-style-name="T233"><text:span text:style-name="T228">Because throughput peaks at around 3,484 tokens/sec (0.29 ms per token) we use these metrics to calculate some real-world document ingestion limits. <text:s/>If you block your raw text files into standard overlapping paragraph windows of roughly 256 tokens each: A single passage will compute in ~78 ms.</text:span></text:p>
      <text:p text:style-name="P285" loext:marker-style-name="T233"/>
      <text:p text:style-name="P184" loext:marker-style-name="T233"><text:span text:style-name="T239">Our test M1-Pro chews through roughly 45 passages per second per instance (3484 tok/s÷78 ms). That means one can expect to process 2,700 fully dense semantic records per minute on a baseline Apple Silicon chip. <text:s/>Our tests on M3Pro and M4Pro showed even significantly higher throughputs (80k tokens/s or as much as 20x).</text:span></text:p>
      <text:p text:style-name="P184" loext:marker-style-name="T233"><text:span text:style-name="T239"/></text:p>
      <text:list text:style-name="L80">
        <text:list-item>
          <text:p text:style-name="P181" loext:marker-style-name="T233"><text:span text:style-name="T228">M1 Pro (ARMv8): Uses an older iteration of Apple's proprietary AMX (Apple Matrix Coprocessor). It is highly optimized for accelerating single-sequence matrix-vector math (bs=1).</text:span></text:p>
        </text:list-item>
        <text:list-item>
          <text:p text:style-name="P181" loext:marker-style-name="T233"><text:span text:style-name="T228">M4 Family (ARMv9 + SME): The M4 introduced SME (Scalable Matrix Extension). SME is explicitly designed to handle outer-product matrix-matrix tiles natively in hardware. When you increase the batch size, the mathematical operation changes from a series of matrix-vector multiplies into a massive matrix-matrix multiplication (GEMM). The M4's SME hardware can swallow those batched matrix tiles concurrently, executing them multiple times faster per clock cycle than the M1 Pro's AMX.</text:span></text:p>
        </text:list-item>
        <text:list-item>
          <text:p text:style-name="P286" loext:marker-style-name="T233">An M4 Pro has up to 20 next-generation GPU cores, and an M4 Max has up to 40. Combined with a memory bandwidth of up to 546 GB/s, the M4 Max has a massive parallel execution pool.</text:p>
        </text:list-item>
      </text:list>
      <text:p text:style-name="P283" loext:marker-style-name="T233"><text:span text:style-name="T228"/></text:p>
      <text:p text:style-name="P179" loext:marker-style-name="T233"><text:span text:style-name="T228">With a base M4 Mac mini, we can expect benchmarking metrics something like this:</text:span><text:span text:style-name="T228"/></text:p>
      <text:list text:style-name="L81">
        <text:list-item>
          <text:p text:style-name="P182" loext:marker-style-name="T233"><text:span text:style-name="T228">Single Query Latency (bs=1, tok=38): Will drop from your current ~24 ms down to under 8 ms, making live UI search-as-you-type operations completely instantaneous.</text:span></text:p>
        </text:list-item>
        <text:list-item>
          <text:p text:style-name="P182" loext:marker-style-name="T233"><text:span text:style-name="T228">Peak Batch Throughput: Will scale up from your current 3,484 tokens/second to a sustained bracket of 12,000 to 15,000 tokens/second.</text:span></text:p>
        </text:list-item>
      </text:list>
      <text:p text:style-name="P285" loext:marker-style-name="T233"/>
      <text:p text:style-name="P179" loext:marker-style-name="T233"><text:span text:style-name="T228">The Projected M5 Performance Matrix:</text:span><text:span text:style-name="T228"/></text:p>
      <text:list text:style-name="L82">
        <text:list-item>
          <text:p text:style-name="P183" loext:marker-style-name="T233"><text:span text:style-name="T228">Running bge-large-en-v1.5 on a cheap M5 Mac mini will yield metrics that look more like a dedicated server data center than a compact desktop:</text:span></text:p>
        </text:list-item>
        <text:list-item>
          <text:p text:style-name="P183" loext:marker-style-name="T233"><text:span text:style-name="T228">Interactive Query Latency (bs=1, short query): ~3 to 5 ms (making search-as-you-type feel physically instantaneous).</text:span></text:p>
        </text:list-item>
        <text:list-item>
          <text:p text:style-name="P183" loext:marker-style-name="T233"><text:span text:style-name="T228">Peak Batch Throughput: Easily hitting 45,000 to 60,000+ tokens/second.</text:span></text:p>
        </text:list-item>
      </text:list>
      <text:p text:style-name="P285" loext:marker-style-name="T233"/>
      <text:p text:style-name="P277" loext:marker-style-name="T233"><text:span text:style-name="T240">At 60,000 tokens per second, a single entry-level M5 mini will let you index up to 14,000 full paragraphs every single minute.</text:span></text:p>
      <text:p text:style-name="P292" loext:marker-style-name="T233"><text:span text:style-name="T228"/></text:p>
      <text:p text:style-name="P282" loext:marker-style-name="T233"><text:soft-page-break/><text:span text:style-name="T255">As mentioned we support also Vukan and CUDA. <text:s/>As a reference machine for CUDA we’ve chosen the </text:span><text:span text:style-name="T68"><text:s/>NVIDIA Jetson AGX Orin. </text:span><text:span text:style-name="T140">It</text:span><text:span text:style-name="T68"> is an edge AI module delivering up to 275 TOPS of performance. It features configurable power consumption ranging from </text:span><text:span text:style-name="Strong_20_Emphasis"><text:span text:style-name="T254">15W to 75W</text:span></text:span><text:span text:style-name="T97"> </text:span><text:span text:style-name="T68">depending on the model, and comes in </text:span><text:span text:style-name="Strong_20_Emphasis"><text:span text:style-name="T68">32GB</text:span></text:span><text:span text:style-name="T97"> </text:span><text:span text:style-name="T68">and </text:span><text:span text:style-name="Strong_20_Emphasis"><text:span text:style-name="T68">64GB</text:span></text:span><text:span text:style-name="T68">System-on-Module (SOM) configurations.</text:span></text:p>
      <text:p text:style-name="P295" loext:marker-style-name="T233"><text:span text:style-name="T228"/></text:p>
      <text:p text:style-name="P298" loext:marker-style-name="T233"><text:span text:style-name="T228">ggml_cuda_init: found 1 CUDA devices (Total VRAM: 62796 MiB):</text:span></text:p>
      <text:p text:style-name="P298" loext:marker-style-name="T233"><text:span text:style-name="T228">Device 0: Orin, compute capability 8.7, VMM: yes, VRAM: 62796 MiB</text:span></text:p>
      <text:p text:style-name="P298" loext:marker-style-name="T233"><text:span text:style-name="T228">CUDA Device 0: Orin (65.85 GB VRAM)</text:span><text:span text:style-name="T228"/></text:p>
      <text:p text:style-name="P298" loext:marker-style-name="T233"><text:span text:style-name="T228">bert: CUDA backend does not support get_rows for q4_K — embedding lookups will run on CPU, all other ops on CUDA</text:span><text:span text:style-name="T228"/></text:p>
      <text:p text:style-name="P298" loext:marker-style-name="T233"><text:span text:style-name="T228">Model: bge-large-en-v1.5 <text:s/>arch=bert <text:s/>n_embd=1024 <text:s/>load=817 ms</text:span><text:span text:style-name="T228"/></text:p>
      <text:p text:style-name="P298" loext:marker-style-name="T233"><text:span text:style-name="T228">Warmup=5 iters, measure=50 iters</text:span><text:span text:style-name="T228"/></text:p>
      <text:p text:style-name="P288" loext:marker-style-name="T233"/>
      <text:p text:style-name="P298" loext:marker-style-name="T233"><text:span text:style-name="T228">== latency by input length (batch=1) ==</text:span><text:span text:style-name="T228"/></text:p>
      <text:p text:style-name="P298" loext:marker-style-name="T233"><text:span text:style-name="T228"><text:s text:c="2"/>very-short <text:s text:c="4"/>tok= 11 <text:s/>bs= <text:s/>1 <text:s/>| mean= <text:s text:c="2"/>9.32 ms <text:s/>med= <text:s text:c="2"/>8.36 <text:s/>p95= <text:s/>12.36 <text:s/>min= <text:s/>7.04 <text:s/>max= 13.72 <text:s/>| <text:s text:c="4"/>1181 tok/s <text:s text:c="3"/>107.3 seq/s</text:span><text:span text:style-name="T228"/></text:p>
      <text:p text:style-name="P298" loext:marker-style-name="T233"><text:span text:style-name="T228"><text:s text:c="2"/>short <text:s text:c="9"/>tok= 38 <text:s/>bs= <text:s/>1 <text:s/>| mean= <text:s/>10.31 ms <text:s/>med= <text:s/>10.21 <text:s/>p95= <text:s/>10.93 <text:s/>min= <text:s/>9.85 <text:s/>max= 11.13 <text:s/>| <text:s text:c="4"/>3686 tok/s <text:s text:c="4"/>97.0 seq/s</text:span><text:span text:style-name="T228"/></text:p>
      <text:p text:style-name="P298" loext:marker-style-name="T233"><text:span text:style-name="T228"><text:s text:c="2"/>medium <text:s text:c="8"/>tok=137 <text:s/>bs= <text:s/>1 <text:s/>| mean= <text:s/>19.40 ms <text:s/>med= <text:s/>19.35 <text:s/>p95= <text:s/>19.90 <text:s/>min= 18.88 <text:s/>max= 20.64 <text:s/>| <text:s text:c="4"/>7061 tok/s <text:s text:c="4"/>51.5 seq/s</text:span><text:span text:style-name="T228"/></text:p>
      <text:p text:style-name="P298" loext:marker-style-name="T233"><text:span text:style-name="T228"><text:s text:c="2"/>long <text:s text:c="10"/>tok=263 <text:s/>bs= <text:s/>1 <text:s/>| mean= <text:s/>35.19 ms <text:s/>med= <text:s/>35.15 <text:s/>p95= <text:s/>35.73 <text:s/>min= 33.71 <text:s/>max= 36.83 <text:s/>| <text:s text:c="4"/>7474 tok/s <text:s text:c="4"/>28.4 seq/s</text:span><text:span text:style-name="T228"/></text:p>
      <text:p text:style-name="P298" loext:marker-style-name="T233"><text:span text:style-name="T228"><text:s text:c="2"/>max <text:s text:c="11"/>tok=512 <text:s/>bs= <text:s/>1 <text:s/>| mean= <text:s/>59.82 ms <text:s/>med= <text:s/>59.79 <text:s/>p95= <text:s/>60.74 <text:s/>min= 58.65 <text:s/>max= 61.31 <text:s/>| <text:s text:c="4"/>8559 tok/s <text:s text:c="4"/>16.7 seq/s</text:span><text:span text:style-name="T228"/></text:p>
      <text:p text:style-name="P288" loext:marker-style-name="T233"/>
      <text:p text:style-name="P298" loext:marker-style-name="T233"><text:span text:style-name="T228">== throughput by batch size (tok=128) ==</text:span><text:span text:style-name="T228"/></text:p>
      <text:p text:style-name="P298" loext:marker-style-name="T233"><text:span text:style-name="T228"><text:s text:c="2"/>bs=1 <text:s text:c="10"/>tok=137 <text:s/>bs= <text:s/>1 <text:s/>| mean= <text:s/>19.36 ms <text:s/>med= <text:s/>19.32 <text:s/>p95= <text:s/>19.82 <text:s/>min= 18.86 <text:s/>max= 20.60 <text:s/>| <text:s text:c="4"/>7076 tok/s <text:s text:c="4"/>51.6 seq/s</text:span><text:span text:style-name="T228"/></text:p>
      <text:p text:style-name="P298" loext:marker-style-name="T233"><text:span text:style-name="T228"><text:s text:c="2"/>bs=4 <text:s text:c="10"/>tok=137 <text:s/>bs= <text:s/>4 <text:s/>| mean= <text:s/>67.49 ms <text:s/>med= <text:s/>67.50 <text:s/>p95= <text:s/>68.38 <text:s/>min= 65.81 <text:s/>max= 68.95 <text:s/>| <text:s text:c="4"/>8119 tok/s <text:s text:c="4"/>59.3 seq/s</text:span><text:span text:style-name="T228"/></text:p>
      <text:p text:style-name="P298" loext:marker-style-name="T233"><text:span text:style-name="T228"><text:s text:c="2"/>bs=8 <text:s text:c="10"/>tok=137 <text:s/>bs= <text:s/>8 <text:s/>| mean= 135.10 ms <text:s/>med= 134.98 <text:s/>p95= 136.11 <text:s/>min=133.79 <text:s/>max=137.25 <text:s/>| <text:s text:c="4"/>8113 tok/s <text:s text:c="4"/>59.2 seq/s</text:span><text:span text:style-name="T228"/></text:p>
      <text:p text:style-name="P298" loext:marker-style-name="T233"><text:span text:style-name="T228"><text:s text:c="2"/>bs=16 <text:s text:c="9"/>tok=137 <text:s/>bs= 16 <text:s/>| mean= 262.59 ms <text:s/>med= 262.67 <text:s/>p95= 263.98 <text:s/>min=260.84 <text:s/>max=264.76 <text:s/>| <text:s text:c="4"/>8348 tok/s <text:s text:c="4"/>60.9 seq/s</text:span><text:span text:style-name="T228"/></text:p>
      <text:p text:style-name="P298" loext:marker-style-name="T233"><text:span text:style-name="T228"><text:s text:c="2"/>bs=32 <text:s text:c="9"/>tok=137 <text:s/>bs= 32 <text:s/>| mean= 520.58 ms <text:s/>med= 520.57 <text:s/>p95= 521.90 <text:s/>min=518.51 <text:s/>max=522.87 <text:s/>| <text:s text:c="4"/>8421 tok/s <text:s text:c="4"/>61.5 seq/s</text:span><text:span text:style-name="T228"/></text:p>
      <text:p text:style-name="P297" loext:marker-style-name="T235"><text:span text:style-name="T253"><text:s/></text:span></text:p>
      <text:p text:style-name="P296" loext:marker-style-name="T233"><text:span text:style-name="T228">Notice the </text:span><text:span text:style-name="T256">bge-large-en-v1.5 <text:s/></text:span><text:span text:style-name="T257">q4_K is currently not wholly supported by the ggml CUDA backend. We still despite letting the embedding lookup run on the CPU we still get ~8k tok/s.</text:span></text:p>
      <text:p text:style-name="P296" loext:marker-style-name="T233"><text:span text:style-name="T257"/></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Google Sans" svg:font-family="'Google Sans', 'Helvetica Neue', sans-serif"/>
    <style:font-face style:name="Helvetica" svg:font-family="Helvetica" style:font-family-generic="roman" style:font-pitch="variable"/>
    <style:font-face style:name="Helvetica1" svg:font-family="Helvetica" style:font-family-generic="swiss" style:font-pitch="variable"/>
    <style:font-face style:name="HelveticaNeue" svg:font-family="HelveticaNeue" style:font-family-generic="roman" style:font-pitch="variable"/>
    <style:font-face style:name="HelveticaNeue1" svg:font-family="HelveticaNeue"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Bold" svg:font-family="Menlo-Bold" style:font-adornments="Regular" style:font-family-generic="swiss"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monospace" svg:font-family="monospace"/>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1"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style:font-name="Liberation Serif" fo:font-size="14pt" style:font-size-asian="14pt" style:font-size-complex="14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uarry: Next-Generation Knowledge Retrieval Kernel for Local AI Applications.</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12:55:38.058083757</meta:creation-date>
    <dc:title>Modern</dc:title>
    <meta:generator>LibreOffice/24.2.5.2$MacOSX_AARCH64 LibreOffice_project/bffef4ea93e59bebbeaf7f431bb02b1a39ee8a59</meta:generator>
    <meta:editing-duration>P7DT13H21M29S</meta:editing-duration>
    <meta:editing-cycles>147</meta:editing-cycles>
    <dc:date>2026-06-03T13:50:19.304460153</dc:date>
    <meta:print-date>2026-05-31T22:58:20.906422423</meta:print-date>
    <meta:printed-by>PDF files</meta:printed-by>
    <meta:document-statistic meta:table-count="15" meta:image-count="23" meta:object-count="0" meta:page-count="32" meta:paragraph-count="839" meta:word-count="11759" meta:character-count="82430" meta:non-whitespace-character-count="70983"/>
    <meta:template xlink:type="simple" xlink:actuate="onRequest" xlink:title="Modern" xlink:href="../../../../Applications/LibreOffice.app/Contents/Resources/template/common/styles/Modern.ott" meta:date="2026-03-08T12:55:37.918077831"/>
  </office:meta>
</office:document-meta>
</file>