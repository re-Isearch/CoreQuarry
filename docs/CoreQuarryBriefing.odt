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CA00000326B69632D9.png" manifest:media-type="image/png"/>
  <manifest:file-entry manifest:full-path="Pictures/1000000000000113000000B7C6751253.png" manifest:media-type="image/png"/>
  <manifest:file-entry manifest:full-path="Pictures/10000000000001620000008ED9F43F0E.png" manifest:media-type="image/png"/>
  <manifest:file-entry manifest:full-path="Pictures/10000000000000FC000000FC83698EFC.png" manifest:media-type="image/png"/>
  <manifest:file-entry manifest:full-path="Pictures/1000000000000352000000EC9D07F8E3.png" manifest:media-type="image/png"/>
  <manifest:file-entry manifest:full-path="Pictures/10000001000006600000037120C595D9.png" manifest:media-type="image/png"/>
  <manifest:file-entry manifest:full-path="Pictures/10000000000001900000010BB8C8B6CF.png" manifest:media-type="image/png"/>
  <manifest:file-entry manifest:full-path="Pictures/10000001000005CA0000032781D97E02.png" manifest:media-type="image/png"/>
  <manifest:file-entry manifest:full-path="Pictures/1000000100000001000000010F602221.gif" manifest:media-type="image/gif"/>
  <manifest:file-entry manifest:full-path="Pictures/10000000000001500000008CF7D39373.png" manifest:media-type="image/png"/>
  <manifest:file-entry manifest:full-path="Pictures/100000000000011700000090D4C12D0E.png" manifest:media-type="image/png"/>
  <manifest:file-entry manifest:full-path="Pictures/10000001000000A20000009694C0762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ppleSystemUIFont" svg:font-family="AppleSystemUIFont" style:font-family-generic="roman" style:font-pitch="variable"/>
    <style:font-face style:name="Caladea" svg:font-family="Caladea" style:font-adornments="Regular" style:font-family-generic="roman" style:font-pitch="variable"/>
    <style:font-face style:name="Carlito" svg:font-family="Carlito" style:font-family-generic="swiss" style:font-pitch="variable"/>
    <style:font-face style:name="Carlito1" svg:font-family="Carlito" style:font-adornments="Regular"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enlo-Regular" svg:font-family="Menlo-Regular" style:font-family-generic="roman" style:font-pitch="variable"/>
    <style:font-face style:name="Menlo-Regular1" svg:font-family="Menlo-Regular" style:font-adornments="Regular" style:font-family-generic="swiss"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3" style:family="table">
      <style:table-properties style:width="5.7264in" table:align="left" style:writing-mode="page"/>
    </style:style>
    <style:style style:name="Table3.A" style:family="table-column">
      <style:table-column-properties style:column-width="1.3215in"/>
    </style:style>
    <style:style style:name="Table3.B" style:family="table-column">
      <style:table-column-properties style:column-width="1.4278in"/>
    </style:style>
    <style:style style:name="Table3.C" style:family="table-column">
      <style:table-column-properties style:column-width="1.7431in"/>
    </style:style>
    <style:style style:name="Table3.D" style:family="table-column">
      <style:table-column-properties style:column-width="1.234in"/>
    </style:style>
    <style:style style:name="Table3.A1" style:family="table-cell">
      <style:table-cell-properties style:vertical-align="middle" fo:padding="0.0194in" fo:border="none"/>
    </style:style>
    <style:style style:name="Table4" style:family="table">
      <style:table-properties style:width="4.2715in" table:align="left" style:writing-mode="page"/>
    </style:style>
    <style:style style:name="Table4.A" style:family="table-column">
      <style:table-column-properties style:column-width="0.4632in"/>
    </style:style>
    <style:style style:name="Table4.B" style:family="table-column">
      <style:table-column-properties style:column-width="1.1125in"/>
    </style:style>
    <style:style style:name="Table4.C" style:family="table-column">
      <style:table-column-properties style:column-width="1.7271in"/>
    </style:style>
    <style:style style:name="Table4.D" style:family="table-column">
      <style:table-column-properties style:column-width="0.9688in"/>
    </style:style>
    <style:style style:name="Table4.A1" style:family="table-cell">
      <style:table-cell-properties style:vertical-align="middle" fo:padding="0.0194in" fo:border="none"/>
    </style:style>
    <style:style style:name="Table5" style:family="table">
      <style:table-properties style:width="6.5049in" table:align="left" style:writing-mode="page"/>
    </style:style>
    <style:style style:name="Table5.A" style:family="table-column">
      <style:table-column-properties style:column-width="2.4125in"/>
    </style:style>
    <style:style style:name="Table5.B" style:family="table-column">
      <style:table-column-properties style:column-width="4.0924in"/>
    </style:style>
    <style:style style:name="Table5.A1" style:family="table-cell">
      <style:table-cell-properties fo:padding="0in" fo:border="none"/>
    </style:style>
    <style:style style:name="Table6" style:family="table">
      <style:table-properties style:width="2.7201in" table:align="left" style:writing-mode="page"/>
    </style:style>
    <style:style style:name="Table6.A" style:family="table-column">
      <style:table-column-properties style:column-width="2.2333in"/>
    </style:style>
    <style:style style:name="Table6.B" style:family="table-column">
      <style:table-column-properties style:column-width="0.4868in"/>
    </style:style>
    <style:style style:name="Table6.A1" style:family="table-cell">
      <style:table-cell-properties style:vertical-align="middle" fo:padding="0.0194in" fo:border="none"/>
    </style:style>
    <style:style style:name="Table7" style:family="table">
      <style:table-properties style:width="1.7042in" table:align="left" style:writing-mode="page"/>
    </style:style>
    <style:style style:name="Table7.A" style:family="table-column">
      <style:table-column-properties style:column-width="0.7646in"/>
    </style:style>
    <style:style style:name="Table7.B" style:family="table-column">
      <style:table-column-properties style:column-width="0.9396in"/>
    </style:style>
    <style:style style:name="Table7.A1" style:family="table-cell">
      <style:table-cell-properties style:vertical-align="middle" fo:padding="0.0194in" fo:border="none"/>
    </style:style>
    <style:style style:name="Table8" style:family="table">
      <style:table-properties style:width="1.6875in" table:align="left" style:writing-mode="page"/>
    </style:style>
    <style:style style:name="Table8.A" style:family="table-column">
      <style:table-column-properties style:column-width="0.8944in"/>
    </style:style>
    <style:style style:name="Table8.B" style:family="table-column">
      <style:table-column-properties style:column-width="0.7931in"/>
    </style:style>
    <style:style style:name="Table8.A1" style:family="table-cell">
      <style:table-cell-properties style:vertical-align="middle" fo:padding="0.0194in" fo:border="none"/>
    </style:style>
    <style:style style:name="Table9" style:family="table">
      <style:table-properties style:width="1.6875in" table:align="left" style:writing-mode="page"/>
    </style:style>
    <style:style style:name="Table9.A" style:family="table-column">
      <style:table-column-properties style:column-width="0.8965in"/>
    </style:style>
    <style:style style:name="Table9.B" style:family="table-column">
      <style:table-column-properties style:column-width="0.791in"/>
    </style:style>
    <style:style style:name="Table9.A1" style:family="table-cell">
      <style:table-cell-properties style:vertical-align="middle" fo:padding="0.0194in" fo:border="none"/>
    </style:style>
    <style:style style:name="Table10" style:family="table">
      <style:table-properties style:width="1.7042in" table:align="left" style:writing-mode="page"/>
    </style:style>
    <style:style style:name="Table10.A" style:family="table-column">
      <style:table-column-properties style:column-width="0.8944in"/>
    </style:style>
    <style:style style:name="Table10.B" style:family="table-column">
      <style:table-column-properties style:column-width="0.8097in"/>
    </style:style>
    <style:style style:name="Table10.A1" style:family="table-cell">
      <style:table-cell-properties style:vertical-align="middle" fo:padding="0.0194in" fo:border="none"/>
    </style:style>
    <style:style style:name="Table11" style:family="table">
      <style:table-properties style:width="4.8951in" table:align="left" style:writing-mode="page"/>
    </style:style>
    <style:style style:name="Table11.A" style:family="table-column">
      <style:table-column-properties style:column-width="0.6833in"/>
    </style:style>
    <style:style style:name="Table11.B" style:family="table-column">
      <style:table-column-properties style:column-width="1.2625in"/>
    </style:style>
    <style:style style:name="Table11.C" style:family="table-column">
      <style:table-column-properties style:column-width="1.1806in"/>
    </style:style>
    <style:style style:name="Table11.D" style:family="table-column">
      <style:table-column-properties style:column-width="1.7688in"/>
    </style:style>
    <style:style style:name="Table11.A1" style:family="table-cell">
      <style:table-cell-properties style:vertical-align="middle" fo:padding="0.0194in" fo:border="none"/>
    </style:style>
    <style:style style:name="Table12" style:family="table">
      <style:table-properties style:width="3.7139in" table:align="left" style:writing-mode="page"/>
    </style:style>
    <style:style style:name="Table12.A" style:family="table-column">
      <style:table-column-properties style:column-width="0.8861in"/>
    </style:style>
    <style:style style:name="Table12.B" style:family="table-column">
      <style:table-column-properties style:column-width="2.8278in"/>
    </style:style>
    <style:style style:name="Table12.A1" style:family="table-cell">
      <style:table-cell-properties style:vertical-align="middle" fo:padding="0.0194in" fo:border="none"/>
    </style:style>
    <style:style style:name="Table13" style:family="table">
      <style:table-properties style:width="2.8924in" table:align="left" style:writing-mode="page"/>
    </style:style>
    <style:style style:name="Table13.A" style:family="table-column">
      <style:table-column-properties style:column-width="1.9403in"/>
    </style:style>
    <style:style style:name="Table13.B" style:family="table-column">
      <style:table-column-properties style:column-width="0.9521in"/>
    </style:style>
    <style:style style:name="Table13.A1" style:family="table-cell">
      <style:table-cell-properties style:vertical-align="middle" fo:padding="0.0194in" fo:border="none"/>
    </style:style>
    <style:style style:name="Table1" style:family="table">
      <style:table-properties style:width="5.5625in" fo:margin-left="0.0278in" table:align="left" style:writing-mode="page"/>
    </style:style>
    <style:style style:name="Table1.A" style:family="table-column">
      <style:table-column-properties style:column-width="1.125in"/>
    </style:style>
    <style:style style:name="Table1.B" style:family="table-column">
      <style:table-column-properties style:column-width="1.5014in"/>
    </style:style>
    <style:style style:name="Table1.C" style:family="table-column">
      <style:table-column-properties style:column-width="2.9361in"/>
    </style:style>
    <style:style style:name="Table1.A1" style:family="table-cell">
      <style:table-cell-properties fo:padding="0in" fo:border="none"/>
    </style:style>
    <style:style style:name="Table1.3" style:family="table-row">
      <style:table-row-properties style:min-row-height="0.4201in"/>
    </style:style>
    <style:style style:name="Table2" style:family="table">
      <style:table-properties style:width="5.5597in" table:align="left" style:writing-mode="page"/>
    </style:style>
    <style:style style:name="Table2.A" style:family="table-column">
      <style:table-column-properties style:column-width="1.3097in"/>
    </style:style>
    <style:style style:name="Table2.B" style:family="table-column">
      <style:table-column-properties style:column-width="1.0007in"/>
    </style:style>
    <style:style style:name="Table2.C" style:family="table-column">
      <style:table-column-properties style:column-width="1.1236in"/>
    </style:style>
    <style:style style:name="Table2.D" style:family="table-column">
      <style:table-column-properties style:column-width="2.1257in"/>
    </style:style>
    <style:style style:name="Table2.A1" style:family="table-cell">
      <style:table-cell-properties fo:padding="0in" fo:border="none"/>
    </style:style>
    <style:style style:name="P1" style:family="paragraph" style:parent-style-name="Header">
      <style:text-properties style:font-name="Carlito" fo:font-size="14pt" officeooo:paragraph-rsid="008a423a" style:font-size-asian="14pt" style:font-size-complex="14pt"/>
    </style:style>
    <style:style style:name="P2" style:family="paragraph" style:parent-style-name="Standard">
      <style:text-properties style:font-name="Carlito" fo:font-size="12pt" fo:font-weight="bold" officeooo:paragraph-rsid="000fcead" style:font-size-asian="12pt" style:font-weight-asian="bold" style:font-size-complex="12pt" style:font-weight-complex="bold"/>
    </style:style>
    <style:style style:name="P3" style:family="paragraph" style:parent-style-name="Text_20_body">
      <style:paragraph-properties fo:margin-left="0in" fo:margin-right="0in" fo:orphans="2" fo:widows="2" fo:text-indent="0in" style:auto-text-indent="false" fo:break-before="page"/>
      <style:text-properties style:font-name="Carlito" fo:font-size="12pt" fo:font-weight="bold" officeooo:rsid="001ce228" officeooo:paragraph-rsid="002a831d" style:font-size-asian="12pt" style:font-weight-asian="bold" style:font-size-complex="12pt" style:font-weight-complex="bold"/>
    </style:style>
    <style:style style:name="P4" style:family="paragraph" style:parent-style-name="Text_20_body">
      <style:paragraph-properties fo:margin-left="0in" fo:margin-right="0in" fo:orphans="2" fo:widows="2" fo:text-indent="0in" style:auto-text-indent="false"/>
      <style:text-properties style:font-name="Carlito" fo:font-size="12pt" fo:font-weight="bold" officeooo:rsid="001ce228" officeooo:paragraph-rsid="002a831d" style:font-size-asian="12pt" style:font-weight-asian="bold" style:font-size-complex="12pt" style:font-weight-complex="bold"/>
    </style:style>
    <style:style style:name="P5" style:family="paragraph" style:parent-style-name="Standard">
      <style:text-properties style:font-name="Carlito" fo:font-size="12pt" fo:font-weight="bold" officeooo:paragraph-rsid="0088c215" style:font-size-asian="12pt" style:font-weight-asian="bold" style:font-size-complex="12pt" style:font-weight-complex="bold"/>
    </style:style>
    <style:style style:name="P6" style:family="paragraph" style:parent-style-name="Standard">
      <style:text-properties style:font-name="Carlito" officeooo:paragraph-rsid="005db5a3"/>
    </style:style>
    <style:style style:name="P7" style:family="paragraph" style:parent-style-name="Standard">
      <style:text-properties style:font-name="Carlito" officeooo:rsid="0018d26d" officeooo:paragraph-rsid="001ce228"/>
    </style:style>
    <style:style style:name="P8" style:family="paragraph" style:parent-style-name="Text_20_body">
      <style:text-properties officeooo:paragraph-rsid="00192843"/>
    </style:style>
    <style:style style:name="P9" style:family="paragraph" style:parent-style-name="Standard">
      <style:text-properties officeooo:rsid="000bbd3f" officeooo:paragraph-rsid="000bbd3f"/>
    </style:style>
    <style:style style:name="P10" style:family="paragraph" style:parent-style-name="Standard">
      <style:text-properties officeooo:paragraph-rsid="000bbd3f"/>
    </style:style>
    <style:style style:name="P11" style:family="paragraph" style:parent-style-name="Standard">
      <style:text-properties fo:font-weight="bold" officeooo:paragraph-rsid="000db080" style:font-weight-asian="bold" style:font-weight-complex="bold"/>
    </style:style>
    <style:style style:name="P12" style:family="paragraph" style:parent-style-name="Standard">
      <style:text-properties fo:font-weight="bold" officeooo:paragraph-rsid="000fcead" style:font-weight-asian="bold" style:font-weight-complex="bold"/>
    </style:style>
    <style:style style:name="P13" style:family="paragraph" style:parent-style-name="Table_20_Contents">
      <style:paragraph-properties fo:margin-top="0in" fo:margin-bottom="0.1965in" style:contextual-spacing="false"/>
      <style:text-properties fo:font-weight="bold" style:font-weight-asian="bold"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rsid="000db080" officeooo:paragraph-rsid="000db080" style:font-weight-asian="bold" style:font-weight-complex="bold"/>
    </style:style>
    <style:style style:name="P16" style:family="paragraph" style:parent-style-name="Standard">
      <style:text-properties fo:font-weight="bold" officeooo:rsid="0018d26d" officeooo:paragraph-rsid="0018d26d" style:font-weight-asian="bold" style:font-weight-complex="bold"/>
    </style:style>
    <style:style style:name="P17" style:family="paragraph" style:parent-style-name="Text_20_body">
      <style:paragraph-properties fo:margin-top="0in" fo:margin-bottom="0in" style:contextual-spacing="false"/>
      <style:text-properties fo:font-weight="bold" officeooo:rsid="0065a5e2" officeooo:paragraph-rsid="0065a5e2" style:font-weight-asian="bold" style:font-weight-complex="bold"/>
    </style:style>
    <style:style style:name="P18" style:family="paragraph" style:parent-style-name="Text_20_body">
      <style:text-properties fo:font-weight="bold" officeooo:rsid="000bbd3f" officeooo:paragraph-rsid="000bbd3f" style:font-weight-asian="bold" style:font-weight-complex="bold"/>
    </style:style>
    <style:style style:name="P19" style:family="paragraph" style:parent-style-name="Standard">
      <style:text-properties fo:font-weight="bold" officeooo:rsid="0011c311" officeooo:paragraph-rsid="00738b33" style:font-weight-asian="bold" style:font-weight-complex="bold"/>
    </style:style>
    <style:style style:name="P20" style:family="paragraph" style:parent-style-name="Standard">
      <style:text-properties officeooo:rsid="000fcead" officeooo:paragraph-rsid="000fcead"/>
    </style:style>
    <style:style style:name="P21" style:family="paragraph" style:parent-style-name="Standard">
      <style:text-properties officeooo:rsid="0011c311" officeooo:paragraph-rsid="0011c311"/>
    </style:style>
    <style:style style:name="P22" style:family="paragraph" style:parent-style-name="Standard">
      <style:text-properties fo:font-size="11pt" officeooo:rsid="0011c311" officeooo:paragraph-rsid="0011c311" style:font-size-asian="9.60000038146973pt" style:font-size-complex="11pt"/>
    </style:style>
    <style:style style:name="P23" style:family="paragraph" style:parent-style-name="Standard">
      <style:text-properties style:font-name="Liberation Serif" fo:font-size="11pt" officeooo:rsid="0011c311" officeooo:paragraph-rsid="0011c311" style:font-size-asian="9.60000038146973pt" style:font-size-complex="11pt"/>
    </style:style>
    <style:style style:name="P24" style:family="paragraph" style:parent-style-name="Standard">
      <style:text-properties style:font-name="Liberation Serif" fo:font-size="11pt" style:font-size-asian="11pt" style:font-size-complex="11pt"/>
    </style:style>
    <style:style style:name="P25" style:family="paragraph" style:parent-style-name="Standard">
      <style:text-properties style:font-name="Liberation Serif" fo:font-size="11pt" officeooo:rsid="00297128" officeooo:paragraph-rsid="00297128" style:font-size-asian="11pt" style:font-size-complex="11pt"/>
    </style:style>
    <style:style style:name="P26" style:family="paragraph" style:parent-style-name="Text_20_body">
      <style:paragraph-properties fo:margin-left="0in" fo:margin-right="0in" fo:orphans="2" fo:widows="2" fo:text-indent="0in" style:auto-text-indent="false"/>
      <style:text-properties style:font-name="Liberation Serif" fo:font-size="11pt" style:font-size-asian="11pt" style:font-size-complex="11pt"/>
    </style:style>
    <style:style style:name="P27" style:family="paragraph" style:parent-style-name="Standard">
      <style:text-properties style:font-name="Liberation Serif" fo:font-size="11pt" officeooo:rsid="0038c341" officeooo:paragraph-rsid="0038f357" style:font-size-asian="11pt" style:font-size-complex="11pt"/>
    </style:style>
    <style:style style:name="P28" style:family="paragraph" style:parent-style-name="Standard">
      <style:text-properties style:font-name="Liberation Serif" fo:font-size="11pt" officeooo:rsid="0038c341" officeooo:paragraph-rsid="00398f1a" style:font-size-asian="11pt" style:font-size-complex="11pt"/>
    </style:style>
    <style:style style:name="P29" style:family="paragraph" style:parent-style-name="Standard">
      <style:paragraph-properties fo:margin-left="0.4925in" fo:text-indent="0in" style:auto-text-indent="false"/>
      <style:text-properties style:font-name="Liberation Serif" fo:font-size="11pt" style:font-size-asian="11pt" style:font-size-complex="11pt"/>
    </style:style>
    <style:style style:name="P30" style:family="paragraph" style:parent-style-name="Standard">
      <style:text-properties style:font-name="Liberation Serif" fo:font-size="11pt" officeooo:paragraph-rsid="0073fce6" style:font-size-asian="11pt" style:font-size-complex="11pt"/>
    </style:style>
    <style:style style:name="P31" style:family="paragraph" style:parent-style-name="Standard">
      <style:text-properties style:font-name="Liberation Serif" fo:font-size="11pt" officeooo:rsid="0011c311" officeooo:paragraph-rsid="0011c311" style:font-size-asian="11pt" style:font-size-complex="11pt"/>
    </style:style>
    <style:style style:name="P32" style:family="paragraph" style:parent-style-name="Standard">
      <style:text-properties style:font-name="Liberation Serif" fo:font-size="11pt" officeooo:paragraph-rsid="008316ad" style:font-size-asian="11pt" style:font-size-complex="11pt"/>
    </style:style>
    <style:style style:name="P33" style:family="paragraph" style:parent-style-name="Standard">
      <style:text-properties style:font-name="Liberation Serif" fo:font-size="11pt" officeooo:paragraph-rsid="00838d7c" style:font-size-asian="11pt" style:font-size-complex="11pt"/>
    </style:style>
    <style:style style:name="P34" style:family="paragraph" style:parent-style-name="Standard">
      <style:text-properties style:font-name="Liberation Serif" fo:font-size="11pt" fo:font-weight="normal" style:font-size-asian="11pt" style:font-weight-asian="normal" style:font-size-complex="11pt" style:font-weight-complex="normal"/>
    </style:style>
    <style:style style:name="P35" style:family="paragraph" style:parent-style-name="Standard">
      <style:text-properties style:font-name="Liberation Serif" fo:font-size="11pt" fo:font-weight="bold" officeooo:paragraph-rsid="000fcead" style:font-size-asian="11pt" style:font-weight-asian="bold" style:font-size-complex="11pt" style:font-weight-complex="bold"/>
    </style:style>
    <style:style style:name="P36" style:family="paragraph" style:parent-style-name="Standard">
      <style:text-properties style:font-name="Liberation Serif"/>
    </style:style>
    <style:style style:name="P37" style:family="paragraph" style:parent-style-name="Text_20_body">
      <style:text-properties style:font-name="Liberation Serif" fo:font-size="12pt" officeooo:paragraph-rsid="002a3aa2" style:font-size-asian="12pt" style:font-size-complex="12pt"/>
    </style:style>
    <style:style style:name="P38" style:family="paragraph" style:parent-style-name="Standard">
      <style:text-properties style:font-name="Liberation Serif" officeooo:rsid="00202a73" officeooo:paragraph-rsid="00202a73"/>
    </style:style>
    <style:style style:name="P39" style:family="paragraph" style:parent-style-name="Standard">
      <style:text-properties style:font-name="Liberation Serif" officeooo:paragraph-rsid="00297128"/>
    </style:style>
    <style:style style:name="P40" style:family="paragraph" style:parent-style-name="Table_20_Contents">
      <style:paragraph-properties fo:margin-top="0in" fo:margin-bottom="0.1965in" style:contextual-spacing="false"/>
      <style:text-properties style:font-name="Liberation Serif"/>
    </style:style>
    <style:style style:name="P41" style:family="paragraph" style:parent-style-name="Table_20_Contents">
      <style:paragraph-properties fo:margin-top="0in" fo:margin-bottom="0.1965in" style:contextual-spacing="false"/>
      <style:text-properties style:font-name="Liberation Serif" fo:font-weight="bold" style:font-weight-asian="bold" style:font-weight-complex="bold"/>
    </style:style>
    <style:style style:name="P42" style:family="paragraph" style:parent-style-name="Standard">
      <style:text-properties style:font-name="Liberation Serif" fo:font-weight="bold" officeooo:paragraph-rsid="002d1682" style:font-weight-asian="bold" style:font-weight-complex="bold"/>
    </style:style>
    <style:style style:name="P43" style:family="paragraph" style:parent-style-name="Table_20_Contents">
      <style:paragraph-properties fo:margin-top="0in" fo:margin-bottom="0.1965in" style:contextual-spacing="false"/>
      <style:text-properties style:font-name="Liberation Serif" officeooo:rsid="000fcead" officeooo:paragraph-rsid="000fcead"/>
    </style:style>
    <style:style style:name="P44" style:family="paragraph" style:parent-style-name="Text_20_body">
      <style:text-properties style:font-name="Liberation Serif" officeooo:paragraph-rsid="001ddb05"/>
    </style:style>
    <style:style style:name="P45" style:family="paragraph" style:parent-style-name="Standard">
      <style:text-properties style:font-name="Liberation Serif" officeooo:paragraph-rsid="005db5a3"/>
    </style:style>
    <style:style style:name="P46" style:family="paragraph" style:parent-style-name="Standard">
      <style:text-properties style:font-name="Liberation Serif" fo:font-size="10pt" fo:font-weight="bold" officeooo:paragraph-rsid="005db5a3" style:font-size-asian="10pt" style:font-size-complex="10pt"/>
    </style:style>
    <style:style style:name="P47" style:family="paragraph" style:parent-style-name="Standard">
      <style:text-properties style:font-name="Liberation Serif" officeooo:paragraph-rsid="0037926d"/>
    </style:style>
    <style:style style:name="P48" style:family="paragraph" style:parent-style-name="Standard">
      <style:text-properties style:font-name="Liberation Serif" officeooo:paragraph-rsid="007cfb38"/>
    </style:style>
    <style:style style:name="P49" style:family="paragraph" style:parent-style-name="Standard">
      <style:text-properties officeooo:paragraph-rsid="00128705"/>
    </style:style>
    <style:style style:name="P50" style:family="paragraph" style:parent-style-name="Preformatted_20_Text">
      <style:paragraph-properties fo:margin-left="0in" fo:margin-right="0in" fo:text-indent="0in" style:auto-text-indent="false"/>
    </style:style>
    <style:style style:name="P51" style:family="paragraph" style:parent-style-name="Text_20_body">
      <style:paragraph-properties fo:margin-left="0in" fo:margin-right="0in" fo:text-indent="0in" style:auto-text-indent="false"/>
    </style:style>
    <style:style style:name="P52" style:family="paragraph" style:parent-style-name="Preformatted_20_Text">
      <style:text-properties fo:font-variant="normal" fo:text-transform="none" fo:color="#000000" loext:opacity="100%" fo:letter-spacing="normal" fo:font-style="normal" fo:font-weight="normal"/>
    </style:style>
    <style:style style:name="P53" style:family="paragraph" style:parent-style-name="Preformatted_20_Text">
      <style:text-properties fo:font-variant="normal" fo:text-transform="none" fo:color="#000000" loext:opacity="100%" fo:letter-spacing="normal"/>
    </style:style>
    <style:style style:name="P54" style:family="paragraph" style:parent-style-name="Preformatted_20_Text">
      <style:text-properties fo:font-variant="normal" fo:text-transform="none" fo:color="#000000" loext:opacity="100%" fo:letter-spacing="normal" officeooo:paragraph-rsid="002a3aa2"/>
    </style:style>
    <style:style style:name="P55" style:family="paragraph" style:parent-style-name="Standard">
      <style:text-properties fo:font-variant="normal" fo:text-transform="none" fo:color="#000000" loext:opacity="100%" style:font-name="Liberation Serif" fo:font-size="11pt" fo:letter-spacing="normal" fo:font-style="normal" fo:font-weight="normal" officeooo:rsid="002fbfed" officeooo:paragraph-rsid="008316ad" style:font-size-asian="11pt" style:font-size-complex="11pt"/>
    </style:style>
    <style:style style:name="P56" style:family="paragraph" style:parent-style-name="Standard">
      <style:text-properties officeooo:paragraph-rsid="00287c31"/>
    </style:style>
    <style:style style:name="P57" style:family="paragraph" style:parent-style-name="Text_20_body">
      <style:paragraph-properties fo:margin-left="0in" fo:margin-right="0in" fo:orphans="2" fo:widows="2" fo:text-indent="0in" style:auto-text-indent="false"/>
    </style:style>
    <style:style style:name="P58" style:family="paragraph" style:parent-style-name="Text_20_body">
      <style:paragraph-properties fo:margin-left="0in" fo:margin-right="0in" fo:orphans="2" fo:widows="2" fo:text-indent="0in" style:auto-text-indent="false"/>
      <style:text-properties officeooo:paragraph-rsid="002a831d"/>
    </style:style>
    <style:style style:name="P59" style:family="paragraph" style:parent-style-name="Text_20_body" style:master-page-name="">
      <loext:graphic-properties draw:fill="none"/>
      <style:paragraph-properties fo:margin-left="0in" fo:margin-right="0in" fo:margin-top="0in" fo:margin-bottom="0.0972in" style:contextual-spacing="false" fo:line-height="120%" fo:orphans="2" fo:widows="2" fo:text-indent="0in" style:auto-text-indent="false" style:page-number="auto" fo:background-color="transparent" style:shadow="none" style:writing-mode="page"/>
    </style:style>
    <style:style style:name="P60" style:family="paragraph" style:parent-style-name="Preformatted_20_Text">
      <style:paragraph-properties fo:margin-left="0in" fo:margin-right="0in" fo:text-indent="0in" style:auto-text-indent="false"/>
      <style:text-properties officeooo:paragraph-rsid="002a3aa2"/>
    </style:style>
    <style:style style:name="P61" style:family="paragraph" style:parent-style-name="Standard">
      <style:text-properties officeooo:paragraph-rsid="00297128"/>
    </style:style>
    <style:style style:name="P62" style:family="paragraph" style:parent-style-name="Standard">
      <style:text-properties officeooo:paragraph-rsid="001ce228"/>
    </style:style>
    <style:style style:name="P63" style:family="paragraph" style:parent-style-name="Standard">
      <style:paragraph-properties fo:break-before="page"/>
      <style:text-properties officeooo:paragraph-rsid="001ce228"/>
    </style:style>
    <style:style style:name="P64" style:family="paragraph" style:parent-style-name="Standard">
      <style:text-properties officeooo:rsid="002fbfed" officeooo:paragraph-rsid="002fbfed"/>
    </style:style>
    <style:style style:name="P65" style:family="paragraph" style:parent-style-name="Standard">
      <style:text-properties officeooo:paragraph-rsid="0038f357"/>
    </style:style>
    <style:style style:name="P66" style:family="paragraph" style:parent-style-name="Standard">
      <style:text-properties officeooo:paragraph-rsid="003d82b4"/>
    </style:style>
    <style:style style:name="P67" style:family="paragraph" style:parent-style-name="Standard">
      <style:text-properties officeooo:paragraph-rsid="0053a92e"/>
    </style:style>
    <style:style style:name="P68" style:family="paragraph" style:parent-style-name="Standard">
      <style:paragraph-properties fo:margin-left="0.4925in" fo:text-indent="0in" style:auto-text-indent="false"/>
      <style:text-properties officeooo:paragraph-rsid="00537a83"/>
    </style:style>
    <style:style style:name="P69" style:family="paragraph" style:parent-style-name="Standard">
      <style:text-properties officeooo:rsid="0053bd23" officeooo:paragraph-rsid="0053bd23"/>
    </style:style>
    <style:style style:name="P70" style:family="paragraph" style:parent-style-name="Text_20_body">
      <style:text-properties officeooo:rsid="0053bd23" officeooo:paragraph-rsid="0053bd23"/>
    </style:style>
    <style:style style:name="P71" style:family="paragraph" style:parent-style-name="Standard">
      <style:text-properties officeooo:paragraph-rsid="0055d180"/>
    </style:style>
    <style:style style:name="P72" style:family="paragraph" style:parent-style-name="Standard">
      <style:text-properties officeooo:paragraph-rsid="005db5a3"/>
    </style:style>
    <style:style style:name="P73" style:family="paragraph" style:parent-style-name="Standard">
      <style:text-properties officeooo:rsid="0018d26d" officeooo:paragraph-rsid="001ce228"/>
    </style:style>
    <style:style style:name="P74" style:family="paragraph" style:parent-style-name="Standard">
      <style:text-properties officeooo:paragraph-rsid="0068fc7e"/>
    </style:style>
    <style:style style:name="P75" style:family="paragraph" style:parent-style-name="Standard">
      <style:text-properties officeooo:paragraph-rsid="0073fce6"/>
    </style:style>
    <style:style style:name="P76" style:family="paragraph" style:parent-style-name="Standard">
      <style:text-properties officeooo:paragraph-rsid="007cfb38"/>
    </style:style>
    <style:style style:name="P77" style:family="paragraph" style:parent-style-name="Standard">
      <style:text-properties officeooo:paragraph-rsid="005e80d7"/>
    </style:style>
    <style:style style:name="P78" style:family="paragraph" style:parent-style-name="Standard">
      <style:text-properties officeooo:paragraph-rsid="008316ad"/>
    </style:style>
    <style:style style:name="P79" style:family="paragraph" style:parent-style-name="Standard">
      <style:text-properties officeooo:paragraph-rsid="00313315"/>
    </style:style>
    <style:style style:name="P80" style:family="paragraph" style:parent-style-name="Standard">
      <style:text-properties fo:color="#000000" loext:opacity="100%" style:font-name="Liberation Serif" fo:font-size="11pt" fo:font-weight="bold" officeooo:paragraph-rsid="000fcead" style:font-size-asian="11pt" style:font-weight-asian="bold" style:font-size-complex="11pt" style:font-weight-complex="bold"/>
    </style:style>
    <style:style style:name="P81" style:family="paragraph" style:parent-style-name="Heading_20_1">
      <style:paragraph-properties fo:margin-left="0in" fo:margin-right="0in" fo:text-indent="0in" style:auto-text-indent="false"/>
      <style:text-properties officeooo:paragraph-rsid="00341beb"/>
    </style:style>
    <style:style style:name="P82" style:family="paragraph" style:parent-style-name="Heading_20_3">
      <style:text-properties fo:font-variant="normal" fo:text-transform="none" fo:color="#000000" loext:opacity="100%" style:font-name="Liberation Serif" fo:font-size="11pt" fo:letter-spacing="normal" fo:font-style="normal" fo:font-weight="bold" officeooo:rsid="001ce228" officeooo:paragraph-rsid="001ce228" style:font-size-asian="11pt" style:font-weight-asian="bold" style:font-size-complex="11pt" style:font-weight-complex="bold"/>
    </style:style>
    <style:style style:name="P83" style:family="paragraph" style:parent-style-name="Heading_20_3">
      <style:text-properties fo:font-variant="normal" fo:text-transform="none" fo:color="#000000" loext:opacity="100%" style:font-name="Liberation Serif" fo:font-size="11pt" fo:letter-spacing="normal" fo:font-style="normal" fo:font-weight="bold" officeooo:rsid="008316ad" officeooo:paragraph-rsid="008316ad" style:font-size-asian="11pt" style:font-weight-asian="bold" style:font-size-complex="11pt" style:font-weight-complex="bold"/>
    </style:style>
    <style:style style:name="P84" style:family="paragraph" style:parent-style-name="Heading_20_3">
      <style:text-properties fo:font-variant="normal" fo:text-transform="none" fo:color="#000000" loext:opacity="100%" style:font-name="Liberation Serif" fo:font-size="11pt" fo:letter-spacing="normal" fo:font-style="normal" fo:font-weight="normal" style:font-size-asian="11pt" style:font-size-complex="11pt"/>
    </style:style>
    <style:style style:name="P85" style:family="paragraph" style:parent-style-name="Heading_20_3">
      <style:paragraph-properties fo:margin-left="0in" fo:margin-right="0in" fo:orphans="2" fo:widows="2" fo:text-indent="0in" style:auto-text-indent="false"/>
      <style:text-properties fo:font-variant="normal" fo:text-transform="none" fo:color="#000000" loext:opacity="100%" fo:letter-spacing="normal" fo:font-style="normal" fo:font-weight="normal" officeooo:paragraph-rsid="0053bd23"/>
    </style:style>
    <style:style style:name="P86" style:family="paragraph" style:parent-style-name="Heading_20_3">
      <style:text-properties style:font-name="Liberation Serif"/>
    </style:style>
    <style:style style:name="P87" style:family="paragraph" style:parent-style-name="Heading_20_3">
      <style:text-properties style:font-name="American Typewriter" fo:font-weight="normal" style:font-weight-asian="normal" style:font-weight-complex="normal"/>
    </style:style>
    <style:style style:name="P88" style:family="paragraph" style:parent-style-name="Heading_20_3">
      <style:text-properties style:font-name="American Typewriter" fo:font-size="12pt" fo:font-weight="normal" officeooo:paragraph-rsid="001ddb05" style:font-size-asian="12pt" style:font-weight-asian="normal" style:font-size-complex="12pt" style:font-weight-complex="normal"/>
    </style:style>
    <style:style style:name="P89" style:family="paragraph" style:parent-style-name="Heading_20_3">
      <style:text-properties style:font-name="American Typewriter" officeooo:paragraph-rsid="0055d180"/>
    </style:style>
    <style:style style:name="P90" style:family="paragraph" style:parent-style-name="Heading_20_3">
      <style:text-properties style:font-name="American Typewriter"/>
    </style:style>
    <style:style style:name="P91" style:family="paragraph" style:parent-style-name="Heading_20_3">
      <style:text-properties fo:font-weight="normal" officeooo:paragraph-rsid="0054b219" style:font-weight-asian="normal" style:font-weight-complex="normal"/>
    </style:style>
    <style:style style:name="P92" style:family="paragraph" style:parent-style-name="Standard" style:list-style-name="L1">
      <style:text-properties style:font-name="Liberation Serif"/>
    </style:style>
    <style:style style:name="P93" style:family="paragraph" style:parent-style-name="Standard" style:list-style-name="L2">
      <style:text-properties style:font-name="Liberation Serif"/>
    </style:style>
    <style:style style:name="P94" style:family="paragraph" style:parent-style-name="Standard" style:list-style-name="L2">
      <style:text-properties style:font-name="Liberation Serif" officeooo:rsid="007e9e37" officeooo:paragraph-rsid="007e9e37"/>
    </style:style>
    <style:style style:name="P95" style:family="paragraph" style:parent-style-name="Standard" style:list-style-name="L3">
      <style:text-properties style:font-name="Liberation Serif"/>
    </style:style>
    <style:style style:name="P96" style:family="paragraph" style:parent-style-name="Standard" style:list-style-name="L4">
      <style:text-properties style:font-name="Liberation Serif"/>
    </style:style>
    <style:style style:name="P97" style:family="paragraph" style:parent-style-name="Standard" style:list-style-name="L4">
      <style:text-properties style:font-name="Liberation Serif" officeooo:paragraph-rsid="00738b33"/>
    </style:style>
    <style:style style:name="P98" style:family="paragraph" style:parent-style-name="Standard" style:list-style-name="L5">
      <style:text-properties style:font-name="Liberation Serif" officeooo:paragraph-rsid="0068fc7e"/>
    </style:style>
    <style:style style:name="P99" style:family="paragraph" style:parent-style-name="Standard">
      <style:text-properties style:font-name="Liberation Serif" fo:font-size="11pt" style:font-size-asian="11pt" style:font-size-complex="11pt"/>
    </style:style>
    <style:style style:name="P100" style:family="paragraph" style:parent-style-name="Standard" style:list-style-name="WWNum1">
      <style:paragraph-properties fo:margin-left="0in" fo:text-indent="0in" style:auto-text-indent="false"/>
      <style:text-properties style:font-name="Liberation Serif" fo:font-size="11pt" style:font-size-asian="11pt" style:font-size-complex="11pt"/>
    </style:style>
    <style:style style:name="P101" style:family="paragraph" style:parent-style-name="Standard" style:list-style-name="L20">
      <style:text-properties style:font-name="Liberation Serif" fo:font-size="11pt" style:font-size-asian="11pt" style:font-size-complex="11pt"/>
    </style:style>
    <style:style style:name="P102" style:family="paragraph" style:parent-style-name="Standard" style:list-style-name="L21">
      <style:text-properties style:font-name="Liberation Serif" fo:font-size="11pt" style:font-size-asian="11pt" style:font-size-complex="11pt"/>
    </style:style>
    <style:style style:name="P103" style:family="paragraph" style:parent-style-name="Standard" style:list-style-name="L21">
      <style:text-properties style:font-name="Liberation Serif" fo:font-size="11pt" officeooo:rsid="00537a83" officeooo:paragraph-rsid="00537a83" style:font-size-asian="11pt" style:font-size-complex="11pt"/>
    </style:style>
    <style:style style:name="P104" style:family="paragraph" style:parent-style-name="Standard" style:list-style-name="L23">
      <style:text-properties style:font-name="Liberation Serif" fo:font-size="11pt" officeooo:rsid="00537a83" officeooo:paragraph-rsid="00537a83" style:font-size-asian="11pt" style:font-size-complex="11pt"/>
    </style:style>
    <style:style style:name="P105" style:family="paragraph" style:parent-style-name="Standard" style:list-style-name="L22">
      <style:text-properties style:font-name="Liberation Serif" fo:font-size="11pt" style:font-size-asian="11pt" style:font-size-complex="11pt"/>
    </style:style>
    <style:style style:name="P106" style:family="paragraph" style:parent-style-name="Standard" style:list-style-name="L23">
      <style:text-properties style:font-name="Liberation Serif" fo:font-size="11pt" style:font-size-asian="11pt" style:font-size-complex="11pt"/>
    </style:style>
    <style:style style:name="P107" style:family="paragraph" style:parent-style-name="Standard" style:list-style-name="L24">
      <style:text-properties style:font-name="Liberation Serif" fo:font-size="11pt" style:font-size-asian="11pt" style:font-size-complex="11pt"/>
    </style:style>
    <style:style style:name="P108" style:family="paragraph" style:parent-style-name="Standard" style:list-style-name="L25">
      <style:text-properties style:font-name="Liberation Serif" fo:font-size="11pt" style:font-size-asian="11pt" style:font-size-complex="11pt"/>
    </style:style>
    <style:style style:name="P109" style:family="paragraph" style:parent-style-name="Standard" style:list-style-name="L26">
      <style:text-properties style:font-name="Liberation Serif" fo:font-size="11pt" style:font-size-asian="11pt" style:font-size-complex="11pt"/>
    </style:style>
    <style:style style:name="P110" style:family="paragraph" style:parent-style-name="Standard" style:list-style-name="L27">
      <style:text-properties style:font-name="Liberation Serif" fo:font-size="11pt" style:font-size-asian="11pt" style:font-size-complex="11pt"/>
    </style:style>
    <style:style style:name="P111" style:family="paragraph" style:parent-style-name="Standard" style:list-style-name="L28">
      <style:text-properties style:font-name="Liberation Serif" fo:font-size="11pt" officeooo:paragraph-rsid="0053a92e" style:font-size-asian="11pt" style:font-size-complex="11pt"/>
    </style:style>
    <style:style style:name="P112" style:family="paragraph" style:parent-style-name="Standard" style:list-style-name="L30">
      <style:text-properties style:font-name="Liberation Serif" fo:font-size="11pt" officeooo:rsid="0048a673" officeooo:paragraph-rsid="0048a673" style:font-size-asian="11pt" style:font-size-complex="11pt"/>
    </style:style>
    <style:style style:name="P113" style:family="paragraph" style:parent-style-name="Standard" style:list-style-name="L30">
      <style:text-properties style:font-name="Liberation Serif" fo:font-size="11pt" officeooo:paragraph-rsid="0048a673" style:font-size-asian="11pt" style:font-size-complex="11pt"/>
    </style:style>
    <style:style style:name="P114" style:family="paragraph" style:parent-style-name="Standard" style:list-style-name="L30">
      <style:text-properties style:font-name="Liberation Serif" fo:font-size="11pt" style:font-size-asian="11pt" style:font-size-complex="11pt"/>
    </style:style>
    <style:style style:name="P11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font-size-complex="11pt"/>
    </style:style>
    <style:style style:name="P11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style>
    <style:style style:name="P11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officeooo:rsid="0088c215" officeooo:paragraph-rsid="0088c215" style:font-size-asian="11pt"/>
    </style:style>
    <style:style style:name="P118" style:family="paragraph" style:parent-style-name="Standard" style:list-style-name="L27">
      <style:text-properties style:font-name="Liberation Serif" fo:font-size="11pt" officeooo:paragraph-rsid="0053a92e"/>
    </style:style>
    <style:style style:name="P11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fo:font-weight="bold" style:font-size-asian="11pt" style:font-weight-asian="bold" style:font-size-complex="11pt" style:font-weight-complex="bold"/>
    </style:style>
    <style:style style:name="P120" style:family="paragraph" style:parent-style-name="Standard" style:list-style-name="L11">
      <style:text-properties style:font-name="Liberation Serif"/>
    </style:style>
    <style:style style:name="P121" style:family="paragraph" style:parent-style-name="Standard" style:list-style-name="L12">
      <style:text-properties style:font-name="Liberation Serif"/>
    </style:style>
    <style:style style:name="P122" style:family="paragraph" style:parent-style-name="Standard" style:list-style-name="L13">
      <style:text-properties style:font-name="Liberation Serif"/>
    </style:style>
    <style:style style:name="P123" style:family="paragraph" style:parent-style-name="Standard" style:list-style-name="L14">
      <style:text-properties style:font-name="Liberation Serif"/>
    </style:style>
    <style:style style:name="P124" style:family="paragraph" style:parent-style-name="Standard" style:list-style-name="L15">
      <style:text-properties style:font-name="Liberation Serif"/>
    </style:style>
    <style:style style:name="P125" style:family="paragraph" style:parent-style-name="Standard" style:list-style-name="L16">
      <style:text-properties style:font-name="Liberation Serif"/>
    </style:style>
    <style:style style:name="P126" style:family="paragraph" style:parent-style-name="Standard" style:list-style-name="L17">
      <style:text-properties style:font-name="Liberation Serif" officeooo:paragraph-rsid="004159f6"/>
    </style:style>
    <style:style style:name="P127" style:family="paragraph" style:parent-style-name="Standard" style:list-style-name="L31">
      <style:text-properties style:font-name="Liberation Serif"/>
    </style:style>
    <style:style style:name="P128" style:family="paragraph" style:parent-style-name="Standard" style:list-style-name="L31">
      <style:text-properties style:font-name="Liberation Serif" officeooo:paragraph-rsid="0053bd23"/>
    </style:style>
    <style:style style:name="P129" style:family="paragraph" style:parent-style-name="Standard" style:list-style-name="L31">
      <style:text-properties style:font-name="Liberation Serif" officeooo:rsid="0053bd23" officeooo:paragraph-rsid="0053bd23"/>
    </style:style>
    <style:style style:name="P130" style:family="paragraph" style:parent-style-name="Standard" style:list-style-name="L32">
      <style:text-properties style:font-name="Liberation Serif"/>
    </style:style>
    <style:style style:name="P131" style:family="paragraph" style:parent-style-name="Standard" style:list-style-name="L33">
      <style:text-properties style:font-name="Liberation Serif"/>
    </style:style>
    <style:style style:name="P132" style:family="paragraph" style:parent-style-name="Standard" style:list-style-name="L34">
      <style:text-properties style:font-name="Liberation Serif"/>
    </style:style>
    <style:style style:name="P133" style:family="paragraph" style:parent-style-name="Standard" style:list-style-name="L35">
      <style:text-properties style:font-name="Liberation Serif"/>
    </style:style>
    <style:style style:name="P134" style:family="paragraph" style:parent-style-name="Standard" style:list-style-name="L36">
      <style:text-properties style:font-name="Liberation Serif"/>
    </style:style>
    <style:style style:name="P135" style:family="paragraph" style:parent-style-name="Standard" style:list-style-name="L5">
      <style:text-properties fo:font-variant="normal" fo:text-transform="none" fo:color="#0a0a0a" loext:opacity="100%" style:text-outline="false" style:font-name="Liberation Serif" fo:font-size="11pt" fo:letter-spacing="normal" fo:font-style="normal" style:text-underline-style="none" fo:font-weight="normal" officeooo:paragraph-rsid="0068fc7e" style:font-size-asian="11pt" style:font-weight-asian="normal" style:font-size-complex="11pt"/>
    </style:style>
    <style:style style:name="P136" style:family="paragraph" style:parent-style-name="Standard" style:list-style-name="L30">
      <style:text-properties fo:font-variant="normal" fo:text-transform="none" fo:color="#0a0a0a" loext:opacity="100%" style:font-name="Liberation Serif" fo:font-size="11pt" fo:letter-spacing="normal" fo:font-style="normal" fo:font-weight="normal" officeooo:rsid="0048a673" style:font-size-asian="11pt" style:font-size-complex="11pt"/>
    </style:style>
    <style:style style:name="P137" style:family="paragraph" style:parent-style-name="Standard" style:list-style-name="L6"/>
    <style:style style:name="P138" style:family="paragraph" style:parent-style-name="Standard" style:list-style-name="L7"/>
    <style:style style:name="P139" style:family="paragraph" style:parent-style-name="Standard" style:list-style-name="L8"/>
    <style:style style:name="P140" style:family="paragraph" style:parent-style-name="Standard">
      <style:text-properties style:use-window-font-color="true" loext:opacity="0%" style:font-name="Liberation Serif" fo:font-size="11pt" fo:font-weight="normal" style:font-size-asian="11pt" style:font-weight-asian="normal" style:font-size-complex="11pt"/>
    </style:style>
    <style:style style:name="P141" style:family="paragraph" style:parent-style-name="Standard">
      <style:text-properties style:use-window-font-color="true" loext:opacity="0%" style:font-name="Liberation Serif" fo:font-size="11pt" fo:font-weight="normal" officeooo:paragraph-rsid="008316ad" style:font-size-asian="11pt" style:font-weight-asian="normal" style:font-size-complex="11pt"/>
    </style:style>
    <style:style style:name="P142" style:family="paragraph" style:parent-style-name="Standard">
      <style:text-properties officeooo:paragraph-rsid="008316ad"/>
    </style:style>
    <style:style style:name="P143" style:family="paragraph" style:parent-style-name="Standard" style:list-style-name="L9">
      <style:text-properties officeooo:paragraph-rsid="008316ad"/>
    </style:style>
    <style:style style:name="P144" style:family="paragraph" style:parent-style-name="Standard" style:list-style-name="WWNum1">
      <style:paragraph-properties fo:margin-left="0in" fo:text-indent="0in" style:auto-text-indent="false"/>
    </style:style>
    <style:style style:name="P145" style:family="paragraph" style:parent-style-name="Standard" style:list-style-name="L10">
      <style:text-properties officeooo:paragraph-rsid="002d1682"/>
    </style:style>
    <style:style style:name="P146" style:family="paragraph" style:parent-style-name="Standard" style:list-style-name="L11"/>
    <style:style style:name="P147" style:family="paragraph" style:parent-style-name="Standard" style:list-style-name="L12"/>
    <style:style style:name="P148" style:family="paragraph" style:parent-style-name="Standard" style:list-style-name="L18">
      <style:paragraph-properties fo:margin-left="0in" fo:text-indent="0in" style:auto-text-indent="false"/>
      <style:text-properties officeooo:paragraph-rsid="005db5a3"/>
    </style:style>
    <style:style style:name="P149" style:family="paragraph" style:parent-style-name="Standard" style:list-style-name="L18">
      <style:paragraph-properties fo:margin-left="0in" fo:text-indent="0in" style:auto-text-indent="false"/>
      <style:text-properties officeooo:rsid="005b845b" officeooo:paragraph-rsid="005db5a3"/>
    </style:style>
    <style:style style:name="P150" style:family="paragraph" style:parent-style-name="Standard" style:list-style-name="L19"/>
    <style:style style:name="P151" style:family="paragraph" style:parent-style-name="Standard" style:list-style-name="L24"/>
    <style:style style:name="P152" style:family="paragraph" style:parent-style-name="Standard" style:list-style-name="L29"/>
    <style:style style:name="P153" style:family="paragraph" style:parent-style-name="Standard" style:list-style-name="L30"/>
    <style:style style:name="P154" style:family="paragraph" style:parent-style-name="Standard" style:list-style-name="L31">
      <style:text-properties officeooo:paragraph-rsid="0053bd23"/>
    </style:style>
    <style:style style:name="P155" style:family="paragraph" style:parent-style-name="Standard" style:list-style-name="L31">
      <style:text-properties officeooo:rsid="0053a92e" officeooo:paragraph-rsid="0053a92e"/>
    </style:style>
    <style:style style:name="P156" style:family="paragraph" style:parent-style-name="Standard" style:list-style-name="L37">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8c215"/>
    </style:style>
    <style:style style:name="P15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58" style:family="paragraph" style:parent-style-name="Standard" style:list-style-name="L38">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a693"/>
    </style:style>
    <style:style style:name="P159" style:family="paragraph" style:parent-style-name="Standard" style:list-style-name="L39">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3a55"/>
    </style:style>
    <style:style style:name="P160" style:family="paragraph" style:parent-style-name="Standard" style:list-style-name="L40">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3a55"/>
    </style:style>
    <style:style style:name="P161" style:family="paragraph" style:parent-style-name="Standard" style:list-style-name="L41">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3a55"/>
    </style:style>
    <style:style style:name="P16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1" fo:font-size="18pt" style:font-size-asian="18pt"/>
    </style:style>
    <style:style style:name="P16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Liberation Serif" fo:font-size="11pt" style:font-size-asian="11pt" style:font-size-complex="11pt"/>
    </style:style>
    <style:style style:name="P164" style:family="paragraph" style:parent-style-name="Standard">
      <style:text-properties fo:font-weight="bold" officeooo:rsid="0011c311" officeooo:paragraph-rsid="00738b33" style:font-weight-asian="bold" style:font-weight-complex="bold"/>
    </style:style>
    <style:style style:name="P165" style:family="paragraph" style:parent-style-name="Text_20_body" style:list-style-name="L34">
      <style:paragraph-properties fo:orphans="2" fo:widows="2" fo:text-indent="0in" style:auto-text-indent="false"/>
      <style:text-properties fo:font-variant="normal" fo:text-transform="none" fo:color="#000000" loext:opacity="100%" style:font-name="Liberation Serif" fo:letter-spacing="normal" fo:font-style="normal" fo:font-weight="normal"/>
    </style:style>
    <style:style style:name="T1" style:family="text">
      <style:text-properties style:font-name="American Typewriter"/>
    </style:style>
    <style:style style:name="T2" style:family="text">
      <style:text-properties style:font-name="American Typewriter" officeooo:rsid="00202a73"/>
    </style:style>
    <style:style style:name="T3" style:family="text">
      <style:text-properties style:font-name="American Typewriter" officeooo:rsid="0021c6f7"/>
    </style:style>
    <style:style style:name="T4" style:family="text">
      <style:text-properties fo:font-weight="bold" style:font-weight-asian="bold" style:font-weight-complex="bold"/>
    </style:style>
    <style:style style:name="T5" style:family="text">
      <style:text-properties fo:font-weight="bold" officeooo:rsid="000bbd3f" style:font-weight-asian="bold" style:font-weight-complex="bold"/>
    </style:style>
    <style:style style:name="T6" style:family="text">
      <style:text-properties fo:font-weight="bold" officeooo:rsid="001ce228" style:font-weight-asian="bold" style:font-weight-complex="bold"/>
    </style:style>
    <style:style style:name="T7" style:family="text">
      <style:text-properties fo:font-weight="bold" officeooo:rsid="0073fce6" style:font-weight-asian="bold" style:font-weight-complex="bold"/>
    </style:style>
    <style:style style:name="T8" style:family="text">
      <style:text-properties fo:font-weight="bold" officeooo:rsid="007821a5"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bbd3f" style:font-weight-asian="normal" style:font-weight-complex="normal"/>
    </style:style>
    <style:style style:name="T11" style:family="text">
      <style:text-properties fo:font-weight="normal" officeooo:rsid="0018d26d" style:font-weight-asian="normal" style:font-weight-complex="normal"/>
    </style:style>
    <style:style style:name="T12" style:family="text">
      <style:text-properties fo:font-weight="normal" officeooo:rsid="00569b9c" style:font-weight-asian="normal" style:font-weight-complex="normal"/>
    </style:style>
    <style:style style:name="T13" style:family="text">
      <style:text-properties officeooo:rsid="000db080"/>
    </style:style>
    <style:style style:name="T14" style:family="text">
      <style:text-properties officeooo:rsid="000fcead"/>
    </style:style>
    <style:style style:name="T15" style:family="text">
      <style:text-properties fo:color="#333333" loext:opacity="100%" style:text-outline="false" style:text-underline-style="none" fo:font-weight="normal" style:font-weight-asian="normal"/>
    </style:style>
    <style:style style:name="T16" style:family="text">
      <style:text-properties fo:color="#333333" loext:opacity="100%" style:text-outline="false" style:font-name="Liberation Serif" fo:font-size="11pt" style:text-underline-style="none" fo:font-weight="normal" style:font-size-asian="11pt" style:font-weight-asian="normal" style:font-size-complex="11pt"/>
    </style:style>
    <style:style style:name="T17" style:family="text">
      <style:text-properties fo:color="#333333" loext:opacity="100%" style:text-outline="false" style:font-name="Liberation Serif" fo:font-size="11pt" style:text-underline-style="none" fo:font-weight="normal" officeooo:rsid="00128705" style:font-size-asian="11pt" style:font-weight-asian="normal" style:font-size-complex="11pt"/>
    </style:style>
    <style:style style:name="T18" style:family="text">
      <style:text-properties fo:color="#333333" loext:opacity="100%" style:text-outline="false" style:font-name="Liberation Serif" fo:font-size="11pt" style:text-underline-style="none" fo:font-weight="normal" officeooo:rsid="007b3d44" style:font-size-asian="11pt" style:font-weight-asian="normal" style:font-size-complex="11pt"/>
    </style:style>
    <style:style style:name="T19" style:family="text">
      <style:text-properties fo:color="#333333" loext:opacity="100%" style:text-outline="false" fo:font-size="11pt" fo:font-style="normal" style:text-underline-style="none" style:font-size-asian="11pt" style:font-style-asian="normal" style:font-size-complex="11pt"/>
    </style:style>
    <style:style style:name="T20" style:family="text">
      <style:text-properties fo:font-variant="normal" fo:text-transform="none" fo:color="#333333" loext:opacity="100%" style:text-outline="false" fo:letter-spacing="normal" fo:font-style="normal" style:text-underline-style="none" fo:font-weight="normal" style:font-weight-asian="normal"/>
    </style:style>
    <style:style style:name="T21" style:family="text">
      <style:text-properties fo:font-variant="normal" fo:text-transform="none" fo:color="#333333" loext:opacity="100%" style:text-outline="false" style:font-name="Liberation Serif" fo:font-size="12pt" fo:letter-spacing="normal" fo:font-style="normal" style:text-underline-style="none" fo:font-weight="normal" officeooo:rsid="00128705" style:font-weight-asian="normal"/>
    </style:style>
    <style:style style:name="T22" style:family="text">
      <style:text-properties fo:font-variant="normal" fo:text-transform="none" fo:color="#333333" loext:opacity="100%" style:text-outline="false" style:font-name="Liberation Serif" fo:letter-spacing="normal" fo:font-style="normal" style:text-underline-style="none" fo:font-weight="normal" style:font-size-asian="11pt" style:font-weight-asian="normal"/>
    </style:style>
    <style:style style:name="T23" style:family="text">
      <style:text-properties fo:font-variant="normal" fo:text-transform="none" fo:color="#3333ff" loext:opacity="100%" style:text-outline="false" style:font-name="Liberation Serif" fo:letter-spacing="normal" fo:font-style="normal" style:text-underline-style="none" fo:font-weight="normal" style:font-size-asian="11pt" style:font-weight-asian="normal"/>
    </style:style>
    <style:style style:name="T24" style:family="text">
      <style:text-properties fo:font-variant="normal" fo:text-transform="none" fo:color="#141414" loext:opacity="100%" style:text-outline="false" style:font-name="Liberation Serif" fo:font-size="11pt" fo:letter-spacing="normal" fo:font-style="normal" style:text-underline-style="none" fo:font-weight="normal" officeooo:rsid="00128705" style:font-size-asian="11pt" style:font-weight-asian="normal" style:font-size-complex="11pt"/>
    </style:style>
    <style:style style:name="T25" style:family="text">
      <style:text-properties fo:font-variant="normal" fo:text-transform="none" fo:color="#085c77" loext:opacity="100%" style:font-name="Liberation Serif" fo:font-size="11pt" fo:letter-spacing="normal" fo:font-style="normal" style:text-underline-style="solid" style:text-underline-width="auto" style:text-underline-color="font-color" fo:font-weight="normal" style:font-size-asian="11pt" style:font-size-complex="11pt"/>
    </style:style>
    <style:style style:name="T26" style:family="text">
      <style:text-properties fo:font-variant="normal" fo:text-transform="none" fo:color="#212529" loext:opacity="100%" style:text-outline="false" style:font-name="Liberation Serif" fo:font-size="11pt" fo:letter-spacing="normal" fo:font-style="normal" style:text-underline-style="none" fo:font-weight="normal" style:font-size-asian="11pt" style:font-size-complex="11pt"/>
    </style:style>
    <style:style style:name="T27" style:family="text">
      <style:text-properties fo:font-variant="normal" fo:text-transform="none" fo:color="#212529" loext:opacity="100%" style:text-outline="false" style:font-name="Liberation Serif" fo:font-size="11pt" fo:letter-spacing="normal" fo:font-style="normal" style:text-underline-style="none" fo:font-weight="normal" officeooo:rsid="00128705" style:font-size-asian="11pt" style:font-size-complex="11pt"/>
    </style:style>
    <style:style style:name="T28" style:family="text">
      <style:text-properties fo:font-variant="normal" fo:text-transform="none" fo:color="#000000" loext:opacity="100%" fo:letter-spacing="normal"/>
    </style:style>
    <style:style style:name="T29" style:family="text">
      <style:text-properties fo:font-variant="normal" fo:text-transform="none" fo:color="#000000" loext:opacity="100%" fo:letter-spacing="normal" fo:font-style="normal"/>
    </style:style>
    <style:style style:name="T30" style:family="text">
      <style:text-properties fo:font-variant="normal" fo:text-transform="none" fo:color="#000000" loext:opacity="100%" fo:letter-spacing="normal" fo:font-style="normal" fo:font-weight="normal"/>
    </style:style>
    <style:style style:name="T31" style:family="text">
      <style:text-properties fo:font-variant="normal" fo:text-transform="none" fo:color="#000000" loext:opacity="100%" fo:letter-spacing="normal" fo:font-style="normal" fo:font-weight="normal" officeooo:rsid="001ce228"/>
    </style:style>
    <style:style style:name="T32" style:family="text">
      <style:text-properties fo:font-variant="normal" fo:text-transform="none" fo:color="#000000" loext:opacity="100%" fo:letter-spacing="normal" fo:font-style="normal" fo:font-weight="normal" officeooo:rsid="001ce228" style:font-weight-asian="bold" style:font-weight-complex="bold"/>
    </style:style>
    <style:style style:name="T33" style:family="text">
      <style:text-properties fo:font-variant="normal" fo:text-transform="none" fo:color="#000000" loext:opacity="100%" fo:letter-spacing="normal" fo:font-style="normal" fo:font-weight="normal" officeooo:rsid="0027fa9d" style:font-weight-asian="bold" style:font-weight-complex="bold"/>
    </style:style>
    <style:style style:name="T34" style:family="text">
      <style:text-properties fo:font-variant="normal" fo:text-transform="none" fo:color="#000000" loext:opacity="100%" fo:letter-spacing="normal" fo:font-style="normal" fo:font-weight="normal" style:font-style-asian="normal" style:font-weight-asian="normal" style:font-style-complex="normal" style:font-weight-complex="normal"/>
    </style:style>
    <style:style style:name="T35" style:family="text">
      <style:text-properties fo:font-variant="normal" fo:text-transform="none" fo:color="#000000" loext:opacity="100%" fo:letter-spacing="normal" fo:font-style="normal" fo:font-weight="normal" officeooo:rsid="00287c31"/>
    </style:style>
    <style:style style:name="T36" style:family="text">
      <style:text-properties fo:font-variant="normal" fo:text-transform="none" fo:color="#000000" loext:opacity="100%" fo:letter-spacing="normal" fo:font-style="normal" fo:font-weight="normal" style:font-weight-asian="normal" style:font-weight-complex="normal"/>
    </style:style>
    <style:style style:name="T37" style:family="text">
      <style:text-properties fo:font-variant="normal" fo:text-transform="none" fo:color="#000000" loext:opacity="100%" fo:letter-spacing="normal" fo:font-style="normal" fo:font-weight="normal" officeooo:rsid="001ce228" style:font-weight-asian="normal" style:font-weight-complex="normal"/>
    </style:style>
    <style:style style:name="T38" style:family="text">
      <style:text-properties fo:font-variant="normal" fo:text-transform="none" fo:color="#000000" loext:opacity="100%" fo:letter-spacing="normal" fo:font-style="normal" fo:font-weight="normal" officeooo:rsid="00297128" style:font-weight-asian="normal" style:font-weight-complex="normal"/>
    </style:style>
    <style:style style:name="T39" style:family="text">
      <style:text-properties fo:font-variant="normal" fo:text-transform="none" fo:color="#000000" loext:opacity="100%" fo:letter-spacing="normal" fo:font-style="normal" fo:font-weight="normal" officeooo:rsid="002b04c8"/>
    </style:style>
    <style:style style:name="T40" style:family="text">
      <style:text-properties fo:font-variant="normal" fo:text-transform="none" fo:color="#000000" loext:opacity="100%" fo:letter-spacing="normal" fo:font-style="normal" fo:font-weight="normal" officeooo:rsid="002b4a64"/>
    </style:style>
    <style:style style:name="T41" style:family="text">
      <style:text-properties fo:font-variant="normal" fo:text-transform="none" fo:color="#000000" loext:opacity="100%" fo:letter-spacing="normal" fo:font-style="normal" fo:font-weight="normal" officeooo:rsid="002a831d"/>
    </style:style>
    <style:style style:name="T42" style:family="text">
      <style:text-properties fo:font-variant="normal" fo:text-transform="none" fo:color="#000000" loext:opacity="100%" fo:letter-spacing="normal" fo:font-style="normal" fo:font-weight="normal" officeooo:rsid="00320ced"/>
    </style:style>
    <style:style style:name="T43" style:family="text">
      <style:text-properties fo:font-variant="normal" fo:text-transform="none" fo:color="#000000" loext:opacity="100%" fo:letter-spacing="normal" fo:font-style="normal" fo:font-weight="normal" officeooo:rsid="0032428e"/>
    </style:style>
    <style:style style:name="T44" style:family="text">
      <style:text-properties fo:font-variant="normal" fo:text-transform="none" fo:color="#000000" loext:opacity="100%" fo:letter-spacing="normal" fo:font-style="normal" officeooo:rsid="001fd7e2"/>
    </style:style>
    <style:style style:name="T45" style:family="text">
      <style:text-properties fo:font-variant="normal" fo:text-transform="none" fo:color="#000000" loext:opacity="100%" fo:letter-spacing="normal" fo:font-style="normal" fo:font-weight="bold" officeooo:rsid="008316ad" style:font-weight-asian="bold" style:font-weight-complex="bold"/>
    </style:style>
    <style:style style:name="T46" style:family="text">
      <style:text-properties fo:font-variant="normal" fo:text-transform="none" fo:color="#000000" loext:opacity="100%" style:font-name="Liberation Serif" fo:font-size="11pt" fo:letter-spacing="normal" fo:font-style="normal" fo:font-weight="normal" officeooo:rsid="00287c31" style:font-size-asian="11pt" style:font-weight-asian="bold" style:font-size-complex="11pt" style:font-weight-complex="bold"/>
    </style:style>
    <style:style style:name="T47" style:family="text">
      <style:text-properties fo:font-variant="normal" fo:text-transform="none" fo:color="#000000" loext:opacity="100%" style:font-name="Liberation Serif" fo:font-size="11pt" fo:letter-spacing="normal" fo:font-style="normal" fo:font-weight="normal" officeooo:rsid="002a3aa2" style:font-size-asian="11pt" style:font-weight-asian="bold" style:font-size-complex="11pt" style:font-weight-complex="bold"/>
    </style:style>
    <style:style style:name="T48" style:family="text">
      <style:text-properties fo:font-variant="normal" fo:text-transform="none" fo:color="#000000" loext:opacity="100%" style:font-name="Liberation Serif" fo:font-size="11pt" fo:letter-spacing="normal" fo:font-style="normal" fo:font-weight="normal" officeooo:rsid="003c5f32" style:font-size-asian="11pt" style:font-weight-asian="bold" style:font-size-complex="11pt" style:font-weight-complex="bold"/>
    </style:style>
    <style:style style:name="T49" style:family="text">
      <style:text-properties fo:font-variant="normal" fo:text-transform="none" fo:color="#000000" loext:opacity="100%" style:font-name="Liberation Serif" fo:font-size="11pt" fo:letter-spacing="normal" fo:font-style="normal" fo:font-weight="normal" officeooo:rsid="003a99a7" style:font-size-asian="11pt" style:font-weight-asian="bold" style:font-size-complex="11pt" style:font-weight-complex="bold"/>
    </style:style>
    <style:style style:name="T50" style:family="text">
      <style:text-properties fo:font-variant="normal" fo:text-transform="none" fo:color="#000000" loext:opacity="100%" style:font-name="Liberation Serif" fo:font-size="11pt" fo:letter-spacing="normal" fo:font-style="normal" fo:font-weight="normal" style:font-size-asian="11pt" style:font-size-complex="11pt"/>
    </style:style>
    <style:style style:name="T51" style:family="text">
      <style:text-properties fo:font-variant="normal" fo:text-transform="none" fo:color="#000000" loext:opacity="100%" style:font-name="Liberation Serif" fo:font-size="11pt" fo:letter-spacing="normal" fo:font-style="normal" fo:font-weight="normal" officeooo:rsid="001ce228" style:font-size-asian="11pt" style:font-size-complex="11pt"/>
    </style:style>
    <style:style style:name="T52" style:family="text">
      <style:text-properties fo:font-variant="normal" fo:text-transform="none" fo:color="#000000" loext:opacity="100%" style:font-name="Liberation Serif" fo:font-size="11pt" fo:letter-spacing="normal" fo:font-style="normal" fo:font-weight="normal" officeooo:rsid="002a3aa2" style:font-size-asian="11pt" style:font-size-complex="11pt"/>
    </style:style>
    <style:style style:name="T53" style:family="text">
      <style:text-properties fo:font-variant="normal" fo:text-transform="none" fo:color="#000000" loext:opacity="100%" style:font-name="Liberation Serif" fo:font-size="11pt" fo:letter-spacing="normal" fo:font-style="normal" fo:font-weight="normal" officeooo:rsid="002b4a64" style:font-size-asian="11pt" style:font-size-complex="11pt"/>
    </style:style>
    <style:style style:name="T54" style:family="text">
      <style:text-properties fo:font-variant="normal" fo:text-transform="none" fo:color="#000000" loext:opacity="100%" style:font-name="Liberation Serif" fo:font-size="11pt" fo:letter-spacing="normal" fo:font-style="normal" fo:font-weight="normal" officeooo:rsid="00313315" style:font-size-asian="11pt" style:font-size-complex="11pt"/>
    </style:style>
    <style:style style:name="T55" style:family="text">
      <style:text-properties fo:font-variant="normal" fo:text-transform="none" fo:color="#000000" loext:opacity="100%" style:font-name="Liberation Serif" fo:font-size="11pt" fo:letter-spacing="normal" fo:font-style="normal" fo:font-weight="normal" officeooo:rsid="00320ced" style:font-size-asian="11pt" style:font-size-complex="11pt"/>
    </style:style>
    <style:style style:name="T56" style:family="text">
      <style:text-properties fo:font-variant="normal" fo:text-transform="none" fo:color="#000000" loext:opacity="100%" style:font-name="Liberation Serif" fo:font-size="11pt" fo:letter-spacing="normal" fo:font-style="normal" fo:font-weight="normal" officeooo:rsid="0032428e" style:font-size-asian="11pt" style:font-size-complex="11pt"/>
    </style:style>
    <style:style style:name="T57" style:family="text">
      <style:text-properties fo:font-variant="normal" fo:text-transform="none" fo:color="#000000" loext:opacity="100%" style:font-name="Liberation Serif" fo:font-size="11pt" fo:letter-spacing="normal" fo:font-style="normal" fo:font-weight="normal" officeooo:rsid="00341beb" style:font-size-asian="11pt" style:font-size-complex="11pt"/>
    </style:style>
    <style:style style:name="T58" style:family="text">
      <style:text-properties fo:font-variant="normal" fo:text-transform="none" fo:color="#000000" loext:opacity="100%" style:font-name="Liberation Serif" fo:font-size="11pt" fo:letter-spacing="normal" fo:font-style="normal" fo:font-weight="normal" officeooo:rsid="00362050" style:font-size-asian="11pt" style:font-size-complex="11pt"/>
    </style:style>
    <style:style style:name="T59" style:family="text">
      <style:text-properties fo:font-variant="normal" fo:text-transform="none" fo:color="#000000" loext:opacity="100%" style:font-name="Liberation Serif" fo:font-size="11pt" fo:letter-spacing="normal" fo:font-style="normal" fo:font-weight="normal" officeooo:rsid="0027fa9d" style:font-size-asian="11pt" style:font-size-complex="11pt"/>
    </style:style>
    <style:style style:name="T60" style:family="text">
      <style:text-properties fo:font-variant="normal" fo:text-transform="none" fo:color="#000000" loext:opacity="100%" style:font-name="Liberation Serif" fo:font-size="11pt" fo:letter-spacing="normal" fo:font-style="normal" fo:font-weight="normal" officeooo:rsid="00379202" style:font-size-asian="11pt" style:font-size-complex="11pt"/>
    </style:style>
    <style:style style:name="T61" style:family="text">
      <style:text-properties fo:font-variant="normal" fo:text-transform="none" fo:color="#000000" loext:opacity="100%" style:font-name="Liberation Serif" fo:font-size="11pt" fo:letter-spacing="normal" fo:font-style="normal" fo:font-weight="normal" officeooo:rsid="0037926d" style:font-size-asian="11pt" style:font-size-complex="11pt"/>
    </style:style>
    <style:style style:name="T62" style:family="text">
      <style:text-properties fo:font-variant="normal" fo:text-transform="none" fo:color="#000000" loext:opacity="100%" style:font-name="Liberation Serif" fo:font-size="11pt" fo:letter-spacing="normal" fo:font-style="normal" fo:font-weight="normal" officeooo:rsid="0051b5cb" style:font-size-asian="11pt" style:font-size-complex="11pt"/>
    </style:style>
    <style:style style:name="T63" style:family="text">
      <style:text-properties fo:font-variant="normal" fo:text-transform="none" fo:color="#000000" loext:opacity="100%" style:font-name="Liberation Serif" fo:font-size="11pt" fo:letter-spacing="normal" fo:font-style="normal" fo:font-weight="normal" officeooo:rsid="006d5853" style:font-size-asian="11pt" style:font-size-complex="11pt"/>
    </style:style>
    <style:style style:name="T64" style:family="text">
      <style:text-properties fo:font-variant="normal" fo:text-transform="none" fo:color="#000000" loext:opacity="100%" style:font-name="Liberation Serif" fo:font-size="11pt" fo:letter-spacing="normal" fo:font-style="normal" fo:font-weight="normal" style:font-size-asian="11pt" style:font-weight-asian="normal" style:font-size-complex="11pt" style:font-weight-complex="normal"/>
    </style:style>
    <style:style style:name="T65" style:family="text">
      <style:text-properties fo:font-variant="normal" fo:text-transform="none" fo:color="#000000" loext:opacity="100%" style:font-name="Liberation Serif" fo:font-size="11pt" fo:letter-spacing="normal" fo:font-style="normal" fo:font-weight="normal" officeooo:rsid="0027fefd" style:font-size-asian="11pt" style:font-weight-asian="normal" style:font-size-complex="11pt" style:font-weight-complex="normal"/>
    </style:style>
    <style:style style:name="T66" style:family="text">
      <style:text-properties fo:font-variant="normal" fo:text-transform="none" fo:color="#000000" loext:opacity="100%" style:font-name="Liberation Serif" fo:font-size="11pt" fo:letter-spacing="normal" fo:font-style="normal" fo:font-weight="bold" officeooo:rsid="001ce228" style:font-size-asian="11pt" style:font-weight-asian="bold" style:font-size-complex="11pt" style:font-weight-complex="bold"/>
    </style:style>
    <style:style style:name="T67" style:family="text">
      <style:text-properties fo:font-variant="normal" fo:text-transform="none" fo:color="#000000" loext:opacity="100%" style:font-name="Liberation Serif" fo:font-size="11pt" fo:letter-spacing="normal" fo:font-style="normal" fo:font-weight="bold" officeooo:rsid="002a3aa2" style:font-size-asian="11pt" style:font-weight-asian="bold" style:font-size-complex="11pt" style:font-weight-complex="bold"/>
    </style:style>
    <style:style style:name="T68" style:family="text">
      <style:text-properties fo:font-variant="normal" fo:text-transform="none" fo:color="#000000" loext:opacity="100%" style:font-name="Liberation Serif" fo:font-size="11pt" fo:letter-spacing="normal" fo:font-style="normal" officeooo:rsid="00313315" style:font-size-asian="11pt" style:font-size-complex="11pt"/>
    </style:style>
    <style:style style:name="T69" style:family="text">
      <style:text-properties fo:font-variant="normal" fo:text-transform="none" fo:color="#000000" loext:opacity="100%" style:font-name="Liberation Serif" fo:font-size="11pt" fo:letter-spacing="normal" fo:font-weight="normal" officeooo:rsid="00320ced" style:font-size-asian="11pt" style:font-size-complex="11pt"/>
    </style:style>
    <style:style style:name="T70" style:family="text">
      <style:text-properties fo:font-variant="normal" fo:text-transform="none" fo:color="#000000" loext:opacity="100%" style:font-name="Liberation Serif" fo:letter-spacing="normal"/>
    </style:style>
    <style:style style:name="T71" style:family="text">
      <style:text-properties fo:font-variant="normal" fo:text-transform="none" fo:color="#000000" loext:opacity="100%" style:font-name="Liberation Serif" fo:letter-spacing="normal" fo:font-style="normal" fo:font-weight="normal"/>
    </style:style>
    <style:style style:name="T72" style:family="text">
      <style:text-properties fo:font-variant="normal" fo:text-transform="none" fo:color="#000000" loext:opacity="100%" style:font-name="Liberation Serif" fo:letter-spacing="normal" fo:font-style="normal" fo:font-weight="normal" officeooo:rsid="002b4a64"/>
    </style:style>
    <style:style style:name="T73" style:family="text">
      <style:text-properties fo:font-variant="normal" fo:text-transform="none" fo:color="#000000" loext:opacity="100%" style:font-name="Liberation Serif" fo:letter-spacing="normal" fo:font-style="normal" fo:font-weight="normal" officeooo:rsid="002a831d"/>
    </style:style>
    <style:style style:name="T74" style:family="text">
      <style:text-properties fo:font-variant="normal" fo:text-transform="none" fo:color="#000000" loext:opacity="100%" style:font-name="Liberation Serif" fo:letter-spacing="normal" fo:font-style="normal" fo:font-weight="normal" officeooo:rsid="002e7f12"/>
    </style:style>
    <style:style style:name="T75" style:family="text">
      <style:text-properties fo:font-variant="normal" fo:text-transform="none" fo:color="#000000" loext:opacity="100%" style:font-name="Liberation Serif" fo:letter-spacing="normal" fo:font-style="normal" fo:font-weight="normal" officeooo:rsid="00313315"/>
    </style:style>
    <style:style style:name="T76" style:family="text">
      <style:text-properties fo:font-variant="normal" fo:text-transform="none" fo:color="#000000" loext:opacity="100%" style:font-name="Liberation Serif" fo:letter-spacing="normal" fo:font-style="normal" fo:font-weight="normal" officeooo:rsid="00320ced"/>
    </style:style>
    <style:style style:name="T77" style:family="text">
      <style:text-properties fo:font-variant="normal" fo:text-transform="none" fo:color="#000000" loext:opacity="100%" style:font-name="Liberation Serif" fo:letter-spacing="normal" fo:font-style="normal" fo:font-weight="normal" officeooo:rsid="0032428e"/>
    </style:style>
    <style:style style:name="T78" style:family="text">
      <style:text-properties fo:font-variant="normal" fo:text-transform="none" fo:color="#000000" loext:opacity="100%" style:font-name="Liberation Serif" fo:letter-spacing="normal" fo:font-style="normal" fo:font-weight="normal" officeooo:rsid="003593cc"/>
    </style:style>
    <style:style style:name="T79" style:family="text">
      <style:text-properties fo:font-variant="normal" fo:text-transform="none" fo:color="#000000" loext:opacity="100%" style:font-name="Liberation Serif" fo:letter-spacing="normal" fo:font-style="normal" fo:font-weight="normal" officeooo:rsid="00362050"/>
    </style:style>
    <style:style style:name="T80" style:family="text">
      <style:text-properties fo:font-variant="normal" fo:text-transform="none" fo:color="#000000" loext:opacity="100%" style:font-name="Liberation Serif" fo:letter-spacing="normal" fo:font-style="normal" fo:font-weight="normal" officeooo:rsid="0037926d"/>
    </style:style>
    <style:style style:name="T81" style:family="text">
      <style:text-properties fo:font-variant="normal" fo:text-transform="none" fo:color="#000000" loext:opacity="100%" style:font-name="Liberation Serif" fo:letter-spacing="normal" fo:font-style="normal" fo:font-weight="normal" officeooo:rsid="0038f357"/>
    </style:style>
    <style:style style:name="T82" style:family="text">
      <style:text-properties fo:font-variant="normal" fo:text-transform="none" fo:color="#000000" loext:opacity="100%" style:font-name="Liberation Serif" fo:letter-spacing="normal" fo:font-style="normal" fo:font-weight="normal" officeooo:rsid="00287c31"/>
    </style:style>
    <style:style style:name="T83" style:family="text">
      <style:text-properties fo:font-variant="normal" fo:text-transform="none" fo:color="#000000" loext:opacity="100%" style:font-name="Liberation Serif" fo:letter-spacing="normal" fo:font-style="normal" fo:font-weight="normal" officeooo:rsid="0044e228"/>
    </style:style>
    <style:style style:name="T84" style:family="text">
      <style:text-properties fo:font-variant="normal" fo:text-transform="none" fo:color="#000000" loext:opacity="100%" style:font-name="Liberation Serif" fo:letter-spacing="normal" fo:font-style="normal" officeooo:rsid="00320ced"/>
    </style:style>
    <style:style style:name="T85" style:family="text">
      <style:text-properties fo:font-variant="normal" fo:text-transform="none" fo:color="#000000" loext:opacity="100%" style:font-name="Liberation Serif" fo:letter-spacing="normal" fo:font-style="normal" fo:font-weight="bold" style:font-weight-asian="bold" style:font-weight-complex="bold"/>
    </style:style>
    <style:style style:name="T86" style:family="text">
      <style:text-properties fo:font-variant="normal" fo:text-transform="none" fo:color="#000000" loext:opacity="100%" style:font-name="Liberation Serif" fo:letter-spacing="normal" fo:font-style="normal" fo:font-weight="bold" officeooo:rsid="00313315" style:font-weight-asian="bold" style:font-weight-complex="bold"/>
    </style:style>
    <style:style style:name="T87" style:family="text">
      <style:text-properties fo:font-variant="normal" fo:text-transform="none" fo:color="#000000" loext:opacity="100%" style:font-name="Liberation Serif" fo:letter-spacing="normal" fo:font-style="italic" fo:font-weight="normal" style:font-style-asian="italic" style:font-style-complex="italic"/>
    </style:style>
    <style:style style:name="T88" style:family="text">
      <style:text-properties fo:font-variant="normal" fo:text-transform="none" fo:color="#000000" loext:opacity="100%" style:font-name="American Typewriter" fo:letter-spacing="normal" fo:font-style="normal" fo:font-weight="normal"/>
    </style:style>
    <style:style style:name="T89" style:family="text">
      <style:text-properties fo:font-variant="normal" fo:text-transform="none" fo:color="#000000" loext:opacity="100%" style:font-name="American Typewriter" fo:letter-spacing="normal" fo:font-style="normal" fo:font-weight="normal" officeooo:rsid="0038f357"/>
    </style:style>
    <style:style style:name="T90" style:family="text">
      <style:text-properties fo:font-variant="normal" fo:text-transform="none" fo:color="#0a0a0a" loext:opacity="100%" style:font-name="Liberation Serif" fo:font-size="11pt" fo:letter-spacing="normal" fo:font-style="normal" fo:font-weight="normal" style:font-size-asian="11pt" style:font-size-complex="11pt"/>
    </style:style>
    <style:style style:name="T91" style:family="text">
      <style:text-properties fo:font-variant="normal" fo:text-transform="none" fo:color="#0a0a0a" loext:opacity="100%" style:font-name="Liberation Serif" fo:font-size="11pt" fo:letter-spacing="normal" fo:font-style="normal" fo:font-weight="normal" officeooo:rsid="00379202" style:font-size-asian="11pt" style:font-size-complex="11pt"/>
    </style:style>
    <style:style style:name="T92" style:family="text">
      <style:text-properties fo:font-variant="normal" fo:text-transform="none" fo:color="#0a0a0a" loext:opacity="100%" style:font-name="Liberation Serif" fo:font-size="11pt" fo:letter-spacing="normal" fo:font-style="normal" fo:font-weight="normal" officeooo:rsid="003c5f32" style:font-size-asian="11pt" style:font-size-complex="11pt"/>
    </style:style>
    <style:style style:name="T93" style:family="text">
      <style:text-properties fo:font-variant="normal" fo:text-transform="none" fo:color="#0a0a0a" loext:opacity="100%" style:font-name="Liberation Serif" fo:font-size="11pt" fo:letter-spacing="normal" fo:font-style="normal" fo:font-weight="normal" officeooo:rsid="003d82b4" style:font-size-asian="11pt" style:font-size-complex="11pt"/>
    </style:style>
    <style:style style:name="T94" style:family="text">
      <style:text-properties fo:font-variant="normal" fo:text-transform="none" fo:color="#0a0a0a" loext:opacity="100%" style:font-name="Liberation Serif" fo:font-size="11pt" fo:letter-spacing="normal" fo:font-style="normal" fo:font-weight="normal" officeooo:rsid="005a3260" style:font-size-asian="11pt" style:font-size-complex="11pt"/>
    </style:style>
    <style:style style:name="T95" style:family="text">
      <style:text-properties fo:font-variant="normal" fo:text-transform="none" fo:color="#0a0a0a" loext:opacity="100%" style:font-name="Liberation Serif" fo:font-size="11pt" fo:letter-spacing="normal" fo:font-style="normal" fo:font-weight="normal" officeooo:rsid="005dd200" style:font-size-asian="11pt" style:font-size-complex="11pt"/>
    </style:style>
    <style:style style:name="T96" style:family="text">
      <style:text-properties fo:font-variant="normal" fo:text-transform="none" fo:color="#0a0a0a" loext:opacity="100%" style:font-name="Liberation Serif" fo:font-size="11pt" fo:letter-spacing="normal" fo:font-style="normal" fo:font-weight="normal" officeooo:rsid="00655f29" style:font-size-asian="11pt" style:font-size-complex="11pt"/>
    </style:style>
    <style:style style:name="T97" style:family="text">
      <style:text-properties fo:font-variant="normal" fo:text-transform="none" fo:color="#0a0a0a" loext:opacity="100%" style:font-name="Liberation Serif" fo:font-size="11pt" fo:letter-spacing="normal" fo:font-style="normal" fo:font-weight="normal" officeooo:rsid="005e80d7" style:font-size-asian="11pt" style:font-size-complex="11pt"/>
    </style:style>
    <style:style style:name="T98" style:family="text">
      <style:text-properties fo:font-variant="normal" fo:text-transform="none" fo:color="#0a0a0a" loext:opacity="100%" style:font-name="Liberation Serif" fo:font-size="11pt" fo:letter-spacing="normal" fo:font-style="normal" fo:font-weight="normal" officeooo:rsid="003c5f32" style:font-size-asian="11pt" style:font-weight-asian="bold" style:font-size-complex="11pt" style:font-weight-complex="bold"/>
    </style:style>
    <style:style style:name="T99" style:family="text">
      <style:text-properties fo:font-variant="normal" fo:text-transform="none" fo:color="#0a0a0a" loext:opacity="100%" style:font-name="Liberation Serif" fo:font-size="11pt" fo:letter-spacing="normal" fo:font-style="normal" fo:font-weight="normal" officeooo:rsid="003d82b4" style:font-size-asian="11pt" style:font-weight-asian="bold" style:font-size-complex="11pt" style:font-weight-complex="bold"/>
    </style:style>
    <style:style style:name="T100" style:family="text">
      <style:text-properties fo:font-variant="normal" fo:text-transform="none" fo:color="#0a0a0a" loext:opacity="100%" style:font-name="Liberation Serif" fo:font-size="11pt" fo:letter-spacing="normal" fo:font-style="normal" fo:font-weight="normal" officeooo:rsid="003c5f32" style:font-size-asian="11pt" style:font-weight-asian="normal" style:font-size-complex="11pt" style:font-weight-complex="normal"/>
    </style:style>
    <style:style style:name="T101" style:family="text">
      <style:text-properties fo:font-variant="normal" fo:text-transform="none" fo:color="#0a0a0a" loext:opacity="100%" style:font-name="Liberation Serif" fo:font-size="11pt" fo:letter-spacing="normal" fo:font-style="normal" fo:font-weight="normal" officeooo:rsid="0048a673" style:font-size-asian="11pt" style:font-weight-asian="normal" style:font-size-complex="11pt" style:font-weight-complex="normal"/>
    </style:style>
    <style:style style:name="T102" style:family="text">
      <style:text-properties fo:font-variant="normal" fo:text-transform="none" fo:color="#0a0a0a" loext:opacity="100%" style:font-name="Liberation Serif" fo:font-size="11pt" fo:letter-spacing="normal" fo:font-style="normal" fo:font-weight="normal" officeooo:rsid="00583292" style:font-size-asian="11pt" style:font-weight-asian="normal" style:font-size-complex="11pt" style:font-weight-complex="normal"/>
    </style:style>
    <style:style style:name="T103" style:family="text">
      <style:text-properties fo:font-variant="normal" fo:text-transform="none" fo:color="#0a0a0a" loext:opacity="100%" style:font-name="Liberation Serif" fo:font-size="11pt" fo:letter-spacing="normal" fo:font-style="normal" fo:font-weight="normal" officeooo:rsid="0073fce6" style:font-size-asian="11pt" style:font-weight-asian="normal" style:font-size-complex="11pt" style:font-weight-complex="normal"/>
    </style:style>
    <style:style style:name="T104" style:family="text">
      <style:text-properties fo:font-variant="normal" fo:text-transform="none" fo:color="#0a0a0a" loext:opacity="100%" style:font-name="Liberation Serif" fo:font-size="11pt" fo:letter-spacing="normal" fo:font-style="normal" fo:font-weight="normal" officeooo:rsid="001ce228" style:font-size-asian="11pt" style:font-weight-asian="normal" style:font-size-complex="11pt" style:font-weight-complex="normal"/>
    </style:style>
    <style:style style:name="T105" style:family="text">
      <style:text-properties fo:font-variant="normal" fo:text-transform="none" fo:color="#0a0a0a" loext:opacity="100%" style:font-name="Liberation Serif" fo:font-size="11pt" fo:letter-spacing="normal" fo:font-style="normal" fo:font-weight="bold" style:font-size-asian="11pt" style:font-size-complex="11pt"/>
    </style:style>
    <style:style style:name="T106" style:family="text">
      <style:text-properties fo:font-variant="normal" fo:text-transform="none" fo:color="#0a0a0a" loext:opacity="100%" style:font-name="Liberation Serif" fo:font-size="11pt" fo:letter-spacing="normal" fo:font-style="normal" fo:font-weight="bold" officeooo:rsid="00583292" style:font-size-asian="11pt" style:font-size-complex="11pt"/>
    </style:style>
    <style:style style:name="T107" style:family="text">
      <style:text-properties fo:font-variant="normal" fo:text-transform="none" fo:color="#0a0a0a" loext:opacity="100%" style:font-name="Liberation Serif" fo:font-size="11pt" fo:letter-spacing="normal" fo:font-style="normal" fo:font-weight="bold" style:font-size-asian="11pt" style:font-weight-asian="bold" style:font-size-complex="11pt" style:font-weight-complex="bold"/>
    </style:style>
    <style:style style:name="T108" style:family="text">
      <style:text-properties fo:font-variant="normal" fo:text-transform="none" fo:color="#0a0a0a" loext:opacity="100%" style:font-name="Liberation Serif" fo:font-size="11pt" fo:letter-spacing="normal" fo:font-style="normal" fo:font-weight="bold" officeooo:rsid="00583292" style:font-size-asian="11pt" style:font-weight-asian="bold" style:font-size-complex="11pt" style:font-weight-complex="bold"/>
    </style:style>
    <style:style style:name="T109" style:family="text">
      <style:text-properties fo:font-variant="normal" fo:text-transform="none" fo:color="#0a0a0a" loext:opacity="100%" style:font-name="Liberation Serif" fo:font-size="11pt" fo:letter-spacing="normal" fo:font-weight="normal" officeooo:rsid="001ce228" style:font-size-asian="11pt" style:font-weight-asian="normal" style:font-size-complex="11pt" style:font-weight-complex="normal"/>
    </style:style>
    <style:style style:name="T110" style:family="text">
      <style:text-properties fo:font-variant="normal" fo:text-transform="none" fo:color="#0a0a0a" loext:opacity="100%" style:font-name="Liberation Serif" fo:font-size="11pt" fo:letter-spacing="normal" fo:font-weight="normal" officeooo:rsid="0073fce6" style:font-size-asian="11pt" style:font-weight-asian="normal" style:font-size-complex="11pt" style:font-weight-complex="normal"/>
    </style:style>
    <style:style style:name="T111" style:family="text">
      <style:text-properties fo:font-variant="normal" fo:text-transform="none" fo:color="#0a0a0a" loext:opacity="100%" fo:font-size="11pt" fo:letter-spacing="normal" fo:font-style="normal" officeooo:rsid="0018d26d" style:font-size-asian="11pt" style:font-weight-asian="bold" style:font-size-complex="11pt" style:font-weight-complex="bold"/>
    </style:style>
    <style:style style:name="T112" style:family="text">
      <style:text-properties fo:font-variant="normal" fo:text-transform="none" fo:color="#0a0a0a" loext:opacity="100%" fo:font-size="11pt" fo:letter-spacing="normal" fo:font-style="normal" officeooo:rsid="005b845b" style:font-size-asian="11pt" style:font-weight-asian="bold" style:font-size-complex="11pt" style:font-weight-complex="bold"/>
    </style:style>
    <style:style style:name="T113" style:family="text">
      <style:text-properties fo:font-variant="normal" fo:text-transform="none" fo:color="#0a0a0a" loext:opacity="100%" fo:font-size="11pt" fo:letter-spacing="normal" fo:font-style="normal" officeooo:rsid="005c49d0" style:font-size-asian="11pt" style:font-weight-asian="bold" style:font-size-complex="11pt" style:font-weight-complex="bold"/>
    </style:style>
    <style:style style:name="T114" style:family="text">
      <style:text-properties fo:font-variant="normal" fo:text-transform="none" fo:color="#0a0a0a" loext:opacity="100%" fo:font-size="11pt" fo:letter-spacing="normal" fo:font-style="normal" officeooo:rsid="005a3260" style:font-size-asian="11pt" style:font-weight-asian="bold" style:font-size-complex="11pt" style:font-weight-complex="bold"/>
    </style:style>
    <style:style style:name="T115" style:family="text">
      <style:text-properties fo:font-variant="normal" fo:text-transform="none" fo:color="#0a0a0a" loext:opacity="100%" fo:font-size="11pt" fo:letter-spacing="normal" fo:font-style="normal" fo:font-weight="normal" style:font-size-asian="11pt" style:font-size-complex="11pt"/>
    </style:style>
    <style:style style:name="T116" style:family="text">
      <style:text-properties fo:font-variant="normal" fo:text-transform="none" fo:color="#0a0a0a" loext:opacity="100%" fo:font-size="11pt" fo:letter-spacing="normal" fo:font-style="normal" fo:font-weight="normal" officeooo:rsid="004dda13" style:font-size-asian="11pt" style:font-size-complex="11pt"/>
    </style:style>
    <style:style style:name="T117" style:family="text">
      <style:text-properties fo:font-variant="normal" fo:text-transform="none" fo:color="#0a0a0a" loext:opacity="100%" fo:font-size="11pt" fo:letter-spacing="normal" fo:font-style="normal" fo:font-weight="normal" officeooo:rsid="0018d26d" style:font-size-asian="11pt" style:font-weight-asian="bold" style:font-size-complex="11pt" style:font-weight-complex="bold"/>
    </style:style>
    <style:style style:name="T118" style:family="text">
      <style:text-properties fo:font-variant="normal" fo:text-transform="none" fo:color="#0a0a0a" loext:opacity="100%" fo:font-size="11pt" fo:letter-spacing="normal" fo:font-style="normal" fo:font-weight="bold" officeooo:rsid="0018d26d" style:font-size-asian="11pt" style:font-size-complex="11pt"/>
    </style:style>
    <style:style style:name="T119" style:family="text">
      <style:text-properties fo:font-variant="normal" fo:text-transform="none" fo:color="#0a0a0a" loext:opacity="100%" fo:font-size="12pt" fo:letter-spacing="normal" fo:font-style="normal" fo:font-weight="normal"/>
    </style:style>
    <style:style style:name="T120" style:family="text">
      <style:text-properties fo:font-variant="normal" fo:text-transform="none" fo:color="#0a0a0a" loext:opacity="100%" fo:letter-spacing="normal"/>
    </style:style>
    <style:style style:name="T121" style:family="text">
      <style:text-properties fo:font-variant="normal" fo:text-transform="none" fo:color="#0a0a0a" loext:opacity="100%" fo:letter-spacing="normal" fo:font-style="normal" fo:font-weight="normal"/>
    </style:style>
    <style:style style:name="T122" style:family="text">
      <style:text-properties fo:font-variant="normal" fo:text-transform="none" fo:color="#0a0a0a" loext:opacity="100%" fo:letter-spacing="normal" fo:font-style="normal" fo:font-weight="normal" officeooo:rsid="0073fce6" style:font-weight-asian="bold" style:font-weight-complex="bold"/>
    </style:style>
    <style:style style:name="T123" style:family="text">
      <style:text-properties fo:font-variant="normal" fo:text-transform="none" fo:color="#0a0a0a" loext:opacity="100%" style:text-outline="false" style:font-name="Liberation Serif" fo:font-size="11pt" fo:letter-spacing="normal" fo:font-style="normal" style:text-underline-style="none" fo:font-weight="normal" style:font-size-asian="11pt" style:font-weight-asian="normal" style:font-size-complex="11pt"/>
    </style:style>
    <style:style style:name="T124" style:family="text">
      <style:text-properties fo:font-variant="normal" fo:text-transform="none" fo:color="#0a0a0a" loext:opacity="100%" style:text-outline="false" style:font-name="Liberation Serif" fo:font-size="11pt" fo:letter-spacing="normal" fo:font-style="normal" style:text-underline-style="none" fo:font-weight="normal" officeooo:rsid="00609905" style:font-size-asian="11pt" style:font-weight-asian="normal" style:font-size-complex="11pt"/>
    </style:style>
    <style:style style:name="T125" style:family="text">
      <style:text-properties fo:font-variant="normal" fo:text-transform="none" fo:color="#0a0a0a" loext:opacity="100%" style:text-outline="false" style:font-name="Liberation Serif" fo:font-size="11pt" fo:letter-spacing="normal" fo:font-style="normal" style:text-underline-style="none" fo:font-weight="normal" officeooo:rsid="00620c54" style:font-size-asian="11pt" style:font-weight-asian="normal" style:font-size-complex="11pt"/>
    </style:style>
    <style:style style:name="T126" style:family="text">
      <style:text-properties fo:font-variant="normal" fo:text-transform="none" fo:color="#0a0a0a" loext:opacity="100%" style:text-outline="false" style:font-name="Liberation Serif" fo:font-size="11pt" fo:letter-spacing="normal" fo:font-style="normal" style:text-underline-style="none" fo:font-weight="normal" officeooo:rsid="0065a5e2" style:font-size-asian="11pt" style:font-weight-asian="normal" style:font-size-complex="11pt"/>
    </style:style>
    <style:style style:name="T127" style:family="text">
      <style:text-properties fo:font-variant="normal" fo:text-transform="none" fo:color="#383838" loext:opacity="100%" style:font-name="Liberation Serif" fo:font-size="11pt" fo:letter-spacing="normal" fo:font-style="normal" fo:font-weight="normal" officeooo:rsid="003d82b4" style:font-size-asian="11pt" style:font-size-complex="11pt"/>
    </style:style>
    <style:style style:name="T128" style:family="text">
      <style:text-properties fo:font-variant="normal" fo:text-transform="none" fo:color="#1f1f1f" loext:opacity="100%" fo:letter-spacing="normal" fo:font-style="normal" fo:font-weight="normal"/>
    </style:style>
    <style:style style:name="T129" style:family="text">
      <style:text-properties fo:font-variant="normal" fo:text-transform="none" fo:color="#1f1f1f" loext:opacity="100%" fo:letter-spacing="normal" fo:font-style="normal" fo:font-weight="normal" loext:padding="0in" loext:border="none"/>
    </style:style>
    <style:style style:name="T130" style:family="text">
      <style:text-properties fo:font-variant="normal" fo:text-transform="none" fo:color="#1f1f1f" loext:opacity="100%" fo:letter-spacing="normal" fo:font-style="normal" fo:font-weight="normal" officeooo:rsid="0053a92e"/>
    </style:style>
    <style:style style:name="T131" style:family="text">
      <style:text-properties fo:font-variant="normal" fo:text-transform="none" fo:color="#1f1f1f" loext:opacity="100%" fo:letter-spacing="normal" fo:font-style="normal" fo:font-weight="normal" officeooo:rsid="0053bd23"/>
    </style:style>
    <style:style style:name="T132" style:family="text">
      <style:text-properties fo:font-variant="normal" fo:text-transform="none" fo:color="#1f1f1f" loext:opacity="100%" style:font-name="Liberation Serif" fo:font-size="11pt" fo:letter-spacing="normal" fo:font-style="normal" fo:font-weight="normal" style:font-size-asian="11pt" style:font-size-complex="11pt"/>
    </style:style>
    <style:style style:name="T133" style:family="text">
      <style:text-properties fo:font-variant="normal" fo:text-transform="none" fo:color="#202122" loext:opacity="100%" style:text-line-through-style="none" style:text-line-through-type="none" style:font-name="Liberation Serif" fo:font-size="11pt" fo:letter-spacing="normal" fo:font-style="normal" style:text-underline-style="none" fo:font-weight="normal" style:text-blinking="false" style:font-size-asian="11pt" style:font-size-complex="11pt" loext:padding="0in" loext:border="none"/>
    </style:style>
    <style:style style:name="T134" style:family="text">
      <style:text-properties fo:font-variant="normal" fo:text-transform="none" fo:color="#202122" loext:opacity="100%" style:font-name="Liberation Serif" fo:font-size="11pt" fo:letter-spacing="normal" fo:font-style="normal" fo:font-weight="normal" style:font-size-asian="11pt" style:font-size-complex="11pt"/>
    </style:style>
    <style:style style:name="T135" style:family="text">
      <style:text-properties fo:font-variant="normal" fo:text-transform="none" fo:color="#202122" loext:opacity="100%" style:font-name="Liberation Serif" fo:font-size="11pt" fo:letter-spacing="normal" fo:font-style="normal" fo:font-weight="normal" officeooo:rsid="00537a83" style:font-size-asian="11pt" style:font-size-complex="11pt"/>
    </style:style>
    <style:style style:name="T136" style:family="text">
      <style:text-properties fo:font-variant="normal" fo:text-transform="none" fo:color="#202122" loext:opacity="100%" style:font-name="Liberation Serif" fo:font-size="11pt" fo:letter-spacing="normal" fo:font-style="normal" fo:font-weight="normal" officeooo:rsid="0053a92e" style:font-size-asian="11pt" style:font-size-complex="11pt"/>
    </style:style>
    <style:style style:name="T137" style:family="text">
      <style:text-properties fo:font-variant="normal" fo:text-transform="none" style:use-window-font-color="true" loext:opacity="0%" fo:letter-spacing="normal" fo:font-style="normal" fo:font-weight="bold" officeooo:rsid="002fbfed" style:font-weight-asian="bold" style:font-weight-complex="bold"/>
    </style:style>
    <style:style style:name="T138" style:family="text">
      <style:text-properties fo:font-variant="normal" fo:text-transform="none" style:use-window-font-color="true" loext:opacity="0%" fo:letter-spacing="normal" fo:font-style="normal" fo:font-weight="bold" officeooo:rsid="008316ad" style:font-weight-asian="bold" style:font-weight-complex="bold"/>
    </style:style>
    <style:style style:name="T139" style:family="text">
      <style:text-properties fo:font-variant="normal" fo:text-transform="none" style:use-window-font-color="true" loext:opacity="0%" fo:letter-spacing="normal" fo:font-style="normal" fo:font-weight="normal" officeooo:rsid="008316ad" style:font-weight-asian="normal" style:font-weight-complex="bold"/>
    </style:style>
    <style:style style:name="T140" style:family="text">
      <style:text-properties fo:font-variant="normal" fo:text-transform="none" style:use-window-font-color="true" loext:opacity="0%" fo:letter-spacing="normal" fo:font-style="normal" fo:font-weight="normal" officeooo:rsid="00320ced"/>
    </style:style>
    <style:style style:name="T141" style:family="text">
      <style:text-properties fo:font-variant="normal" fo:text-transform="none" style:use-window-font-color="true" loext:opacity="0%" style:font-name="Liberation Serif" fo:font-size="11pt" fo:letter-spacing="normal" fo:font-style="normal" fo:font-weight="bold" officeooo:rsid="006d5853" style:font-size-asian="11pt" style:font-weight-asian="bold" style:font-size-complex="11pt"/>
    </style:style>
    <style:style style:name="T142" style:family="text">
      <style:text-properties fo:font-variant="normal" fo:text-transform="none" style:use-window-font-color="true" loext:opacity="0%" style:font-name="Liberation Serif" fo:font-size="11pt" fo:letter-spacing="normal" fo:font-style="normal" fo:font-weight="normal" officeooo:rsid="006d5853" style:font-size-asian="11pt" style:font-weight-asian="normal" style:font-size-complex="11pt"/>
    </style:style>
    <style:style style:name="T143" style:family="text">
      <style:text-properties style:font-name="Liberation Serif"/>
    </style:style>
    <style:style style:name="T144" style:family="text">
      <style:text-properties style:font-name="Liberation Serif" fo:font-size="11pt" fo:letter-spacing="normal" style:font-size-asian="11pt" style:font-size-complex="11pt"/>
    </style:style>
    <style:style style:name="T145" style:family="text">
      <style:text-properties style:font-name="Liberation Serif" fo:font-size="11pt" fo:font-weight="normal" style:font-size-asian="11pt" style:font-weight-asian="normal" style:font-size-complex="11pt" style:font-weight-complex="normal"/>
    </style:style>
    <style:style style:name="T146" style:family="text">
      <style:text-properties style:font-name="Liberation Serif" fo:font-size="11pt" fo:font-weight="normal" officeooo:rsid="00297128" style:font-size-asian="11pt" style:font-weight-asian="normal" style:font-size-complex="11pt" style:font-weight-complex="normal"/>
    </style:style>
    <style:style style:name="T147" style:family="text">
      <style:text-properties style:font-name="Liberation Serif" fo:font-size="11pt" fo:font-weight="normal" officeooo:rsid="003c5f32" style:font-size-asian="11pt" style:font-weight-asian="normal" style:font-size-complex="11pt" style:font-weight-complex="normal"/>
    </style:style>
    <style:style style:name="T148" style:family="text">
      <style:text-properties style:font-name="Liberation Serif" fo:font-size="11pt" fo:font-weight="normal" officeooo:rsid="001ce228" style:font-size-asian="11pt" style:font-weight-asian="normal" style:font-size-complex="11pt" style:font-weight-complex="normal"/>
    </style:style>
    <style:style style:name="T149" style:family="text">
      <style:text-properties style:font-name="Liberation Serif" fo:font-size="11pt" fo:font-weight="normal" officeooo:rsid="0073fce6" style:font-size-asian="11pt" style:font-weight-asian="normal" style:font-size-complex="11pt" style:font-weight-complex="normal"/>
    </style:style>
    <style:style style:name="T150" style:family="text">
      <style:text-properties style:font-name="Liberation Serif" fo:font-size="11pt" style:font-size-asian="11pt" style:font-size-complex="11pt"/>
    </style:style>
    <style:style style:name="T151" style:family="text">
      <style:text-properties style:font-name="Liberation Serif" fo:font-size="11pt" officeooo:rsid="0038c341" style:font-size-asian="11pt" style:font-size-complex="11pt"/>
    </style:style>
    <style:style style:name="T152" style:family="text">
      <style:text-properties style:font-name="Liberation Serif" fo:font-size="11pt" officeooo:rsid="0038f357" style:font-size-asian="11pt" style:font-size-complex="11pt"/>
    </style:style>
    <style:style style:name="T153" style:family="text">
      <style:text-properties style:font-name="Liberation Serif" fo:font-size="11pt" officeooo:rsid="0027fa9d" style:font-size-asian="11pt" style:font-size-complex="11pt"/>
    </style:style>
    <style:style style:name="T154" style:family="text">
      <style:text-properties style:font-name="Liberation Serif" fo:font-size="11pt" officeooo:rsid="00379202" style:font-size-asian="11pt" style:font-size-complex="11pt"/>
    </style:style>
    <style:style style:name="T155" style:family="text">
      <style:text-properties style:font-name="Liberation Serif" fo:font-size="11pt" officeooo:rsid="00537a83" style:font-size-asian="11pt" style:font-size-complex="11pt"/>
    </style:style>
    <style:style style:name="T156" style:family="text">
      <style:text-properties style:font-name="Liberation Serif" fo:font-size="11pt" fo:font-style="italic" style:font-size-asian="11pt" style:font-style-asian="italic" style:font-name-complex="Liberation Serif" style:font-size-complex="11pt" style:font-style-complex="italic"/>
    </style:style>
    <style:style style:name="T157" style:family="text">
      <style:text-properties style:font-name="Liberation Serif" fo:font-size="11pt" fo:font-style="italic" officeooo:rsid="0065a5e2" style:font-size-asian="11pt" style:font-style-asian="italic" style:font-name-complex="Liberation Serif" style:font-size-complex="11pt" style:font-style-complex="italic"/>
    </style:style>
    <style:style style:name="T158" style:family="text">
      <style:text-properties style:font-name="Liberation Serif" fo:font-size="11pt" fo:font-style="italic" officeooo:rsid="0079f99f" style:font-size-asian="11pt" style:font-style-asian="italic" style:font-name-complex="Liberation Serif" style:font-size-complex="11pt" style:font-style-complex="italic"/>
    </style:style>
    <style:style style:name="T159" style:family="text">
      <style:text-properties style:font-name="Liberation Serif" fo:font-size="11pt" fo:font-style="italic" officeooo:rsid="00773aca" style:font-size-asian="11pt" style:font-style-asian="italic" style:font-name-complex="Liberation Serif" style:font-size-complex="11pt" style:font-style-complex="italic"/>
    </style:style>
    <style:style style:name="T160" style:family="text">
      <style:text-properties style:font-name="Liberation Serif" fo:font-size="11pt" fo:font-style="italic" officeooo:rsid="007cfb38" style:font-size-asian="11pt" style:font-style-asian="italic" style:font-name-complex="Liberation Serif" style:font-size-complex="11pt" style:font-style-complex="italic"/>
    </style:style>
    <style:style style:name="T161" style:family="text">
      <style:text-properties style:font-name="Liberation Serif" fo:font-size="11pt" fo:font-style="italic" fo:font-weight="bold" officeooo:rsid="00773aca" style:font-size-asian="11pt" style:font-style-asian="italic" style:font-weight-asian="bold" style:font-name-complex="Liberation Serif" style:font-size-complex="11pt" style:font-style-complex="italic" style:font-weight-complex="bold"/>
    </style:style>
    <style:style style:name="T162" style:family="text">
      <style:text-properties style:font-name="Liberation Serif" officeooo:rsid="0027fa9d"/>
    </style:style>
    <style:style style:name="T163" style:family="text">
      <style:text-properties style:font-name="Liberation Serif" fo:font-size="12pt" fo:font-weight="bold" style:font-size-asian="12pt" style:font-weight-asian="bold" style:font-size-complex="12pt" style:font-weight-complex="bold"/>
    </style:style>
    <style:style style:name="T164" style:family="text">
      <style:text-properties style:font-name="Liberation Serif" fo:font-size="12pt" fo:font-weight="bold" officeooo:rsid="0018d26d" style:font-size-asian="12pt" style:font-weight-asian="bold" style:font-size-complex="12pt" style:font-weight-complex="bold"/>
    </style:style>
    <style:style style:name="T165" style:family="text">
      <style:text-properties style:font-name="Liberation Serif" fo:font-style="italic" style:font-style-asian="italic" style:font-style-complex="italic"/>
    </style:style>
    <style:style style:name="T166" style:family="text">
      <style:text-properties style:font-name="Liberation Serif" fo:font-style="italic" officeooo:rsid="0079f99f" style:font-style-asian="italic" style:font-style-complex="italic"/>
    </style:style>
    <style:style style:name="T167" style:family="text">
      <style:text-properties style:font-name="Liberation Serif" fo:font-style="italic" officeooo:rsid="00773aca" style:font-style-asian="italic" style:font-style-complex="italic"/>
    </style:style>
    <style:style style:name="T168" style:family="text">
      <style:text-properties style:font-name="Liberation Serif" style:font-size-asian="11pt"/>
    </style:style>
    <style:style style:name="T169" style:family="text">
      <style:text-properties officeooo:rsid="001762e7"/>
    </style:style>
    <style:style style:name="T170" style:family="text">
      <style:text-properties fo:color="#000000" loext:opacity="100%"/>
    </style:style>
    <style:style style:name="T171" style:family="text">
      <style:text-properties fo:color="#000000" loext:opacity="100%" style:text-outline="false" fo:font-size="11pt" fo:font-style="normal" style:text-underline-style="none" fo:font-weight="normal" officeooo:rsid="0018d26d" style:font-size-asian="11pt" style:font-style-asian="normal" style:font-weight-asian="normal" style:font-size-complex="11pt" style:font-weight-complex="normal"/>
    </style:style>
    <style:style style:name="T172" style:family="text">
      <style:text-properties fo:color="#000000" loext:opacity="100%" style:text-outline="false" fo:font-size="11pt" fo:font-style="normal" style:text-underline-style="none" style:font-size-asian="11pt" style:font-style-asian="normal" style:font-size-complex="11pt"/>
    </style:style>
    <style:style style:name="T173" style:family="text">
      <style:text-properties fo:color="#000000" loext:opacity="100%" style:text-outline="false" fo:font-size="11pt" fo:font-style="normal" style:text-underline-style="none" officeooo:rsid="00192843" style:font-size-asian="11pt" style:font-style-asian="normal" style:font-size-complex="11pt"/>
    </style:style>
    <style:style style:name="T174" style:family="text">
      <style:text-properties fo:color="#000000" loext:opacity="100%" style:text-outline="false" fo:font-size="11pt" fo:font-style="normal" style:text-underline-style="none" officeooo:rsid="0018d26d" style:font-size-asian="11pt" style:font-style-asian="normal" style:font-size-complex="11pt"/>
    </style:style>
    <style:style style:name="T175" style:family="text">
      <style:text-properties fo:color="#000000" loext:opacity="100%" style:font-name="Menlo-Regular" fo:font-size="18pt" style:font-size-asian="18pt"/>
    </style:style>
    <style:style style:name="T176" style:family="text">
      <style:text-properties fo:color="#000000" loext:opacity="100%" fo:font-weight="bold" style:font-weight-asian="bold" style:font-weight-complex="bold"/>
    </style:style>
    <style:style style:name="T177" style:family="text">
      <style:text-properties fo:color="#000000" loext:opacity="100%" fo:font-weight="bold" officeooo:rsid="0088c215" style:font-weight-asian="bold" style:font-weight-complex="bold"/>
    </style:style>
    <style:style style:name="T178" style:family="text">
      <style:text-properties fo:color="#000000" loext:opacity="100%" fo:font-weight="bold" style:font-weight-asian="bold" style:font-size-complex="11pt" style:font-weight-complex="bold"/>
    </style:style>
    <style:style style:name="T179" style:family="text">
      <style:text-properties fo:color="#000000" loext:opacity="100%" style:font-size-complex="11pt"/>
    </style:style>
    <style:style style:name="T180" style:family="text">
      <style:text-properties fo:color="#000000" loext:opacity="100%" style:font-name="Liberation Serif" fo:font-size="11pt" style:font-size-asian="11pt" style:font-size-complex="11pt"/>
    </style:style>
    <style:style style:name="T181" style:family="text">
      <style:text-properties fo:color="#000000" loext:opacity="100%" style:font-name="Liberation Serif" fo:font-size="11pt" fo:font-style="italic" style:font-size-asian="11pt" style:font-style-asian="italic" style:font-size-complex="11pt" style:font-style-complex="italic"/>
    </style:style>
    <style:style style:name="T182" style:family="text">
      <style:text-properties fo:color="#000000" loext:opacity="100%" style:font-name="Liberation Serif" fo:font-size="11pt" fo:font-weight="bold" style:font-size-asian="11pt" style:font-weight-asian="bold" style:font-size-complex="11pt" style:font-weight-complex="bold"/>
    </style:style>
    <style:style style:name="T183" style:family="text">
      <style:text-properties fo:color="#000000" loext:opacity="100%" officeooo:rsid="001762e7"/>
    </style:style>
    <style:style style:name="T184" style:family="text">
      <style:text-properties fo:color="#000000" loext:opacity="100%" officeooo:rsid="00583292"/>
    </style:style>
    <style:style style:name="T185" style:family="text">
      <style:text-properties fo:color="#000000" loext:opacity="100%" officeooo:rsid="0088c215"/>
    </style:style>
    <style:style style:name="T186" style:family="text">
      <style:text-properties fo:color="#000000" loext:opacity="100%" officeooo:rsid="00893a55"/>
    </style:style>
    <style:style style:name="T187" style:family="text">
      <style:text-properties officeooo:rsid="001ce228"/>
    </style:style>
    <style:style style:name="T188" style:family="text">
      <style:text-properties fo:font-style="normal" fo:font-weight="normal"/>
    </style:style>
    <style:style style:name="T189" style:family="text">
      <style:text-properties officeooo:rsid="001ddb05"/>
    </style:style>
    <style:style style:name="T190" style:family="text">
      <style:text-properties officeooo:rsid="001fd7e2"/>
    </style:style>
    <style:style style:name="T191" style:family="text">
      <style:text-properties officeooo:rsid="00202a73"/>
    </style:style>
    <style:style style:name="T192" style:family="text">
      <style:text-properties officeooo:rsid="0021c6f7"/>
    </style:style>
    <style:style style:name="T193" style:family="text">
      <style:text-properties officeooo:rsid="0023643b"/>
    </style:style>
    <style:style style:name="T194" style:family="text">
      <style:text-properties fo:font-size="11pt" fo:font-weight="bold" officeooo:rsid="001ce228" style:font-size-asian="11pt" style:font-weight-asian="bold" style:font-size-complex="11pt" style:font-weight-complex="bold"/>
    </style:style>
    <style:style style:name="T195" style:family="text">
      <style:text-properties fo:font-size="11pt" style:font-size-asian="11pt" style:font-size-complex="11pt"/>
    </style:style>
    <style:style style:name="T196" style:family="text">
      <style:text-properties fo:font-size="11pt" officeooo:rsid="003f8272" style:font-size-asian="11pt" style:font-size-complex="11pt"/>
    </style:style>
    <style:style style:name="T197" style:family="text">
      <style:text-properties fo:font-size="11pt" officeooo:rsid="000fcead" style:font-size-asian="11pt" style:font-size-complex="11pt"/>
    </style:style>
    <style:style style:name="T198" style:family="text">
      <style:text-properties fo:font-size="11pt" officeooo:rsid="0011c311" style:font-size-asian="11pt" style:font-size-complex="11pt"/>
    </style:style>
    <style:style style:name="T199" style:family="text">
      <style:text-properties fo:font-size="11pt" officeooo:rsid="004dda13" style:font-size-asian="11pt" style:font-size-complex="11pt"/>
    </style:style>
    <style:style style:name="T200" style:family="text">
      <style:text-properties officeooo:rsid="002b4a64"/>
    </style:style>
    <style:style style:name="T201" style:family="text">
      <style:text-properties officeooo:rsid="00362050"/>
    </style:style>
    <style:style style:name="T202" style:family="text">
      <style:text-properties officeooo:rsid="00398f1a"/>
    </style:style>
    <style:style style:name="T203" style:family="text">
      <style:text-properties officeooo:rsid="003f8272"/>
    </style:style>
    <style:style style:name="T204" style:family="text">
      <style:text-properties officeooo:rsid="004159f6"/>
    </style:style>
    <style:style style:name="T205" style:family="text">
      <style:text-properties officeooo:rsid="004dda13"/>
    </style:style>
    <style:style style:name="T206" style:family="text">
      <style:text-properties officeooo:rsid="004e554f"/>
    </style:style>
    <style:style style:name="T207" style:family="text">
      <style:text-properties officeooo:rsid="0051b5cb"/>
    </style:style>
    <style:style style:name="T208" style:family="text">
      <style:text-properties officeooo:rsid="00537a83"/>
    </style:style>
    <style:style style:name="T209" style:family="text">
      <style:text-properties officeooo:rsid="0053a92e"/>
    </style:style>
    <style:style style:name="T210" style:family="text">
      <style:text-properties style:font-size-asian="11pt" style:font-size-complex="11pt"/>
    </style:style>
    <style:style style:name="T211" style:family="text">
      <style:text-properties officeooo:rsid="0053a92e" style:font-size-asian="11pt" style:font-size-complex="11pt"/>
    </style:style>
    <style:style style:name="T212" style:family="text">
      <style:text-properties officeooo:rsid="0053bd23"/>
    </style:style>
    <style:style style:name="T213" style:family="text">
      <style:text-properties officeooo:rsid="00583292"/>
    </style:style>
    <style:style style:name="T214" style:family="text">
      <style:text-properties officeooo:rsid="005c49d0"/>
    </style:style>
    <style:style style:name="T215" style:family="text">
      <style:text-properties officeooo:rsid="005db5a3"/>
    </style:style>
    <style:style style:name="T216" style:family="text">
      <style:text-properties officeooo:rsid="00655f29"/>
    </style:style>
    <style:style style:name="T217" style:family="text">
      <style:text-properties fo:font-style="italic" style:font-style-asian="italic" style:font-style-complex="italic"/>
    </style:style>
    <style:style style:name="T218" style:family="text">
      <style:text-properties officeooo:rsid="006d5853"/>
    </style:style>
    <style:style style:name="T219" style:family="text">
      <style:text-properties fo:font-size="12pt" fo:font-weight="bold" style:font-size-asian="12pt" style:font-weight-asian="bold" style:font-size-complex="12pt" style:font-weight-complex="bold"/>
    </style:style>
    <style:style style:name="T220" style:family="text">
      <style:text-properties fo:font-size="12pt" fo:font-weight="bold" officeooo:rsid="0018d26d" style:font-size-asian="12pt" style:font-weight-asian="bold" style:font-size-complex="12pt" style:font-weight-complex="bold"/>
    </style:style>
    <style:style style:name="T221" style:family="text">
      <style:text-properties fo:font-size="12pt" fo:font-weight="bold" officeooo:rsid="001ce228" style:font-size-asian="12pt" style:font-weight-asian="bold" style:font-size-complex="12pt" style:font-weight-complex="bold"/>
    </style:style>
    <style:style style:name="T222" style:family="text">
      <style:text-properties fo:font-size="12pt" fo:font-weight="bold" officeooo:rsid="00583292" style:font-size-asian="12pt" style:font-weight-asian="bold" style:font-size-complex="12pt" style:font-weight-complex="bold"/>
    </style:style>
    <style:style style:name="T223" style:family="text">
      <style:text-properties fo:font-size="12pt" fo:font-weight="bold" officeooo:rsid="005c49d0" style:font-size-asian="12pt" style:font-weight-asian="bold" style:font-size-complex="12pt" style:font-weight-complex="bold"/>
    </style:style>
    <style:style style:name="T224" style:family="text">
      <style:text-properties fo:font-size="12pt" fo:font-weight="bold" officeooo:rsid="005db5a3" style:font-size-asian="12pt" style:font-weight-asian="bold" style:font-size-complex="12pt" style:font-weight-complex="bold"/>
    </style:style>
    <style:style style:name="T225" style:family="text">
      <style:text-properties officeooo:rsid="0077cfa7"/>
    </style:style>
    <style:style style:name="T226" style:family="text">
      <style:text-properties officeooo:rsid="007a69cf"/>
    </style:style>
    <style:style style:name="T227" style:family="text">
      <style:text-properties fo:color="#fc2190" loext:opacity="100%" style:text-outline="false" fo:font-size="11pt" fo:font-style="italic" style:text-underline-style="none" officeooo:rsid="007cfb38" style:font-size-asian="11pt" style:font-style-asian="italic" style:font-name-complex="Liberation Serif" style:font-size-complex="11pt" style:font-style-complex="italic"/>
    </style:style>
    <style:style style:name="T228" style:family="text">
      <style:text-properties fo:color="#fc2190" loext:opacity="100%" style:text-outline="false" style:font-name="Liberation Serif" fo:font-size="11pt" fo:font-style="italic" style:text-underline-style="none" officeooo:rsid="007cfb38" style:font-size-asian="11pt" style:font-style-asian="italic" style:font-name-complex="Liberation Serif" style:font-size-complex="11pt" style:font-style-complex="italic"/>
    </style:style>
    <style:style style:name="T229" style:family="text">
      <style:text-properties style:font-name="Carlito" fo:font-size="12pt" fo:font-weight="bold" officeooo:rsid="001ce228" style:font-size-asian="12pt" style:font-weight-asian="bold" style:font-size-complex="12pt" style:font-weight-complex="bold"/>
    </style:style>
    <style:style style:name="T230" style:family="text">
      <style:text-properties style:font-name="Carlito" fo:font-size="12pt" fo:font-weight="bold" officeooo:rsid="002fbfed" style:font-size-asian="12pt" style:font-weight-asian="bold" style:font-size-complex="12pt" style:font-weight-complex="bold"/>
    </style:style>
    <style:style style:name="T231" style:family="text">
      <style:text-properties style:font-name="Carlito" fo:font-size="12pt" fo:font-weight="bold" officeooo:rsid="003f7623" style:font-size-asian="12pt" style:font-weight-asian="bold" style:font-size-complex="12pt" style:font-weight-complex="bold"/>
    </style:style>
    <style:style style:name="T232" style:family="text">
      <style:text-properties officeooo:rsid="002fbfed"/>
    </style:style>
    <style:style style:name="T233" style:family="text">
      <style:text-properties style:use-window-font-color="true" loext:opacity="0%" style:font-name="AppleSystemUIFont" fo:font-size="13pt" fo:font-weight="normal" style:font-size-asian="13pt" style:font-weight-asian="normal"/>
    </style:style>
    <style:style style:name="T234" style:family="text">
      <style:text-properties style:use-window-font-color="true" loext:opacity="0%" style:font-name="AppleSystemUIFont" fo:font-size="13pt" fo:font-style="normal" fo:font-weight="normal" style:font-size-asian="13pt" style:font-style-asian="normal" style:font-weight-asian="normal"/>
    </style:style>
    <style:style style:name="T235" style:family="text">
      <style:text-properties style:use-window-font-color="true" loext:opacity="0%" fo:font-weight="normal" style:font-weight-asian="normal"/>
    </style:style>
    <style:style style:name="T236" style:family="text">
      <style:text-properties style:use-window-font-color="true" loext:opacity="0%" fo:font-weight="bold" style:font-weight-asian="bold"/>
    </style:style>
    <style:style style:name="T237" style:family="text">
      <style:text-properties style:use-window-font-color="true" loext:opacity="0%" style:font-name="Liberation Serif" fo:font-size="11pt" fo:font-style="normal" fo:font-weight="bold" style:font-size-asian="11pt" style:font-style-asian="normal" style:font-weight-asian="bold" style:font-size-complex="11pt"/>
    </style:style>
    <style:style style:name="T238" style:family="text">
      <style:text-properties style:use-window-font-color="true" loext:opacity="0%" style:font-name="Liberation Serif" fo:font-size="11pt" fo:font-style="normal" fo:font-weight="normal" style:font-size-asian="11pt" style:font-style-asian="normal" style:font-weight-asian="normal" style:font-size-complex="11pt"/>
    </style:style>
    <style:style style:name="T239" style:family="text">
      <style:text-properties style:use-window-font-color="true" loext:opacity="0%" fo:font-style="italic" fo:font-weight="normal" style:font-style-asian="italic" style:font-weight-asian="normal"/>
    </style:style>
    <style:style style:name="T240" style:family="text">
      <style:text-properties style:use-window-font-color="true" loext:opacity="0%" fo:font-style="normal" fo:font-weight="normal" style:font-style-asian="normal" style:font-weight-asian="normal"/>
    </style:style>
    <style:style style:name="T241" style:family="text">
      <style:text-properties style:use-window-font-color="true" loext:opacity="0%" fo:font-style="normal" fo:font-weight="bold" style:font-style-asian="normal" style:font-weight-asian="bold"/>
    </style:style>
    <style:style style:name="T242" style:family="text">
      <style:text-properties officeooo:rsid="00838d7c"/>
    </style:style>
    <style:style style:name="T243" style:family="text">
      <style:text-properties officeooo:rsid="0088c21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20" text:anchor-type="page" text:anchor-page-number="1" svg:x="0in" svg:y="0in" svg:width="0.0626in" svg:height="0.25in" draw:z-index="19">
        <draw:image xlink:href="Pictures/1000000100000001000000010F602221.gif" xlink:type="simple" xlink:show="embed" xlink:actuate="onLoad" draw:mime-type="image/gif"/>
      </draw:frame>
      <draw:frame draw:style-name="fr4" draw:name="Image19" text:anchor-type="page" text:anchor-page-number="1" svg:x="0in" svg:y="0in" svg:width="0.4374in" svg:height="0.25in" draw:z-index="18">
        <draw:image xlink:href="Pictures/1000000100000001000000010F602221.gif" xlink:type="simple" xlink:show="embed" xlink:actuate="onLoad" draw:mime-type="image/gif"/>
      </draw:frame>
      <draw:frame draw:style-name="fr4" draw:name="Image18" text:anchor-type="page" text:anchor-page-number="1" svg:x="0in" svg:y="0in" svg:width="0.0626in" svg:height="0.25in" draw:z-index="17">
        <draw:image xlink:href="Pictures/1000000100000001000000010F602221.gif" xlink:type="simple" xlink:show="embed" xlink:actuate="onLoad" draw:mime-type="image/gif"/>
      </draw:frame>
      <draw:frame draw:style-name="fr4" draw:name="Image17" text:anchor-type="page" text:anchor-page-number="1" svg:x="0in" svg:y="0in" svg:width="0.1354in" svg:height="0.25in" draw:z-index="16">
        <draw:image xlink:href="Pictures/1000000100000001000000010F602221.gif" xlink:type="simple" xlink:show="embed" xlink:actuate="onLoad" draw:mime-type="image/gif"/>
      </draw:frame>
      <draw:frame draw:style-name="fr4" draw:name="Image16" text:anchor-type="page" text:anchor-page-number="1" svg:x="0in" svg:y="0in" svg:width="0.1874in" svg:height="0.25in" draw:z-index="15">
        <draw:image xlink:href="Pictures/1000000100000001000000010F602221.gif" xlink:type="simple" xlink:show="embed" xlink:actuate="onLoad" draw:mime-type="image/gif"/>
      </draw:frame>
      <draw:frame draw:style-name="fr4" draw:name="Image15" text:anchor-type="page" text:anchor-page-number="1" svg:x="0in" svg:y="0in" svg:width="0.1563in" svg:height="0.25in" draw:z-index="14">
        <draw:image xlink:href="Pictures/1000000100000001000000010F602221.gif" xlink:type="simple" xlink:show="embed" xlink:actuate="onLoad" draw:mime-type="image/gif"/>
      </draw:frame>
      <draw:frame draw:style-name="fr4" draw:name="Image14" text:anchor-type="page" text:anchor-page-number="1" svg:x="0in" svg:y="0in" svg:width="0.1874in" svg:height="0.25in" draw:z-index="13">
        <draw:image xlink:href="Pictures/1000000100000001000000010F602221.gif" xlink:type="simple" xlink:show="embed" xlink:actuate="onLoad" draw:mime-type="image/gif"/>
      </draw:frame>
      <draw:frame draw:style-name="fr4" draw:name="Image13" text:anchor-type="page" text:anchor-page-number="1" svg:x="0in" svg:y="0in" svg:width="0.6252in" svg:height="0.25in" draw:z-index="12">
        <draw:image xlink:href="Pictures/1000000100000001000000010F602221.gif" xlink:type="simple" xlink:show="embed" xlink:actuate="onLoad" draw:mime-type="image/gif"/>
      </draw:frame>
      <draw:frame draw:style-name="fr4" draw:name="Image12" text:anchor-type="page" text:anchor-page-number="1" svg:x="0in" svg:y="0in" svg:width="0.1874in" svg:height="0.25in" draw:z-index="11">
        <draw:image xlink:href="Pictures/1000000100000001000000010F602221.gif" xlink:type="simple" xlink:show="embed" xlink:actuate="onLoad" draw:mime-type="image/gif"/>
      </draw:frame>
      <draw:frame draw:style-name="fr4" draw:name="Image11" text:anchor-type="page" text:anchor-page-number="1" svg:x="0in" svg:y="0in" svg:width="0.1874in" svg:height="0.25in" draw:z-index="10">
        <draw:image xlink:href="Pictures/1000000100000001000000010F602221.gif" xlink:type="simple" xlink:show="embed" xlink:actuate="onLoad" draw:mime-type="image/gif"/>
      </draw:frame>
      <draw:frame draw:style-name="fr4" draw:name="Image10" text:anchor-type="page" text:anchor-page-number="1" svg:x="0in" svg:y="0in" svg:width="0.6252in" svg:height="0.25in" draw:z-index="9">
        <draw:image xlink:href="Pictures/1000000100000001000000010F602221.gif" xlink:type="simple" xlink:show="embed" xlink:actuate="onLoad" draw:mime-type="image/gif"/>
      </draw:frame>
      <draw:frame draw:style-name="fr4" draw:name="Image9" text:anchor-type="page" text:anchor-page-number="1" svg:x="0in" svg:y="0in" svg:width="0.1874in" svg:height="0.25in" draw:z-index="8">
        <draw:image xlink:href="Pictures/1000000100000001000000010F602221.gif" xlink:type="simple" xlink:show="embed" xlink:actuate="onLoad" draw:mime-type="image/gif"/>
      </draw:frame>
      <text:p text:style-name="P9"><text:span text:style-name="T8">Point of Contact</text:span><text:span text:style-name="T4">:</text:span><draw:frame draw:style-name="fr3" draw:name="Image1" text:anchor-type="char" svg:x="6.2299in" svg:y="-1.1118in" svg:width="1.1217in" svg:height="1.0382in" draw:z-index="0"><draw:image xlink:href="Pictures/10000001000000A20000009694C0762F.png" xlink:type="simple" xlink:show="embed" xlink:actuate="onLoad" draw:mime-type="image/png"/></draw:frame></text:p>
      <text:p text:style-name="P10"><text:span text:style-name="T5"><text:tab/></text:span><text:span text:style-name="T8">Edward C. Zimmermann </text:span><text:span text:style-name="T10"><text:s text:c="3"/><text:tab/></text:span><text:span text:style-name="T8">E-mail</text:span><text:span text:style-name="T12">: </text:span><text:span text:style-name="T10">&lt;</text:span><text:a xlink:type="simple" xlink:href="mailto:ezimmermann@acm.org" text:style-name="Internet_20_link" text:visited-style-name="Visited_20_Internet_20_Link"><text:span text:style-name="T12">ezimmermann@acm.org</text:span></text:a><text:span text:style-name="T12">&gt;</text:span><text:span text:style-name="T10"> <text:s text:c="2"/><text:tab/></text:span></text:p>
      <text:p text:style-name="P10"><text:span text:style-name="T4"/></text:p>
      <text:p text:style-name="P10"><text:span text:style-name="T4">Abstract / Summary</text:span> </text:p>
      <text:p text:style-name="P76"><text:span text:style-name="T157">CoreQuarry</text:span><text:span text:style-name="T156"> </text:span><text:span text:style-name="T158">is a </text:span><text:span text:style-name="T156">hybrid knowledge retrieval engine </text:span><text:span text:style-name="T159">which emerged in 2026 from Project Schmate </text:span><text:span text:style-name="T160">(</text:span><text:span text:style-name="T228">שמאטע</text:span><text:span text:style-name="T160">) </text:span><text:span text:style-name="T159">for</text:span><text:span text:style-name="T161"> re-Isearch</text:span><text:span text:style-name="T159">.</text:span><text:span text:style-name="T167"> </text:span><text:span text:style-name="T166">It</text:span><text:span text:style-name="T165"> unifies lexical, structural, and semantic search into a single, high-performance platform. Unlike existing vector databases or traditional search engines, </text:span><text:span text:style-name="T166">it</text:span><text:span text:style-name="T165"> supports true positional indexing, structure-aware queries, and typed object retrieval, enabling precise and contextually-aware search over heterogeneous document corpora. By leveraging memory-mapped, append-only indexes and a two-tier address-based caching system, </text:span><text:span text:style-name="T166">the</text:span><text:span text:style-name="T165"> engine achieves extremely low memory footprints while scaling to handle complex, hybrid RAG queries on consumer hardware, including laptops and edge devices. </text:span></text:p>
      <text:p text:style-name="P48"><text:span text:style-name="T227"/></text:p>
      <text:p text:style-name="P36"><text:span text:style-name="T217"/></text:p>
      <text:p text:style-name="P17"><text:span text:style-name="T226">CoreQuarry </text:span>Innovation:</text:p>
      <text:list text:style-name="L1">
        <text:list-item>
          <text:p text:style-name="P92">Rich Operator Support: Full set of binary and unary operators (AND, OR, XOR, NEAR, BEFORE/AFTER, PEER, distance-based, field-specific operations) allow precise relational queries beyond traditional BM25-based ranking. </text:p>
        </text:list-item>
        <text:list-item>
          <text:p text:style-name="P92">Hybrid &amp; Extensible Indexing: Lexical, structural, numeric, geospatial, phonetic, and vector types are first-class citizens; plug-ins allow user-defined types and new algorithms without redesigning the core. </text:p>
        </text:list-item>
        <text:list-item>
          <text:p text:style-name="P92">Efficient Incremental Indexing: Append-only design with versioned updates, delete flags, and background garbage collection supports concurrent search and continuous ingestion, making it suitable for live AI pipelines. <text:s/></text:p>
        </text:list-item>
      </text:list>
      <text:p text:style-name="P15"/>
      <text:p text:style-name="P15"><text:span text:style-name="T225">General </text:span>Impact:</text:p>
      <text:p text:style-name="P36">This engine enables privacy-preserving, local-first AI retrieval, supporting applications in legal research, medical knowledge, industrial edge AI, and large-scale document analytics. Its small footprint and high flexibility make it uniquely suited for embedded devices, laptops, and offline environments, dramatically lowering the barrier for organizations to implement robust AI-powered search without relying on cloud services.</text:p>
      <text:p text:style-name="Standard"/>
      <text:p text:style-name="P18">Key <text:span text:style-name="T13">Product</text:span> Differentiators</text:p>
      <text:list text:style-name="L2">
        <text:list-item>
          <text:p text:style-name="P93">Unified Hybrid Retrieval: Combines lexical, structural, and semantic (vector) search in a single engine. </text:p>
        </text:list-item>
        <text:list-item>
          <text:p text:style-name="P93">Rich Query Operators: Supports advanced positional, proximity, field-specific, and relational operators beyond traditional BM25. </text:p>
        </text:list-item>
        <text:list-item>
          <text:p text:style-name="P93">Typed Object Indexes: Indexes dates, numbers, hashes, geospatial, phonetic, and vectors as first-class data types. </text:p>
        </text:list-item>
        <text:list-item>
          <text:p text:style-name="P93">Append-Only, Memory-Mapped Architecture: Enables concurrent search and continuous ingestion with minimal RAM usage (lexical-only: min ~8MB). </text:p>
        </text:list-item>
        <text:list-item>
          <text:p text:style-name="P93">Extensible &amp; Pluggable: Supports new document types, custom fields, and alternative retrieval algorithms (HNSW, NSG, etc.). </text:p>
        </text:list-item>
        <text:list-item>
          <text:p text:style-name="P93">Local-First Deployment: Runs efficiently on laptops and edge devices, enabling privacy-preserving AI search without cloud dependencies. </text:p>
        </text:list-item>
        <text:list-item>
          <text:p text:style-name="P93">High Throughput: Demonstrated thousands of QPS on consumer hardware for complex hybrid queries. </text:p>
        </text:list-item>
        <text:list-item>
          <text:p text:style-name="P94">Extremely efficient and fast HNSW implementation with support for quantization and pass-through.</text:p>
        </text:list-item>
      </text:list>
      <text:p text:style-name="P36"/>
      <text:p text:style-name="P11">The system solves three major problems that current RAG and search solutions don’t:</text:p>
      <text:list text:style-name="L3">
        <text:list-item>
          <text:p text:style-name="P95">Hybrid Retrieval at Scale </text:p>
          <text:list>
            <text:list-item>
              <text:p text:style-name="P95">Lexical + structural + semantic in a single index </text:p>
            </text:list-item>
            <text:list-item>
              <text:p text:style-name="P95"><text:soft-page-break/>True boolean/proximity operators and field-scoped searches </text:p>
            </text:list-item>
            <text:list-item>
              <text:p text:style-name="P95">Optional vector embeddings for AI-enhanced relevance </text:p>
            </text:list-item>
          </text:list>
        </text:list-item>
        <text:list-item>
          <text:p text:style-name="P95">Local-first &amp; Lightweight </text:p>
          <text:list>
            <text:list-item>
              <text:p text:style-name="P95">Runs fully on consumer hardware (Mac M1, laptops, edge devices) </text:p>
            </text:list-item>
            <text:list-item>
              <text:p text:style-name="P95">Lexical-only mode: &lt;10MB RAM </text:p>
            </text:list-item>
            <text:list-item>
              <text:p text:style-name="P95">No dependency on heavy external services (no Elasticsearch, no FAISS clusters) </text:p>
            </text:list-item>
          </text:list>
        </text:list-item>
        <text:list-item>
          <text:p text:style-name="P95">Extensibility &amp; Heterogeneous Data </text:p>
          <text:list>
            <text:list-item>
              <text:p text:style-name="P95">Typed object indexes (dates, numbers, geospatial, phonetics, hashes, vectors) </text:p>
            </text:list-item>
            <text:list-item>
              <text:p text:style-name="P95">Plug-ins for custom document formats and schemas </text:p>
            </text:list-item>
            <text:list-item>
              <text:p text:style-name="P95">Supports structured traversal, wildcards, field/path scoping </text:p>
            </text:list-item>
          </text:list>
        </text:list-item>
      </text:list>
      <text:p text:style-name="P12"/>
      <text:p text:style-name="P12">Potential Markets / Applications</text:p>
      <text:list text:style-name="L4">
        <text:list-item>
          <text:p text:style-name="P96">Local AI Assistants </text:p>
          <text:list>
            <text:list-item>
              <text:p text:style-name="P96">Law firms, medical practitioners, researchers: local RAG over sensitive documents </text:p>
            </text:list-item>
          </text:list>
        </text:list-item>
        <text:list-item>
          <text:p text:style-name="P96">Edge AI Devices </text:p>
          <text:list>
            <text:list-item>
              <text:p text:style-name="P96">IoT devices, robotics, industrial sensors: offline retrieval of structured datasets </text:p>
            </text:list-item>
          </text:list>
        </text:list-item>
        <text:list-item>
          <text:p text:style-name="P96">Enterprise Knowledge Infrastructure </text:p>
          <text:list>
            <text:list-item>
              <text:p text:style-name="P96">Replace multi-system RAG stacks (vector DB + search engine + pipeline) </text:p>
            </text:list-item>
            <text:list-item>
              <text:p text:style-name="P96">Offers privacy, low-latency retrieval, and structured queries </text:p>
            </text:list-item>
          </text:list>
        </text:list-item>
        <text:list-item>
          <text:p text:style-name="P96">Archival &amp; Compliance </text:p>
          <text:list>
            <text:list-item>
              <text:p text:style-name="P96">Historical corpora, standards, legal/financial archives: structural search + temporal/versioning </text:p>
            </text:list-item>
          </text:list>
        </text:list-item>
        <text:list-item>
          <text:p text:style-name="P96">Developer Tooling </text:p>
          <text:list>
            <text:list-item>
              <text:p text:style-name="P97">Embed directly into applications like SQLite: “SQLite for AI retrieval” </text:p>
            </text:list-item>
          </text:list>
        </text:list-item>
      </text:list>
      <text:p text:style-name="P19"/>
      <text:p text:style-name="P19"/>
      <text:p text:style-name="P19">Support:</text:p>
      <text:p text:style-name="P21"><draw:frame draw:style-name="fr3" draw:name="Image4" text:anchor-type="char" svg:x="1.5374in" svg:y="0.1264in" svg:width="0.7102in" svg:height="0.7102in" draw:z-index="3"><draw:image xlink:href="Pictures/10000000000000FC000000FC83698EFC.png" xlink:type="simple" xlink:show="embed" xlink:actuate="onLoad" draw:mime-type="image/png"/></draw:frame><draw:frame draw:style-name="fr3" draw:name="Image5" text:anchor-type="char" svg:x="2.539in" svg:y="0.1472in" svg:width="1.3472in" svg:height="0.6957in" draw:z-index="4"><draw:image xlink:href="Pictures/100000000000011700000090D4C12D0E.png" xlink:type="simple" xlink:show="embed" xlink:actuate="onLoad" draw:mime-type="image/png"/></draw:frame><draw:frame draw:style-name="fr3" draw:name="Image3" text:anchor-type="char" svg:x="0.178in" svg:y="0.1043in" svg:width="1.0835in" svg:height="0.7228in" draw:z-index="2"><draw:image xlink:href="Pictures/10000000000001900000010BB8C8B6CF.png" xlink:type="simple" xlink:show="embed" xlink:actuate="onLoad" draw:mime-type="image/png"/></draw:frame><draw:frame draw:style-name="fr3" draw:name="Image6" text:anchor-type="char" svg:x="4.3043in" svg:y="0.1382in" svg:width="1.7854in" svg:height="0.7161in" draw:z-index="5"><draw:image xlink:href="Pictures/10000000000001620000008ED9F43F0E.png" xlink:type="simple" xlink:show="embed" xlink:actuate="onLoad" draw:mime-type="image/png"/></draw:frame></text:p>
      <text:p text:style-name="P21"/>
      <text:p text:style-name="P21"/>
      <text:p text:style-name="P21"/>
      <text:p text:style-name="P21"/>
      <text:p text:style-name="P23"><draw:frame draw:style-name="fr3" draw:name="Image2" text:anchor-type="char" svg:x="0.9626in" svg:y="0.0126in" svg:width="2.5126in" svg:height="0.698in" draw:z-index="1"><draw:image xlink:href="Pictures/1000000000000352000000EC9D07F8E3.png" xlink:type="simple" xlink:show="embed" xlink:actuate="onLoad" draw:mime-type="image/png"/></draw:frame><draw:frame draw:style-name="fr3" draw:name="Image7" text:anchor-type="char" svg:x="4.161in" svg:y="0.0283in" svg:width="1.5193in" svg:height="0.6335in" draw:z-index="6"><draw:image xlink:href="Pictures/10000000000001500000008CF7D39373.png" xlink:type="simple" xlink:show="embed" xlink:actuate="onLoad" draw:mime-type="image/png"/></draw:frame><draw:frame draw:style-name="fr3" draw:name="Image8" text:anchor-type="char" svg:x="5.8516in" svg:y="0.0799in" svg:width="0.7398in" svg:height="0.4925in" draw:z-index="7"><draw:image xlink:href="Pictures/1000000000000113000000B7C6751253.png" xlink:type="simple" xlink:show="embed" xlink:actuate="onLoad" draw:mime-type="image/png"/></draw:frame><text:span text:style-name="T15"/></text:p>
      <text:p text:style-name="P22"><text:span text:style-name="T21"/></text:p>
      <text:p text:style-name="P22"><text:span text:style-name="T21"/></text:p>
      <text:p text:style-name="P22"><text:span text:style-name="T21"/></text:p>
      <text:p text:style-name="P22"><text:span text:style-name="T21">T</text:span><text:span text:style-name="T22">hrough the </text:span><text:a xlink:type="simple" xlink:href="https://nlnet.nl/discovery" text:style-name="Internet_20_link" text:visited-style-name="Visited_20_Internet_20_Link"><text:span text:style-name="T23">NGI0 Discovery</text:span></text:a><text:span text:style-name="T22"> Fund, a fund established by </text:span><text:a xlink:type="simple" xlink:href="https://nlnet.nl/" text:style-name="Internet_20_link" text:visited-style-name="Visited_20_Internet_20_Link"><text:span text:style-name="T23">NLnet</text:span></text:a><text:span text:style-name="T22"> with financial support from the European Commission's </text:span><text:a xlink:type="simple" xlink:href="https://ngi.eu/" text:style-name="Internet_20_link" text:visited-style-name="Visited_20_Internet_20_Link"><text:span text:style-name="T23">Next Generation Internet</text:span></text:a><text:span text:style-name="T22"> programme, under the aegis of </text:span><text:a xlink:type="simple" xlink:href="https://commission.europa.eu/about-european-commission/departments-and-executive-agencies/communications-networks-content-and-technology_en" text:style-name="Internet_20_link" text:visited-style-name="Visited_20_Internet_20_Link"><text:span text:style-name="T23">DG Communications Networks, Content and Technology</text:span></text:a><text:span text:style-name="T22"> under grant agreement No </text:span><text:a xlink:type="simple" xlink:href="https://cordis.europa.eu/project/id/825322" text:style-name="Internet_20_link" text:visited-style-name="Visited_20_Internet_20_Link"><text:span text:style-name="T23">825322</text:span></text:a><text:span text:style-name="T22">.</text:span></text:p>
      <text:p text:style-name="P31"><text:span text:style-name="T20"/></text:p>
      <text:p text:style-name="P22"><text:span text:style-name="T22">Through the </text:span><text:a xlink:type="simple" xlink:href="https://nlnet.nl/commonsfund" text:style-name="Internet_20_link" text:visited-style-name="Visited_20_Internet_20_Link"><text:span text:style-name="T23">NGI0 Commons Fund</text:span></text:a><text:span text:style-name="T22">, a fund established by </text:span><text:a xlink:type="simple" xlink:href="https://nlnet.nl/" text:style-name="Internet_20_link" text:visited-style-name="Visited_20_Internet_20_Link"><text:span text:style-name="T168">NLnet</text:span></text:a><text:span text:style-name="T23"> </text:span><text:span text:style-name="T22">with financial support from the European Commission's </text:span><text:a xlink:type="simple" xlink:href="https://ngi.eu/" text:style-name="Internet_20_link" text:visited-style-name="Visited_20_Internet_20_Link"><text:span text:style-name="T168">Next Generation Internet</text:span></text:a><text:span text:style-name="T23"> </text:span><text:span text:style-name="T22">programme, under the aegis of </text:span><text:a xlink:type="simple" xlink:href="https://commission.europa.eu/about-european-commission/departments-and-executive-agencies/communications-networks-content-and-technology_en" text:style-name="Internet_20_link" text:visited-style-name="Visited_20_Internet_20_Link"><text:span text:style-name="T168">DG Communications Networks, Content and Technology</text:span></text:a><text:span text:style-name="T23"> </text:span><text:span text:style-name="T22">under grant agreement No </text:span><text:a xlink:type="simple" xlink:href="https://cordis.europa.eu/project/id/101135429" text:style-name="Internet_20_link" text:visited-style-name="Visited_20_Internet_20_Link"><text:span text:style-name="T23">101135429</text:span></text:a><text:span text:style-name="T22">. Additional funding is made available by the </text:span><text:a xlink:type="simple" xlink:href="https://www.sbfi.admin.ch/sbfi/en/home.html" text:style-name="Internet_20_link" text:visited-style-name="Visited_20_Internet_20_Link"><text:span text:style-name="T168">Swiss State Secretariat for Education, Research and Innovation</text:span></text:a><text:span text:style-name="T23"> </text:span><text:span text:style-name="T22">(SERI).</text:span></text:p>
      <text:p text:style-name="P31"><text:span text:style-name="T20"/></text:p>
      <text:p text:style-name="P49"><text:span text:style-name="T24">Through a Grant from the Bundesministerium für Forschung, Technologie und Raumfahrt (Germany) </text:span><text:span text:style-name="T144">GRANT_NUMBER: </text:span><text:a xlink:type="simple" xlink:href="https://foerderportal.bund.de/foekat/jsp/SucheAction.do?actionMode=view&amp;fkz=01IS22S32" office:target-frame-name="_blank" xlink:show="new" text:style-name="Internet_20_link" text:visited-style-name="Visited_20_Internet_20_Link"><text:span text:style-name="T25">01IS22S32</text:span></text:a><text:span text:style-name="T24"> (exploring support of the IPFS and supporting remote indexing). Through a grant from the European Commission </text:span><text:span text:style-name="Strong_20_Emphasis"><text:span text:style-name="T26">Coordination and Support Action (CSA) on ICT standardisation </text:span></text:span><text:span text:style-name="Strong_20_Emphasis"><text:span text:style-name="T27">(extending support for additional post ISO-8601:2019 features).</text:span></text:span></text:p>
      <text:p text:style-name="P49"><text:span text:style-name="Strong_20_Emphasis"><text:span text:style-name="T26"/></text:span></text:p>
      <text:p text:style-name="P49"><text:span text:style-name="T17">Additional support was provided by a grant from </text:span><text:span text:style-name="T16">OpenData CH/Mercator Foundation CH. </text:span></text:p>
      <text:p text:style-name="P62"><text:span text:style-name="T229"/></text:p>
      <text:p text:style-name="P63"><text:span text:style-name="T229">Appendix </text:span><text:span text:style-name="T230">I: </text:span><text:span text:style-name="T231">Technology Backgrounder / </text:span><text:span text:style-name="T230">The 30 year old new kid</text:span></text:p>
      <text:p text:style-name="P74"><text:span text:style-name="T16"><text:line-break/></text:span><text:span text:style-name="T18">re-Isearch</text:span><text:span text:style-name="T123"> is the modern evolution of iSearch—the pioneering open-source engine of the mid-90s </text:span><text:span text:style-name="T126">we co-developed with CNIDR</text:span><text:span text:style-name="T123">. Originally developed to solve the "document type" problem of the early web, the technology was reborn through the support of NLNet </text:span><text:span text:style-name="T125">as well as grants from BMFTR (German Federal Ministry for Research, Technology and Space), Open Data Switzerland and the Mercator Foundation. </text:span><text:span text:style-name="T123"><text:s/>Today, we’ve moved beyond </text:span><text:span text:style-name="T124">lexical</text:span><text:span text:style-name="T123"> indexing </text:span><text:span text:style-name="T126">adding with Project Schmate vector indexes to become</text:span><text:span text:style-name="T123"> CoreQuarry. </text:span><text:span text:style-name="T126">It</text:span><text:span text:style-name="T123"> combines thirty years of architectural expertise with cutting-edge hybrid search to help mine the core of human knowledge.</text:span></text:p>
      <text:p text:style-name="P74"><text:span text:style-name="T123"/></text:p>
      <text:p text:style-name="P74"><text:span text:style-name="T153">Our</text:span><text:span text:style-name="T150"> philosophical ancestor is </text:span><text:span text:style-name="T50">early </text:span><text:span text:style-name="Strong_20_Emphasis"><text:span text:style-name="T50">SGML retrieval systems </text:span></text:span><text:span text:style-name="Strong_20_Emphasis"><text:span text:style-name="T59">(like OpenText </text:span></text:span><text:span text:style-name="Strong_20_Emphasis"><text:span text:style-name="T60">which grew out of</text:span></text:span><text:span text:style-name="Strong_20_Emphasis"><text:span text:style-name="T91"> a University of Waterloo project from Timothy Bray, Frank Tompa, and Gaston Gonnet to digitize the Oxford English Dictionary</text:span></text:span><text:span text:style-name="Strong_20_Emphasis"><text:span text:style-name="T59">) </text:span></text:span><text:span text:style-name="T150">but </text:span><text:span text:style-name="T153">designed to support </text:span><text:span text:style-name="T154">beyond SGML </text:span><text:span text:style-name="T153">multiple document form</text:span><text:span text:style-name="T162">ats and data types; and </text:span><text:span text:style-name="T143">modernized for:</text:span></text:p>
      <text:list text:style-name="L5">
        <text:list-item>
          <text:p text:style-name="P98">embeddings</text:p>
        </text:list-item>
        <text:list-item>
          <text:p text:style-name="P98">local-first compute</text:p>
        </text:list-item>
        <text:list-item>
          <text:p text:style-name="P135">RAG</text:p>
        </text:list-item>
      </text:list>
      <text:p text:style-name="P25"><text:span text:style-name="T6"/></text:p>
      <text:p text:style-name="P75"><text:span text:style-name="T103">For vector search we use the </text:span><text:span text:style-name="T104">The </text:span><text:span text:style-name="Strong_20_Emphasis"><text:span text:style-name="T104">Hierarchical Navigable Small World (HNSW) </text:span></text:span><text:span text:style-name="T104">algorithm. </text:span><text:span text:style-name="T103">Introduced in</text:span><text:span text:style-name="T148"> </text:span><text:span text:style-name="T149">2016 by</text:span><text:span text:style-name="T148"> </text:span><text:span text:style-name="T149">Y</text:span><text:span text:style-name="Strong_20_Emphasis"><text:span text:style-name="T148">u. A. Malkov and D. A. Yashunin</text:span></text:span><text:span text:style-name="Strong_20_Emphasis"><text:span text:style-name="T109"> </text:span></text:span><text:span text:style-name="Strong_20_Emphasis"><text:span text:style-name="T110">i</text:span></text:span><text:span text:style-name="T104">n their paper, "Efficient and robust approximate nearest neighbor search using Hierarchical Navigable Small World graphs". It is the evolutionary successor to the </text:span><text:span text:style-name="Strong_20_Emphasis"><text:span text:style-name="T104">Navigable Small World (NSW) </text:span></text:span><text:span text:style-name="T104">graph, combining it with the hierarchical structure of </text:span><text:span text:style-name="Strong_20_Emphasis"><text:span text:style-name="T104">Skip Lists.</text:span></text:span></text:p>
      <text:p text:style-name="P25"><text:span text:style-name="T6"/></text:p>
      <text:p text:style-name="P30"><text:span text:style-name="T6">B</text:span><text:span text:style-name="T7">oth our algorithms for lexical and vector structures </text:span><text:span text:style-name="T122">were designed to move beyond simple linear scans. HNSW achieves logarithmic complexity </text:span><text:span text:style-name="T120">𝑂</text:span><text:span text:style-name="T121">(log𝑁) for vectors, while PatArrays provide similar efficiency for finding any substring in a massive corpus without an inverted index.</text:span></text:p>
      <text:p text:style-name="P25"><text:span text:style-name="T6"/></text:p>
      <text:p text:style-name="P25"><text:span text:style-name="T6">H</text:span><text:span text:style-name="T4">ardware has progressed dramatically since the mid-1990s when those SGML retrieval systems were deployed. <text:s/>Back then:</text:span></text:p>
      <text:p text:style-name="P61"><text:span text:style-name="T146">- high end servers (e.g.</text:span><text:span text:style-name="T64"> Sun Ultra Enterprise, IBM RS/6000 SP, HP 9000, DEC Alpha servers, and high-end Intel Pentium Pro servers):</text:span><text:span text:style-name="T146"> had 1-4 GB RAM (mainly EDO or perhaps early ECC DRAM). The memory bus speed was ~60-66 Mhz and the bandwidth was ~200-500 MB/s. Latency was ~60-80ns.</text:span></text:p>
      <text:p text:style-name="P39"><text:span text:style-name="T194">- </text:span><text:span text:style-name="T37">High-end disk arrays: 50–500 GB total (e.g., an EMC Symmetrix could hold ~400 GB) </text:span><text:span text:style-name="T38">where </text:span><text:span text:style-name="T36">Individual SCSI drives: 2–18 GB per spindle </text:span><text:span text:style-name="T38">and </text:span><text:span text:style-name="T36">RAID controllers with cache: 32–256 MB write cache</text:span></text:p>
      <text:h text:style-name="P82" text:outline-level="3" text:is-list-header="true">The Numbers Side-by-Side</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Metric</text:p>
            </table:table-cell>
            <table:table-cell table:style-name="Table3.A1" office:value-type="string">
              <text:p text:style-name="Table_20_Heading">Mid-1990s Enterprise</text:p>
            </table:table-cell>
            <table:table-cell table:style-name="Table3.A1" office:value-type="string">
              <text:p text:style-name="Table_20_Heading">Modern 2026 Workstation</text:p>
            </table:table-cell>
            <table:table-cell table:style-name="Table3.A1" office:value-type="string">
              <text:p text:style-name="Table_20_Heading">Improvement</text:p>
            </table:table-cell>
          </table:table-row>
        </table:table-header-rows>
        <table:table-row>
          <table:table-cell table:style-name="Table3.A1" office:value-type="string">
            <text:p text:style-name="Table_20_Contents">RAM capacity</text:p>
          </table:table-cell>
          <table:table-cell table:style-name="Table3.A1" office:value-type="string">
            <text:p text:style-name="Table_20_Contents">1–4 GB</text:p>
          </table:table-cell>
          <table:table-cell table:style-name="Table3.A1" office:value-type="string">
            <text:p text:style-name="Table_20_Contents">128 GB–2 TB</text:p>
          </table:table-cell>
          <table:table-cell table:style-name="Table3.A1" office:value-type="string">
            <text:p text:style-name="Table_20_Contents">~100–500×</text:p>
          </table:table-cell>
        </table:table-row>
        <table:table-row>
          <table:table-cell table:style-name="Table3.A1" office:value-type="string">
            <text:p text:style-name="Table_20_Contents">Memory bandwidth</text:p>
          </table:table-cell>
          <table:table-cell table:style-name="Table3.A1" office:value-type="string">
            <text:p text:style-name="Table_20_Contents">~400 MB/s</text:p>
          </table:table-cell>
          <table:table-cell table:style-name="Table3.A1" office:value-type="string">
            <text:p text:style-name="Table_20_Contents">~300 GB/s</text:p>
          </table:table-cell>
          <table:table-cell table:style-name="Table3.A1" office:value-type="string">
            <text:p text:style-name="Table_20_Contents"><text:span text:style-name="Strong_20_Emphasis">~750×</text:span></text:p>
          </table:table-cell>
        </table:table-row>
        <table:table-row>
          <table:table-cell table:style-name="Table3.A1" office:value-type="string">
            <text:p text:style-name="Table_20_Contents">Memory latency</text:p>
          </table:table-cell>
          <table:table-cell table:style-name="Table3.A1" office:value-type="string">
            <text:p text:style-name="Table_20_Contents">~70 ns</text:p>
          </table:table-cell>
          <table:table-cell table:style-name="Table3.A1" office:value-type="string">
            <text:p text:style-name="Table_20_Contents">~75 ns end-to-end</text:p>
          </table:table-cell>
          <table:table-cell table:style-name="Table3.A1" office:value-type="string">
            <text:p text:style-name="Table_20_Contents">Roughly flat</text:p>
          </table:table-cell>
        </table:table-row>
        <table:table-row>
          <table:table-cell table:style-name="Table3.A1" office:value-type="string">
            <text:p text:style-name="Table_20_Contents">Disk seq. read</text:p>
          </table:table-cell>
          <table:table-cell table:style-name="Table3.A1" office:value-type="string">
            <text:p text:style-name="Table_20_Contents">10–15 MB/s</text:p>
          </table:table-cell>
          <table:table-cell table:style-name="Table3.A1" office:value-type="string">
            <text:p text:style-name="Table_20_Contents">12,000–14,000 MB/s</text:p>
          </table:table-cell>
          <table:table-cell table:style-name="Table3.A1" office:value-type="string">
            <text:p text:style-name="Table_20_Contents"><text:span text:style-name="Strong_20_Emphasis">~1,000×</text:span></text:p>
          </table:table-cell>
        </table:table-row>
        <table:table-row>
          <table:table-cell table:style-name="Table3.A1" office:value-type="string">
            <text:p text:style-name="Table_20_Contents">Disk random IOPS</text:p>
          </table:table-cell>
          <table:table-cell table:style-name="Table3.A1" office:value-type="string">
            <text:p text:style-name="Table_20_Contents">100–200</text:p>
          </table:table-cell>
          <table:table-cell table:style-name="Table3.A1" office:value-type="string">
            <text:p text:style-name="Table_20_Contents">1,000,000–2,000,000</text:p>
          </table:table-cell>
          <table:table-cell table:style-name="Table3.A1" office:value-type="string">
            <text:p text:style-name="Table_20_Contents"><text:span text:style-name="Strong_20_Emphasis">~10,000×</text:span></text:p>
          </table:table-cell>
        </table:table-row>
        <table:table-row>
          <table:table-cell table:style-name="Table3.A1" office:value-type="string">
            <text:p text:style-name="Table_20_Contents">Disk seek/latency</text:p>
          </table:table-cell>
          <table:table-cell table:style-name="Table3.A1" office:value-type="string">
            <text:p text:style-name="Table_20_Contents">8–12 ms</text:p>
          </table:table-cell>
          <table:table-cell table:style-name="Table3.A1" office:value-type="string">
            <text:p text:style-name="Table_20_Contents">0.02–0.1 ms</text:p>
          </table:table-cell>
          <table:table-cell table:style-name="Table3.A1" office:value-type="string">
            <text:p text:style-name="Table_20_Contents"><text:span text:style-name="Strong_20_Emphasis">~100–500×</text:span></text:p>
          </table:table-cell>
        </table:table-row>
        <table:table-row>
          <table:table-cell table:style-name="Table3.A1" office:value-type="string">
            <text:p text:style-name="Table_20_Contents">Storage capacity</text:p>
          </table:table-cell>
          <table:table-cell table:style-name="Table3.A1" office:value-type="string">
            <text:p text:style-name="Table_20_Contents">400 GB (array)</text:p>
          </table:table-cell>
          <table:table-cell table:style-name="Table3.A1" office:value-type="string">
            <text:p text:style-name="Table_20_Contents">4–8 TB (single drive)</text:p>
          </table:table-cell>
          <table:table-cell table:style-name="Table3.A1" office:value-type="string">
            <text:p text:style-name="Table_20_Contents">~10–20× per drive</text:p>
          </table:table-cell>
        </table:table-row>
        <table:table-row>
          <table:table-cell table:style-name="Table3.A1" office:value-type="string">
            <text:p text:style-name="Table_20_Contents">CPU clock</text:p>
          </table:table-cell>
          <table:table-cell table:style-name="Table3.A1" office:value-type="string">
            <text:p text:style-name="Table_20_Contents">100–500 MHz</text:p>
          </table:table-cell>
          <table:table-cell table:style-name="Table3.A1" office:value-type="string">
            <text:p text:style-name="Table_20_Contents">4,000–6,000 MHz</text:p>
          </table:table-cell>
          <table:table-cell table:style-name="Table3.A1" office:value-type="string">
            <text:p text:style-name="Table_20_Contents">~10–60×</text:p>
          </table:table-cell>
        </table:table-row>
      </table:table>
      <text:p text:style-name="P62"><text:span text:style-name="Strong_20_Emphasis"><text:span text:style-name="T51"/></text:span></text:p>
      <text:p text:style-name="P66"><text:span text:style-name="T50">A fully configured </text:span><text:span text:style-name="T52">mid-1990s</text:span><text:span text:style-name="T50"> enterprise server with 2–4 GB RAM, a modest disk array (~100 GB), RAID, and software licenses: </text:span><text:span text:style-name="Strong_20_Emphasis"><text:span text:style-name="T50">$500,000 – $3,000,000+ </text:span></text:span><text:span text:style-name="Strong_20_Emphasis"><text:span text:style-name="T52">(in 2026</text:span></text:span><text:span text:style-name="T50"> dollars that's roughly </text:span><text:span text:style-name="Strong_20_Emphasis"><text:span text:style-name="T50">$1M – $6M</text:span></text:span><text:span text:style-name="Strong_20_Emphasis"><text:span text:style-name="T52">)</text:span></text:span><text:span text:style-name="Strong_20_Emphasis"><text:span text:style-name="T66"> </text:span></text:span><text:span text:style-name="Strong_20_Emphasis"><text:span text:style-name="T67">versus </text:span></text:span><text:span text:style-name="Strong_20_Emphasis"><text:span text:style-name="T47">~$8,000–$9,000 for a 2026 high-end workstation and even under $2000 for a fast consumer desktop (64-core, 64GB DDR5-6000 RAM, 2TB SSD etc). <text:s/></text:span></text:span><text:span text:style-name="Strong_20_Emphasis"><text:span text:style-name="T48">Even the </text:span></text:span><text:span text:style-name="Strong_20_Emphasis"><text:span text:style-name="T49">€475 (Netto) Apple M4 Mini </text:span></text:span><text:span text:style-name="Strong_20_Emphasis"><text:span text:style-name="T48">(</text:span></text:span><text:span text:style-name="Strong_20_Emphasis"><text:span text:style-name="T98">standard </text:span></text:span><text:span text:style-name="Strong_20_Emphasis"><text:span text:style-name="T90">M4 chip</text:span></text:span><text:span text:style-name="Strong_20_Emphasis"><text:span text:style-name="T92">)</text:span></text:span><text:span text:style-name="Strong_20_Emphasis"><text:span text:style-name="T90"> offers </text:span></text:span><text:span text:style-name="Strong_20_Emphasis"><text:span text:style-name="T92">38 TOPS, </text:span></text:span><text:span text:style-name="Strong_20_Emphasis"><text:span text:style-name="T145">120GB/s </text:span></text:span><text:span text:style-name="Strong_20_Emphasis"><text:span text:style-name="T147">memory bandwidth</text:span></text:span><text:span text:style-name="Strong_20_Emphasis"><text:span text:style-name="T100">,</text:span></text:span><text:span text:style-name="Strong_20_Emphasis"><text:span text:style-name="T49"> 16GB RAM and 255GB SDD </text:span></text:span><text:span text:style-name="Strong_20_Emphasis"><text:span text:style-name="T48">(</text:span></text:span><text:span text:style-name="Strong_20_Emphasis"><text:span text:style-name="T98">under 0.1 ms seek latency)</text:span></text:span><text:span text:style-name="Strong_20_Emphasis"><text:span text:style-name="T49">. </text:span></text:span><text:span text:style-name="Strong_20_Emphasis"><text:span text:style-name="T99">The NVIDIA DGX Spark, powered by the GB10 Grace Blackwell SOC, delivers </text:span></text:span><text:span text:style-name="T150">up to </text:span><text:span text:style-name="Strong_20_Emphasis"><text:span text:style-name="T90">1 PetaFLOP, </text:span></text:span></text:p>
      <text:p text:style-name="P66"><text:soft-page-break/><text:span text:style-name="Strong_20_Emphasis"><text:span text:style-name="T93">memory </text:span></text:span><text:span text:style-name="Strong_20_Emphasis"><text:span text:style-name="T90">bandwidth of approximately </text:span></text:span><text:span text:style-name="Strong_20_Emphasis"><text:span text:style-name="T145">273 GB/s</text:span></text:span><text:span text:style-name="Strong_20_Emphasis"><text:span text:style-name="T90">, 128 GB of unified LPDDR5x memory </text:span></text:span><text:span text:style-name="Strong_20_Emphasis"><text:span text:style-name="T93">and 4GB SSD for </text:span></text:span><text:span text:style-name="Strong_20_Emphasis"><text:span text:style-name="T127">4.349,00 €</text:span></text:span></text:p>
      <text:h text:style-name="P82" text:outline-level="3" text:is-list-header="true">What This Means for Information Retrieval</text:h>
      <text:p text:style-name="Standard"><text:span text:style-name="T30">The most dramatic difference isn't raw speed — it's </text:span><text:span text:style-name="Strong_20_Emphasis"><text:span text:style-name="T30">random I/O latency and IOPS</text:span></text:span><text:span text:style-name="T30">, which is exactly what database queries and information retrieval hammers hardest.</text:span></text:p>
      <text:list text:style-name="L6">
        <text:list-item>
          <text:p text:style-name="P137"><text:span text:style-name="T71">A </text:span><text:span text:style-name="Strong_20_Emphasis"><text:span text:style-name="T71">full-table scan </text:span></text:span><text:span text:style-name="T71">that took 10 minutes on a 90s SCSI array takes </text:span><text:span text:style-name="Strong_20_Emphasis"><text:span text:style-name="T71">seconds </text:span></text:span><text:span text:style-name="T71">on NVMe</text:span></text:p>
        </text:list-item>
        <text:list-item>
          <text:p text:style-name="P137"><text:span text:style-name="T71">A </text:span><text:span text:style-name="Strong_20_Emphasis"><text:span text:style-name="T71">database query </text:span></text:span><text:span text:style-name="T71">requiring 10,000 random disk reads: 90s machine takes </text:span><text:span text:style-name="Strong_20_Emphasis"><text:span text:style-name="T71">80–120 seconds </text:span></text:span><text:span text:style-name="T71">just in I/O wait; modern NVMe does it in </text:span><text:span text:style-name="Strong_20_Emphasis"><text:span text:style-name="T71">~10–50 milliseconds</text:span></text:span></text:p>
        </text:list-item>
        <text:list-item>
          <text:p text:style-name="P137"><text:span text:style-name="T71">The entire </text:span><text:span text:style-name="Strong_20_Emphasis"><text:span text:style-name="T71">working dataset </text:span></text:span><text:span text:style-name="T71">that required careful buffer pool management in the 90s (because RAM was scarce) now </text:span><text:span text:style-name="Strong_20_Emphasis"><text:span text:style-name="T71">fits entirely in RAM </text:span></text:span><text:span text:style-name="T71">on a modern system — eliminating disk I/O almost entirely for hot data</text:span></text:p>
        </text:list-item>
        <text:list-item>
          <text:p text:style-name="P137"><text:span text:style-name="T71">Memory bandwidth improvements mean </text:span><text:span text:style-name="Strong_20_Emphasis"><text:span text:style-name="T71">in-memory analytics </text:span></text:span><text:span text:style-name="T71">(columnar stores, etc.) can process data ~750× faster even if latency is similar</text:span></text:p>
          <text:p text:style-name="P137"><text:span text:style-name="T71"/></text:p>
        </text:list-item>
      </text:list>
      <text:p text:style-name="P58"><text:span text:style-name="T30">The 90s DBAs spent enormous effort on </text:span><text:span text:style-name="Strong_20_Emphasis"><text:span text:style-name="T30">I/O optimization</text:span></text:span><text:span text:style-name="T30">— index tuning, careful buffer management, disk striping — precisely because every random read cost 10ms. On modern hardware, that same problem is largely dissolved. The bottleneck has moved entirely to CPU cache and memory access patterns.</text:span></text:p>
      <text:p text:style-name="P58"><text:span text:style-name="T41">What this means is that algorithms like the inverted index are obsolete! Their historical advantage (accepting their </text:span><text:span text:style-name="T39">signi</text:span><text:span text:style-name="T40">f</text:span><text:span text:style-name="T39">icant</text:span><text:span text:style-name="T41"> limitations) makes no sense in 2026.</text:span></text:p>
      <text:p text:style-name="Standard"><text:span text:style-name="T71">The inverted index was an </text:span><text:span text:style-name="Strong_20_Emphasis"><text:span text:style-name="T71">engineering response to hardware constraints</text:span></text:span><text:span text:style-name="T71">, not an ideal data structure:</text:span></text:p>
      <text:list text:style-name="L7">
        <text:list-item>
          <text:p text:style-name="P138"><text:span text:style-name="T71">Disk was </text:span><text:span text:style-name="Strong_20_Emphasis"><text:span text:style-name="T71">slow and expensive</text:span></text:span><text:span text:style-name="T71">— you couldn't afford to scan raw text</text:span></text:p>
        </text:list-item>
        <text:list-item>
          <text:p text:style-name="P138"><text:span text:style-name="T71">RAM was </text:span><text:span text:style-name="Strong_20_Emphasis"><text:span text:style-name="T71">tiny</text:span></text:span><text:span text:style-name="T71">— you couldn't hold documents in memory</text:span></text:p>
        </text:list-item>
        <text:list-item>
          <text:p text:style-name="P138"><text:span text:style-name="T71">IOPS were </text:span><text:span text:style-name="Strong_20_Emphasis"><text:span text:style-name="T71">precious</text:span></text:span><text:span text:style-name="T71">— every random read cost 10–12ms</text:span></text:p>
        </text:list-item>
        <text:list-item>
          <text:p text:style-name="P138"><text:span text:style-name="T71">So you precomputed posting lists to </text:span><text:span text:style-name="Strong_20_Emphasis"><text:span text:style-name="T71">minimize disk seeks at query time</text:span></text:span></text:p>
        </text:list-item>
      </text:list>
      <text:p text:style-name="Standard"><text:span text:style-name="T71">The entire architecture <text:s/></text:span><text:span text:style-name="T74">mantra </text:span><text:span text:style-name="T71">of Lucene, early Google, and </text:span><text:span text:style-name="T72">most</text:span><text:span text:style-name="T71"> 1990s IR system</text:span><text:span text:style-name="T72">s was</text:span><text:span text:style-name="T71"> essentially: </text:span><text:span text:style-name="Emphasis"><text:span text:style-name="T71">"</text:span></text:span><text:span text:style-name="Emphasis"><text:span text:style-name="T87">disk is our enemy, precompute everything possible to avoid touching it.</text:span></text:span><text:span text:style-name="Emphasis"><text:span text:style-name="T71">"</text:span></text:span></text:p>
      <text:p text:style-name="Standard"><text:span text:style-name="Emphasis"><text:span text:style-name="T73"/></text:span></text:p>
      <text:p text:style-name="Standard"><text:span text:style-name="T53">Patricia Trees and Pat Arrays Fell Out of Favor in the 1990s because of </text:span><text:span text:style-name="Strong_20_Emphasis"><text:span text:style-name="T50">hardware</text:span></text:span><text:span text:style-name="T50">:</text:span></text:p>
      <text:list text:style-name="L8">
        <text:list-item>
          <text:p text:style-name="P139"><text:span text:style-name="Strong_20_Emphasis"><text:span text:style-name="T50">Pointer chasing is catastrophically cache-unfriendly</text:span></text:span><text:span text:style-name="T50">— every node traversal is a potential cache miss</text:span></text:p>
        </text:list-item>
        <text:list-item>
          <text:p text:style-name="P139"><text:span text:style-name="T50">On 1990s hardware, a cache miss meant going to main memory at </text:span><text:span text:style-name="Strong_20_Emphasis"><text:span text:style-name="T50">60–80ns</text:span></text:span><text:span text:style-name="T50">, and with tiny caches (L1 was 8–16KB) misses were constant</text:span></text:p>
        </text:list-item>
        <text:list-item>
          <text:p text:style-name="P139"><text:span text:style-name="T50">The inverted index, despite its bulk, had </text:span><text:span text:style-name="Strong_20_Emphasis"><text:span text:style-name="T50">more predictable, sequential access patterns </text:span></text:span><text:span text:style-name="T50">that could be optimized with careful disk layout</text:span></text:p>
        </text:list-item>
        <text:list-item>
          <text:p text:style-name="P139"><text:span text:style-name="T50">Patricia trees also consumed significant RAM for pointers — precious in an era of </text:span><text:span text:style-name="Strong_20_Emphasis"><text:span text:style-name="T50">$50,000/GB </text:span></text:span><text:span text:style-name="T50">RAM</text:span></text:p>
        </text:list-item>
        <text:list-item>
          <text:p text:style-name="P139"><text:span text:style-name="Strong_20_Emphasis"><text:span text:style-name="T50">Worst case pointer density</text:span></text:span><text:span text:style-name="T50">: a tree over a million terms might have millions of pointer pairs, each potentially a cache miss during traversal</text:span></text:p>
        </text:list-item>
      </text:list>
      <text:p text:style-name="Standard"><text:span text:style-name="T50"/></text:p>
      <text:p text:style-name="Standard"><text:span text:style-name="T50">So Patricia trees were theoretically elegant but </text:span><text:span text:style-name="Strong_20_Emphasis"><text:span text:style-name="T50">practically punished by memory hierarchies </text:span></text:span><text:span text:style-name="T50">of the era.</text:span></text:p>
      <text:p text:style-name="P24"/>
      <text:h text:style-name="P84" text:outline-level="3" text:is-list-header="true">Cache hierarchies have transformed <text:span text:style-name="T200">things</text:span></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Cache</text:p>
            </table:table-cell>
            <table:table-cell table:style-name="Table4.A1" office:value-type="string">
              <text:p text:style-name="Table_20_Heading">1995 Size</text:p>
            </table:table-cell>
            <table:table-cell table:style-name="Table4.A1" office:value-type="string">
              <text:p text:style-name="Table_20_Heading">2026 Size</text:p>
            </table:table-cell>
            <table:table-cell table:style-name="Table4.A1" office:value-type="string">
              <text:p text:style-name="Table_20_Heading">Improvement</text:p>
            </table:table-cell>
          </table:table-row>
        </table:table-header-rows>
        <table:table-row>
          <table:table-cell table:style-name="Table4.A1" office:value-type="string">
            <text:p text:style-name="Table_20_Contents">L1</text:p>
          </table:table-cell>
          <table:table-cell table:style-name="Table4.A1" office:value-type="string">
            <text:p text:style-name="Table_20_Contents">8–16 KB</text:p>
          </table:table-cell>
          <table:table-cell table:style-name="Table4.A1" office:value-type="string">
            <text:p text:style-name="Table_20_Contents">32–64 KB</text:p>
          </table:table-cell>
          <table:table-cell table:style-name="Table4.A1" office:value-type="string">
            <text:p text:style-name="Table_20_Contents">~4×</text:p>
          </table:table-cell>
        </table:table-row>
        <table:table-row>
          <table:table-cell table:style-name="Table4.A1" office:value-type="string">
            <text:p text:style-name="Table_20_Contents">L2</text:p>
          </table:table-cell>
          <table:table-cell table:style-name="Table4.A1" office:value-type="string">
            <text:p text:style-name="Table_20_Contents">256 KB (rare)</text:p>
          </table:table-cell>
          <table:table-cell table:style-name="Table4.A1" office:value-type="string">
            <text:p text:style-name="Table_20_Contents">512 KB–1 MB per core</text:p>
          </table:table-cell>
          <table:table-cell table:style-name="Table4.A1" office:value-type="string">
            <text:p text:style-name="Table_20_Contents">~4–8×</text:p>
          </table:table-cell>
        </table:table-row>
        <table:table-row>
          <table:table-cell table:style-name="Table4.A1" office:value-type="string">
            <text:p text:style-name="Table_20_Contents">L3</text:p>
          </table:table-cell>
          <table:table-cell table:style-name="Table4.A1" office:value-type="string">
            <text:p text:style-name="Table_20_Contents">Nonexistent/tiny</text:p>
          </table:table-cell>
          <table:table-cell table:style-name="Table4.A1" office:value-type="string">
            <text:p text:style-name="Table_20_Contents">64–256 MB (Threadripper)</text:p>
          </table:table-cell>
          <table:table-cell table:style-name="Table4.A1" office:value-type="string">
            <text:p text:style-name="Table_20_Contents">∞ → huge</text:p>
          </table:table-cell>
        </table:table-row>
        <table:table-row>
          <table:table-cell table:style-name="Table4.A1" office:value-type="string">
            <text:p text:style-name="Table_20_Contents">RAM</text:p>
          </table:table-cell>
          <table:table-cell table:style-name="Table4.A1" office:value-type="string">
            <text:p text:style-name="Table_20_Contents">256MB–4GB</text:p>
          </table:table-cell>
          <table:table-cell table:style-name="Table4.A1" office:value-type="string">
            <text:p text:style-name="Table_20_Contents">128GB–2TB</text:p>
          </table:table-cell>
          <table:table-cell table:style-name="Table4.A1" office:value-type="string">
            <text:p text:style-name="Table_20_Contents">~500×</text:p>
          </table:table-cell>
        </table:table-row>
      </table:table>
      <text:p text:style-name="P26"/>
      <text:p text:style-name="Standard"><text:soft-page-break/><text:span text:style-name="T30">A Patricia tree over a </text:span><text:span text:style-name="Strong_20_Emphasis"><text:span text:style-name="T30">large IR vocabulary </text:span></text:span><text:span text:style-name="T30">(~1–10 million terms) occupies perhaps </text:span><text:span text:style-name="Strong_20_Emphasis"><text:span text:style-name="T30">500MB–2GB</text:span></text:span><text:span text:style-name="T30"> of RAM. On a modern system this fits </text:span><text:span text:style-name="Strong_20_Emphasis"><text:span text:style-name="T30">entirely in L3 cache </text:span></text:span><text:span text:style-name="T30">on high-end CPUs, or at worst in RAM with DDR5's enormous bandwidth.</text:span></text:p>
      <text:p text:style-name="Standard"><text:span text:style-name="T71"/></text:p>
      <text:p text:style-name="Standard"><text:span text:style-name="T71">When the whole tree lives in L3, pointer chasing is no longer going to slow DRAM — it's hitting </text:span><text:span text:style-name="Strong_20_Emphasis"><text:span text:style-name="T71">~10 cycle L3 latency </text:span></text:span><text:span text:style-name="T71">vs the ~200 cycle DRAM penalty that killed Patricia trees in the 1990s.</text:span></text:p>
      <text:p text:style-name="Standard"><text:span text:style-name="T71"/></text:p>
      <text:p text:style-name="Standard"><text:span text:style-name="T71"/></text:p>
      <text:p text:style-name="Standard"><text:span text:style-name="T71"/></text:p>
      <table:table table:name="Table5" table:style-name="Table5">
        <table:table-column table:style-name="Table5.A"/>
        <table:table-column table:style-name="Table5.B"/>
        <table:table-row>
          <table:table-cell table:style-name="Table5.A1" office:value-type="string">
            <text:p text:style-name="P41">PAT Array Problem (1992)</text:p>
          </table:table-cell>
          <table:table-cell table:style-name="Table5.A1" office:value-type="string">
            <text:p text:style-name="P41">2026 Solution</text:p>
          </table:table-cell>
        </table:table-row>
        <table:table-row>
          <table:table-cell table:style-name="Table5.A1" office:value-type="string">
            <text:p text:style-name="P40">Index too large for RAM</text:p>
          </table:table-cell>
          <table:table-cell table:style-name="Table5.A1" office:value-type="string">
            <text:p text:style-name="P40">128GB–2TB RAM — fits comfortably</text:p>
          </table:table-cell>
        </table:table-row>
        <table:table-row>
          <table:table-cell table:style-name="Table5.A1" office:value-type="string">
            <text:p text:style-name="P40">O(log n) random accesses slow</text:p>
          </table:table-cell>
          <table:table-cell table:style-name="Table5.A1" office:value-type="string">
            <text:p text:style-name="P40">DDR5 random access ~75ns, L3 ~10ns — negligible</text:p>
          </table:table-cell>
        </table:table-row>
        <table:table-row>
          <table:table-cell table:style-name="Table5.A1" office:value-type="string">
            <text:p text:style-name="P40">Construction too slow</text:p>
          </table:table-cell>
          <table:table-cell table:style-name="Table5.A1" office:value-type="string">
            <text:p text:style-name="P40">Modern O(n) suffix array construction (SA-IS algorithm) + fast CPUs</text:p>
          </table:table-cell>
        </table:table-row>
        <table:table-row>
          <table:table-cell table:style-name="Table5.A1" office:value-type="string">
            <text:p text:style-name="P40">Binary search cache-unfriendly</text:p>
          </table:table-cell>
          <table:table-cell table:style-name="Table5.A1" office:value-type="string">
            <text:p text:style-name="P40">Entire index in L3/RAM — cache misses collapse</text:p>
          </table:table-cell>
        </table:table-row>
        <table:table-row>
          <table:table-cell table:style-name="Table5.A1" office:value-type="string">
            <text:p text:style-name="P40">No word-level ranking (BM25 etc.)</text:p>
          </table:table-cell>
          <table:table-cell table:style-name="Table5.A1" office:value-type="string">
            <text:p text:style-name="P40">Can layer neural/embedding ranking on top</text:p>
          </table:table-cell>
        </table:table-row>
      </table:table>
      <text:p text:style-name="P64"><text:span text:style-name="T71"/></text:p>
      <text:p text:style-name="P79"><text:span text:style-name="T50">Our indexing architecture builds on ideas related to </text:span><text:span text:style-name="Strong_20_Emphasis"><text:span text:style-name="T50">Patricia trees </text:span></text:span><text:span text:style-name="T50">and </text:span><text:span text:style-name="Strong_20_Emphasis"><text:span text:style-name="T50">Pat arrays</text:span></text:span><text:span text:style-name="T50">, but extends them to address the I/O and scalability constraints that have historically limited their use in large-scale information retrieval. A Patricia tree provides an efficient compressed trie structure for prefix searches, but it requires pointer-heavy navigation and does not map well to modern memory-mapped storage or high-throughput disk access. Pat arrays, by contrast, store lexicographically ordered suffix or term references in contiguous arrays, improving locality but traditionally requiring the underlying corpus text to be stored alongside the index and incurring expensive disk reads during lookup. Our approach separates corpus storage from the index while maintaining compact address</text:span><text:span text:style-name="T63">es. </text:span></text:p>
      <text:p text:style-name="P79"><text:span text:style-name="T63"/></text:p>
      <text:h text:style-name="P83" text:outline-level="3" text:is-list-header="true"><text:span text:style-name="T232">C</text:span>aching Strategy <text:span text:style-name="T242">based on Word Length Distribution</text:span></text:h>
      <text:p text:style-name="P33"><text:span text:style-name="T45">I</text:span><text:span text:style-name="T137">nformation Efficiency</text:span><text:span text:style-name="T139">: Human communication is optimized for speed. According to </text:span><text:span text:style-name="T138">Zipf's Law of Abbreviation</text:span><text:span text:style-name="T139">, the words we repeat most frequently are compressed by evolution into the shortest possible forms</text:span></text:p>
      <text:p text:style-name="P33"><text:span text:style-name="T139"/></text:p>
      <text:p text:style-name="P24" loext:marker-style-name="T233"><text:span text:style-name="T138">Distinct Words (Types)</text:span><text:span text:style-name="T235"> follow a </text:span><text:span text:style-name="T236">unimodal distribution</text:span><text:span text:style-name="T235"> (a hump-shaped curve). The vast majority of dictionary words are moderately long (typically 6–9 characters in English) because a language needs permutations of letters to create a unique vocabulary. Very short words are rare because there are only so many combinations you can make with 1 to 3 letters</text:span></text:p>
      <text:p text:style-name="P140" loext:marker-style-name="T233"/>
      <text:p text:style-name="P32"><text:span text:style-name="T236">Words in Use (Tokens)</text:span><text:span text:style-name="T235"> follow a </text:span><text:span text:style-name="T236">monotonic decrease or highly right-skewed distribution</text:span><text:span text:style-name="T235">. When analyzing a real book or corpus, massive frequency is dominated by short grammatical words ("the", "of", "and", "to"). This causes a huge spike at lengths 2–4, dropping sharply as words get longer. </text:span></text:p>
      <text:p text:style-name="P141" loext:marker-style-name="T233"/>
      <text:p text:style-name="P78" loext:marker-style-name="T233"><text:span text:style-name="T141">Grammar vs. Content</text:span><text:span text:style-name="T142">: Short words (2–4 letters) act as structural or grammatical "bridges" (e.g., pronouns, prepositions, articles). We reuse them constantly in every sentence, whereas long words (8+ letters) carry specific technical or descriptive content and are only used when strictly necessary</text:span></text:p>
      <text:p text:style-name="P78"/>
      <text:p text:style-name="P78"><draw:frame draw:style-name="fr2" draw:name="Image21" text:anchor-type="char" svg:width="6.6929in" svg:height="3.6445in" draw:z-index="20"><draw:image xlink:href="Pictures/10000001000005CA0000032781D97E02.png" xlink:type="simple" xlink:show="embed" xlink:actuate="onLoad" draw:mime-type="image/png"/></draw:frame><text:soft-page-break/>Our 2-tier cache, <text:span text:style-name="T218">originally introduced in our proprietary fork,</text:span> allows the advantages of the separate corpus but removes <text:span text:style-name="T201">the</text:span> need <text:span text:style-name="T201">to read it </text:span>for words less than some pre-set <text:span text:style-name="T207">prefix</text:span> length. </text:p>
      <text:p text:style-name="P55"/>
      <text:p text:style-name="P55">This works remarkably well especially in English </text:p>
      <text:list text:style-name="L9">
        <text:list-item>
          <text:p text:style-name="P143">1–7 letters: ~82.97%</text:p>
        </text:list-item>
        <text:list-item>
          <text:p text:style-name="P143">8–10 letters: ~13.46%</text:p>
        </text:list-item>
        <text:list-item>
          <text:p text:style-name="P143">11–14 letters: ~3.46%</text:p>
        </text:list-item>
        <text:list-item>
          <text:p text:style-name="P143">15 letters: ~0.076%</text:p>
        </text:list-item>
        <text:list-item>
          <text:p text:style-name="P143">≥16 letters: ~0.034% combined</text:p>
        </text:list-item>
      </text:list>
      <text:p text:style-name="P78"><text:span text:style-name="Strong_20_Emphasis"><text:span text:style-name="T70">≈ </text:span></text:span><text:span text:style-name="Strong_20_Emphasis"><text:span text:style-name="T85">99.9% of words are under 15 characters long </text:span></text:span><text:span text:style-name="Strong_20_Emphasis"><text:span text:style-name="T75">i</text:span></text:span><text:span text:style-name="T71">n typical English text. </text:span><text:span text:style-name="T86">10 characters or less:</text:span><text:span text:style-name="T75"> </text:span><text:span text:style-name="T54">~</text:span><text:span text:style-name="Strong_20_Emphasis"><text:span text:style-name="T68">96.4%. </text:span></text:span><text:span text:style-name="Strong_20_Emphasis"><text:span text:style-name="T54">A </text:span></text:span><text:span text:style-name="Strong_20_Emphasis"><text:span text:style-name="T56">1</text:span></text:span><text:span text:style-name="Strong_20_Emphasis"><text:span text:style-name="T54">0-character prefix is long enough that collisions are uncommon, so the resulting count will be</text:span></text:span><text:span text:style-name="Strong_20_Emphasis"><text:span text:style-name="T58"> </text:span></text:span><text:span text:style-name="Strong_20_Emphasis"><text:span text:style-name="T54">close to the original dictionary size.</text:span></text:span></text:p>
      <text:p text:style-name="Standard"><text:span text:style-name="T54"/></text:p>
      <text:p text:style-name="Standard"><text:span text:style-name="T54">So even with a length set to 10, 96% or all words </text:span><text:span text:style-name="T55">won’t</text:span><text:span text:style-name="T54"> demand a corpus lookup. This cache is also relatively small since it would require only 26 byte</text:span><text:span text:style-name="T62">s</text:span><text:span text:style-name="T54"> per unique word (for 64-bit indexes). </text:span></text:p>
      <text:p text:style-name="Standard"><text:span text:style-name="T42"/></text:p>
      <table:table table:name="Table6" table:style-name="Table6">
        <table:table-column table:style-name="Table6.A"/>
        <table:table-column table:style-name="Table6.B"/>
        <table:table-header-rows>
          <table:table-row>
            <table:table-cell table:style-name="Table6.A1" office:value-type="string">
              <text:p text:style-name="Table_20_Heading">Source</text:p>
            </table:table-cell>
            <table:table-cell table:style-name="Table6.A1" office:value-type="string">
              <text:p text:style-name="Table_20_Heading">Count</text:p>
            </table:table-cell>
          </table:table-row>
        </table:table-header-rows>
        <table:table-row>
          <table:table-cell table:style-name="Table6.A1" office:value-type="string">
            <text:p text:style-name="Table_20_Contents">Words ≤10 chars</text:p>
          </table:table-cell>
          <table:table-cell table:style-name="Table6.A1" office:value-type="string">
            <text:p text:style-name="Table_20_Contents">~118k</text:p>
          </table:table-cell>
        </table:table-row>
        <table:table-row>
          <table:table-cell table:style-name="Table6.A1" office:value-type="string">
            <text:p text:style-name="Table_20_Contents">Unique prefixes from longer words</text:p>
          </table:table-cell>
          <table:table-cell table:style-name="Table6.A1" office:value-type="string">
            <text:p text:style-name="Table_20_Contents">~44k</text:p>
          </table:table-cell>
        </table:table-row>
        <table:table-row>
          <table:table-cell table:style-name="Table6.A1" office:value-type="string">
            <text:p text:style-name="Table_20_Contents"><text:span text:style-name="Strong_20_Emphasis">Total unique entries</text:span></text:p>
          </table:table-cell>
          <table:table-cell table:style-name="Table6.A1" office:value-type="string">
            <text:p text:style-name="Table_20_Contents"><text:span text:style-name="Strong_20_Emphasis">~162k</text:span></text:p>
          </table:table-cell>
        </table:table-row>
      </table:table>
      <text:p text:style-name="Standard"><text:soft-page-break/><text:span text:style-name="T42"/></text:p>
      <text:p text:style-name="Standard"><text:span text:style-name="Strong_20_Emphasis"><text:span text:style-name="T84">≈</text:span></text:span><text:span text:style-name="Strong_20_Emphasis"><text:span text:style-name="T76">150,000 – 170,000 </text:span></text:span><text:span text:style-name="Strong_20_Emphasis"><text:span text:style-name="T77">max </text:span></text:span><text:span text:style-name="Strong_20_Emphasis"><text:span text:style-name="T76">unique entries </text:span></text:span><text:span text:style-name="Strong_20_Emphasis"><text:span text:style-name="T77">so we can </text:span></text:span><text:span text:style-name="T42">safely assume that the maximum size </text:span><text:span text:style-name="T43">of the</text:span><text:span text:style-name="T42"> cache will be under 4.</text:span><text:span text:style-name="T43">5 </text:span><text:span text:style-name="T42">MB. </text:span></text:p>
      <text:p text:style-name="Standard"><text:span text:style-name="T42"/></text:p>
      <text:p text:style-name="Standard"><text:span text:style-name="T55"/></text:p>
      <text:p text:style-name="Standard"><draw:frame draw:style-name="fr2" draw:name="Image22" text:anchor-type="char" svg:width="6.6929in" svg:height="3.6398in" draw:z-index="21"><draw:image xlink:href="Pictures/10000001000005CA00000326B69632D9.png" xlink:type="simple" xlink:show="embed" xlink:actuate="onLoad" draw:mime-type="image/png"/></draw:frame><text:span text:style-name="T55"/></text:p>
      <text:p text:style-name="Standard"><text:span text:style-name="T55"/></text:p>
      <text:p text:style-name="Standard"><text:span text:style-name="T55">German behaves very differently from English because of </text:span><text:span text:style-name="Strong_20_Emphasis"><text:span text:style-name="T55">productive compounding </text:span></text:span><text:span text:style-name="T55">(e.g., </text:span><text:span text:style-name="Emphasis"><text:span text:style-name="T69">Krankenhausverwaltungsgesetz</text:span></text:span><text:span text:style-name="T55">). So truncating to </text:span><text:span text:style-name="Strong_20_Emphasis"><text:span text:style-name="T55">10 characters </text:span></text:span><text:span text:style-name="T55">collapses many more words.</text:span></text:p>
      <text:p text:style-name="Standard"><text:span text:style-name="T55"/></text:p>
      <table:table table:name="Table7" table:style-name="Table7">
        <table:table-column table:style-name="Table7.A"/>
        <table:table-column table:style-name="Table7.B"/>
        <table:table-header-rows>
          <table:table-row>
            <table:table-cell table:style-name="Table7.A1" office:value-type="string">
              <text:p text:style-name="Table_20_Heading">Length</text:p>
            </table:table-cell>
            <table:table-cell table:style-name="Table7.A1" office:value-type="string">
              <text:p text:style-name="Table_20_Heading">Approx. share</text:p>
            </table:table-cell>
          </table:table-row>
        </table:table-header-rows>
      </table:table>
      <table:table table:name="Table8" table:style-name="Table8">
        <table:table-column table:style-name="Table8.A"/>
        <table:table-column table:style-name="Table8.B"/>
        <table:table-row>
          <table:table-cell table:style-name="Table8.A1" office:value-type="string">
            <text:p text:style-name="Table_20_Contents">≤10 letters</text:p>
          </table:table-cell>
          <table:table-cell table:style-name="Table8.A1" office:value-type="string">
            <text:p text:style-name="Table_20_Contents">~40–50%</text:p>
          </table:table-cell>
        </table:table-row>
      </table:table>
      <table:table table:name="Table9" table:style-name="Table9">
        <table:table-column table:style-name="Table9.A"/>
        <table:table-column table:style-name="Table9.B"/>
        <table:table-row>
          <table:table-cell table:style-name="Table9.A1" office:value-type="string">
            <text:p text:style-name="Table_20_Contents">11–15 letters</text:p>
          </table:table-cell>
          <table:table-cell table:style-name="Table9.A1" office:value-type="string">
            <text:p text:style-name="Table_20_Contents">~30–35%</text:p>
          </table:table-cell>
        </table:table-row>
      </table:table>
      <table:table table:name="Table10" table:style-name="Table10">
        <table:table-column table:style-name="Table10.A"/>
        <table:table-column table:style-name="Table10.B"/>
        <table:table-row>
          <table:table-cell table:style-name="Table10.A1" office:value-type="string">
            <text:p text:style-name="Table_20_Contents">16+ letters</text:p>
          </table:table-cell>
          <table:table-cell table:style-name="Table10.A1" office:value-type="string">
            <text:p text:style-name="Table_20_Contents">~20–30%</text:p>
          </table:table-cell>
        </table:table-row>
      </table:table>
      <text:p text:style-name="Standard"><text:span text:style-name="T55"/></text:p>
      <text:p text:style-name="P24" loext:marker-style-name="T233"><text:span text:style-name="T140">Expanding this analysis across </text:span><text:span text:style-name="T236">three different language families</text:span><text:span text:style-name="T235"> (Germanic, Romance, and Slavic) reveals clear patterns in how grammatical structures dictate token word length.</text:span></text:p>
      <text:p text:style-name="P140" loext:marker-style-name="T233"/>
      <text:p text:style-name="P24" loext:marker-style-name="T233"><text:span text:style-name="T235">Comparative Insights by Language Family</text:span><text:span text:style-name="T235"/></text:p>
      <text:list text:style-name="WWNum1">
        <text:list-item>
          <text:p text:style-name="P100" loext:marker-style-name="T234"><text:span text:style-name="T236">The Romance Family (French, Spanish, Italian)</text:span><text:span text:style-name="T235">: These three closely mirror each other. They behave like English with a strong peak around </text:span><text:span text:style-name="T236">3 to 4 characters</text:span><text:span text:style-name="T235">, heavily driven by shared grammatical features like short articles (</text:span><text:span text:style-name="T239">el, la, le, les, il, i</text:span><text:span text:style-name="T240">), prepositions (</text:span><text:span text:style-name="T239">de, di, en</text:span><text:span text:style-name="T240">), and conjunctions (</text:span><text:span text:style-name="T239">y, et, e</text:span><text:span text:style-name="T240">).</text:span></text:p>
        </text:list-item>
        <text:list-item>
          <text:p text:style-name="P100" loext:marker-style-name="T234"><text:span text:style-name="T241">The Slavic Family (Polish, Russian)</text:span><text:span text:style-name="T240">: Slavic languages completely lack definite and indefinite articles (no words for "a" or "the"). Because they skip these highly repetitive ultra-short words, their curves are much flatter and </text:span><text:span text:style-name="T241">shifted to the right</text:span><text:span text:style-name="T240">, peaking broader around </text:span><text:span text:style-name="T241">3 to 6 characters</text:span><text:span text:style-name="T240">. They also rely on extensive case-inflected suffixes, lengthening their baseline vocabulary.</text:span></text:p>
        </text:list-item>
        <text:list-item>
          <text:p text:style-name="P144" loext:marker-style-name="T234"><text:span text:style-name="T237">The Germanic Family (German vs. English)</text:span><text:span text:style-name="T238">: While English behaves like a Romance language in its word length due to heavy reliance on short particles, German stands out completely alone with its prolonged, thick tail spanning from </text:span><text:span text:style-name="T237">7 to 12+ characters</text:span><text:span text:style-name="T238"> due to its compound word architecture.</text:span></text:p>
        </text:list-item>
      </text:list>
      <text:h text:style-name="P81" text:outline-level="1" text:is-list-header="true"><text:soft-page-break/><text:span text:style-name="T55">Pr</text:span><draw:frame draw:style-name="fr1" draw:name="Image23" text:anchor-type="char" svg:width="6.6543in" svg:height="3.5917in" draw:z-index="22"><draw:image xlink:href="Pictures/10000001000006600000037120C595D9.png" xlink:type="simple" xlink:show="embed" xlink:actuate="onLoad" draw:mime-type="image/png"/></draw:frame><text:span text:style-name="T55">actical rule </text:span><text:span text:style-name="T57">for optional </text:span><text:span text:style-name="T62">prefix length</text:span><text:span text:style-name="T57"> according to language</text:span><text:span text:style-name="T55"> </text:span><text:span text:style-name="T57">for 95% unique</text:span></text:h>
      <text:p text:style-name="Standard"><text:span text:style-name="T55"/></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Language</text:p>
            </table:table-cell>
            <table:table-cell table:style-name="Table11.A1" office:value-type="string">
              <text:p text:style-name="Table_20_Heading">Typical lexicon size</text:p>
            </table:table-cell>
            <table:table-cell table:style-name="Table11.A1" office:value-type="string">
              <text:p text:style-name="Table_20_Heading">Safe prefix length</text:p>
            </table:table-cell>
            <table:table-cell table:style-name="Table11.A1" office:value-type="string">
              <text:p text:style-name="Table_20_Heading">Main reason</text:p>
            </table:table-cell>
          </table:table-row>
        </table:table-header-rows>
        <table:table-row>
          <table:table-cell table:style-name="Table11.A1" office:value-type="string">
            <text:p text:style-name="Table_20_Contents">English</text:p>
          </table:table-cell>
          <table:table-cell table:style-name="Table11.A1" office:value-type="string">
            <text:p text:style-name="Table_20_Contents">~170k</text:p>
          </table:table-cell>
          <table:table-cell table:style-name="Table11.A1" office:value-type="string">
            <text:p text:style-name="Table_20_Contents"><text:span text:style-name="Strong_20_Emphasis">8–10</text:span></text:p>
          </table:table-cell>
          <table:table-cell table:style-name="Table11.A1" office:value-type="string">
            <text:p text:style-name="Table_20_Contents">Short words, low inflection</text:p>
          </table:table-cell>
        </table:table-row>
        <table:table-row>
          <table:table-cell table:style-name="Table11.A1" office:value-type="string">
            <text:p text:style-name="Table_20_Contents">German</text:p>
          </table:table-cell>
          <table:table-cell table:style-name="Table11.A1" office:value-type="string">
            <text:p text:style-name="Table_20_Contents">~350k</text:p>
          </table:table-cell>
          <table:table-cell table:style-name="Table11.A1" office:value-type="string">
            <text:p text:style-name="Table_20_Contents"><text:span text:style-name="Strong_20_Emphasis">12–14</text:span></text:p>
          </table:table-cell>
          <table:table-cell table:style-name="Table11.A1" office:value-type="string">
            <text:p text:style-name="Table_20_Contents">Strong compounding</text:p>
          </table:table-cell>
        </table:table-row>
        <table:table-row>
          <table:table-cell table:style-name="Table11.A1" office:value-type="string">
            <text:p text:style-name="Table_20_Contents">French</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9–11</text:span></text:p>
          </table:table-cell>
          <table:table-cell table:style-name="Table11.A1" office:value-type="string">
            <text:p text:style-name="Table_20_Contents">Shared Latin prefixes</text:p>
          </table:table-cell>
        </table:table-row>
        <table:table-row>
          <table:table-cell table:style-name="Table11.A1" office:value-type="string">
            <text:p text:style-name="Table_20_Contents">Spanish</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9–11</text:span></text:p>
          </table:table-cell>
          <table:table-cell table:style-name="Table11.A1" office:value-type="string">
            <text:p text:style-name="Table_20_Contents">Verb inflection</text:p>
          </table:table-cell>
        </table:table-row>
        <table:table-row>
          <table:table-cell table:style-name="Table11.A1" office:value-type="string">
            <text:p text:style-name="Table_20_Contents">Italian</text:p>
          </table:table-cell>
          <table:table-cell table:style-name="Table11.A1" office:value-type="string">
            <text:p text:style-name="Table_20_Contents">~180k</text:p>
          </table:table-cell>
          <table:table-cell table:style-name="Table11.A1" office:value-type="string">
            <text:p text:style-name="Table_20_Contents"><text:span text:style-name="Strong_20_Emphasis">9–11</text:span></text:p>
          </table:table-cell>
          <table:table-cell table:style-name="Table11.A1" office:value-type="string">
            <text:p text:style-name="Table_20_Contents">Romance morphology</text:p>
          </table:table-cell>
        </table:table-row>
        <table:table-row>
          <table:table-cell table:style-name="Table11.A1" office:value-type="string">
            <text:p text:style-name="Table_20_Contents">Russian</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10–12</text:span></text:p>
          </table:table-cell>
          <table:table-cell table:style-name="Table11.A1" office:value-type="string">
            <text:p text:style-name="Table_20_Contents">Prefix + case system</text:p>
          </table:table-cell>
        </table:table-row>
        <table:table-row>
          <table:table-cell table:style-name="Table11.A1" office:value-type="string">
            <text:p text:style-name="Table_20_Contents">Swedish</text:p>
          </table:table-cell>
          <table:table-cell table:style-name="Table11.A1" office:value-type="string">
            <text:p text:style-name="Table_20_Contents">~250k</text:p>
          </table:table-cell>
          <table:table-cell table:style-name="Table11.A1" office:value-type="string">
            <text:p text:style-name="Table_20_Contents"><text:span text:style-name="Strong_20_Emphasis">11–13</text:span></text:p>
          </table:table-cell>
          <table:table-cell table:style-name="Table11.A1" office:value-type="string">
            <text:p text:style-name="Table_20_Contents">Compounding</text:p>
          </table:table-cell>
        </table:table-row>
        <table:table-row>
          <table:table-cell table:style-name="Table11.A1" office:value-type="string">
            <text:p text:style-name="Table_20_Contents"><text:span text:style-name="Strong_20_Emphasis"><text:span text:style-name="T9">Greek</text:span></text:span></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11–13</text:span></text:p>
          </table:table-cell>
          <table:table-cell table:style-name="Table11.A1" office:value-type="string">
            <text:p text:style-name="Table_20_Contents">Rich inflection, long stems</text:p>
          </table:table-cell>
        </table:table-row>
        <table:table-row>
          <table:table-cell table:style-name="Table11.A1" office:value-type="string">
            <text:p text:style-name="Table_20_Contents"><text:span text:style-name="Strong_20_Emphasis"><text:span text:style-name="T9">Polish</text:span></text:span></text:p>
          </table:table-cell>
          <table:table-cell table:style-name="Table11.A1" office:value-type="string">
            <text:p text:style-name="Table_20_Contents">~250k</text:p>
          </table:table-cell>
          <table:table-cell table:style-name="Table11.A1" office:value-type="string">
            <text:p text:style-name="Table_20_Contents"><text:span text:style-name="Strong_20_Emphasis">12–14</text:span></text:p>
          </table:table-cell>
          <table:table-cell table:style-name="Table11.A1" office:value-type="string">
            <text:p text:style-name="Table_20_Contents">Very rich case morphology</text:p>
          </table:table-cell>
        </table:table-row>
      </table:table>
      <text:p text:style-name="Standard"><text:span text:style-name="T55"/></text:p>
      <text:p text:style-name="Standard"><text:span text:style-name="T71">If </text:span><text:span text:style-name="Strong_20_Emphasis"><text:span text:style-name="T71">one </text:span></text:span><text:span text:style-name="Strong_20_Emphasis"><text:span text:style-name="T79">needs a </text:span></text:span><text:span text:style-name="Strong_20_Emphasis"><text:span text:style-name="T71">prefix length that works well across all these languages</text:span></text:span><text:span text:style-name="T71">:</text:span></text:p>
      <table:table table:name="Table12" table:style-name="Table12">
        <table:table-column table:style-name="Table12.A"/>
        <table:table-column table:style-name="Table12.B"/>
        <table:table-header-rows>
          <table:table-row>
            <table:table-cell table:style-name="Table12.A1" office:value-type="string">
              <text:p text:style-name="Table_20_Heading">Prefix length</text:p>
            </table:table-cell>
            <table:table-cell table:style-name="Table12.A1" office:value-type="string">
              <text:p text:style-name="Table_20_Heading">Result</text:p>
            </table:table-cell>
          </table:table-row>
        </table:table-header-rows>
        <table:table-row>
          <table:table-cell table:style-name="Table12.A1" office:value-type="string">
            <text:p text:style-name="Table_20_Contents"><text:span text:style-name="Strong_20_Emphasis">10 chars</text:span></text:p>
          </table:table-cell>
          <table:table-cell table:style-name="Table12.A1" office:value-type="string">
            <text:p text:style-name="Table_20_Contents">Works well for English / Romance languages</text:p>
          </table:table-cell>
        </table:table-row>
        <table:table-row>
          <table:table-cell table:style-name="Table12.A1" office:value-type="string">
            <text:p text:style-name="Table_20_Contents"><text:span text:style-name="Strong_20_Emphasis">12 chars</text:span></text:p>
          </table:table-cell>
          <table:table-cell table:style-name="Table12.A1" office:value-type="string">
            <text:p text:style-name="Table_20_Contents">Good for most European languages</text:p>
          </table:table-cell>
        </table:table-row>
        <table:table-row>
          <table:table-cell table:style-name="Table12.A1" office:value-type="string">
            <text:p text:style-name="Table_20_Contents"><text:span text:style-name="Strong_20_Emphasis">14 chars</text:span></text:p>
          </table:table-cell>
          <table:table-cell table:style-name="Table12.A1" office:value-type="string">
            <text:p text:style-name="Table_20_Contents">Safe even for German, Polish, Swedish</text:p>
          </table:table-cell>
        </table:table-row>
      </table:table>
      <text:p text:style-name="P51"><text:span text:style-name="T28">✅ </text:span><text:span text:style-name="Strong_20_Emphasis"><text:span text:style-name="T30">Best universal compromise: 12 characters</text:span></text:span></text:p>
      <text:p text:style-name="Standard"><text:span text:style-name="T71">This usually keeps </text:span><text:span text:style-name="Strong_20_Emphasis"><text:span text:style-name="T71">&gt;90–95% of entries unique </text:span></text:span><text:span text:style-name="T71">across European languages. </text:span><text:span text:style-name="T78">In a mixed environment we can expect </text:span><text:span text:style-name="T79">the cache to be </text:span><text:span text:style-name="T78">under 8MB. </text:span></text:p>
      <text:p text:style-name="Standard"><text:span text:style-name="T50"/></text:p>
      <text:p text:style-name="P42">Memory Layout Optimization</text:p>
      <text:list text:style-name="L10">
        <text:list-item>
          <text:p text:style-name="P145"><text:span text:style-name="Strong_20_Emphasis"><text:span text:style-name="T71">Phrase queries </text:span></text:span><text:span text:style-name="T71">(term A followed by term B within distance d) become a </text:span><text:span text:style-name="Strong_20_Emphasis"><text:span text:style-name="T71">merge of two contiguous array slices </text:span></text:span><text:span text:style-name="T71">— elegant and cache-friendly</text:span></text:p>
        </text:list-item>
        <text:list-item>
          <text:p text:style-name="P145"><text:span text:style-name="Strong_20_Emphasis"><text:span text:style-name="T71">Co-occurrence statistics </text:span></text:span><text:span text:style-name="T71">can be computed with a single sequential pass</text:span></text:p>
        </text:list-item>
        <text:list-item>
          <text:p text:style-name="P145"><text:span text:style-name="Strong_20_Emphasis"><text:span text:style-name="T71">Compression </text:span></text:span><text:span text:style-name="T71">(delta encoding on doc_ids, positions) works extremely well on sorted runs — better than inverted index compression in many cases</text:span></text:p>
        </text:list-item>
        <text:list-item>
          <text:p text:style-name="P145"><text:soft-page-break/><text:span text:style-name="T50">The whole structure is </text:span><text:span text:style-name="Strong_20_Emphasis"><text:span text:style-name="T50">memory-mappable</text:span></text:span><text:span text:style-name="T50">— OS handles paging, no custom buffer pool needed</text:span></text:p>
        </text:list-item>
      </text:list>
      <text:p text:style-name="P24"/>
      <text:p text:style-name="P36">Field/Path complexity <text:span text:style-name="T202">for Lexical Search</text:span>. Looking at<text:span text:style-name="T30"> TEI P5 guidelines as an extreme example with a very large vocabulary.</text:span></text:p>
      <text:list text:style-name="L11">
        <text:list-item>
          <text:p text:style-name="P146"><text:span text:style-name="Strong_20_Emphasis"><text:span text:style-name="T71">~600+ distinct elements (tags) </text:span></text:span><text:span text:style-name="T71">in the full schema</text:span></text:p>
        </text:list-item>
        <text:list-item>
          <text:p text:style-name="P146"><text:span text:style-name="Strong_20_Emphasis"><text:span text:style-name="T143">~250–300 attributes</text:span></text:span></text:p>
        </text:list-item>
        <text:list-item>
          <text:p text:style-name="P120">Elements are grouped into modules (core, header, verse, drama, manuscript description, dictionaries, etc.)</text:p>
        </text:list-item>
      </text:list>
      <text:p text:style-name="Standard"><text:span text:style-name="T71">However, </text:span><text:span text:style-name="Strong_20_Emphasis"><text:span text:style-name="T71">no real TEI file uses all of them</text:span></text:span><text:span text:style-name="T71">. </text:span><text:span text:style-name="T80">No more than </text:span><text:span text:style-name="Strong_20_Emphasis"><text:span text:style-name="T61">100–200 distinct tags </text:span></text:span><text:span text:style-name="T61">is common in a complex scholarly TEI document.</text:span></text:p>
      <text:p text:style-name="P36"/>
      <text:p text:style-name="P36">Typical ranges seen in TEI corpora:</text:p>
      <table:table table:name="Table13" table:style-name="Table13">
        <table:table-column table:style-name="Table13.A"/>
        <table:table-column table:style-name="Table13.B"/>
        <table:table-header-rows>
          <table:table-row>
            <table:table-cell table:style-name="Table13.A1" office:value-type="string">
              <text:p text:style-name="Table_20_Heading">Project complexity</text:p>
            </table:table-cell>
            <table:table-cell table:style-name="Table13.A1" office:value-type="string">
              <text:p text:style-name="Table_20_Heading">Unique paths</text:p>
            </table:table-cell>
          </table:table-row>
        </table:table-header-rows>
        <table:table-row>
          <table:table-cell table:style-name="Table13.A1" office:value-type="string">
            <text:p text:style-name="Table_20_Contents">Basic TEI text</text:p>
          </table:table-cell>
          <table:table-cell table:style-name="Table13.A1" office:value-type="string">
            <text:p text:style-name="Table_20_Contents">100–300</text:p>
          </table:table-cell>
        </table:table-row>
        <table:table-row>
          <table:table-cell table:style-name="Table13.A1" office:value-type="string">
            <text:p text:style-name="Table_20_Contents">Scholarly edition</text:p>
          </table:table-cell>
          <table:table-cell table:style-name="Table13.A1" office:value-type="string">
            <text:p text:style-name="Table_20_Contents">300–800</text:p>
          </table:table-cell>
        </table:table-row>
        <table:table-row>
          <table:table-cell table:style-name="Table13.A1" office:value-type="string">
            <text:p text:style-name="Table_20_Contents">Rich digital humanities corpus</text:p>
          </table:table-cell>
          <table:table-cell table:style-name="Table13.A1" office:value-type="string">
            <text:p text:style-name="Table_20_Contents">800–1500</text:p>
          </table:table-cell>
        </table:table-row>
        <table:table-row>
          <table:table-cell table:style-name="Table13.A1" office:value-type="string">
            <text:p text:style-name="Table_20_Contents">Large TEI aggregation</text:p>
          </table:table-cell>
          <table:table-cell table:style-name="Table13.A1" office:value-type="string">
            <text:p text:style-name="Table_20_Contents">1500–3000+</text:p>
          </table:table-cell>
        </table:table-row>
      </table:table>
      <text:p text:style-name="P51"><text:span text:style-name="T30">So a </text:span><text:span text:style-name="Strong_20_Emphasis"><text:span text:style-name="T30">single complex TEI document might easily have ~300–800 unique paths</text:span></text:span><text:span text:style-name="T30">.</text:span></text:p>
      <text:p text:style-name="P47">There are, of course, more complex document models than TEI.</text:p>
      <text:h text:style-name="Heading_20_3" text:outline-level="3"><text:span text:style-name="T30"><text:s/></text:span><text:span text:style-name="T71">JATS (Journal Article Tag Suite)</text:span></text:h>
      <text:list text:style-name="L12">
        <text:list-item>
          <text:list>
            <text:list-item>
              <text:p text:style-name="P121">Used by PubMed Central.</text:p>
            </text:list-item>
            <text:list-item>
              <text:p text:style-name="P121">Very deep citation, funding, and metadata structures.</text:p>
            </text:list-item>
            <text:list-item>
              <text:p text:style-name="P147"><text:span text:style-name="T71">Often </text:span><text:span text:style-name="Strong_20_Emphasis"><text:span text:style-name="T71">200+ tags per article</text:span></text:span><text:span text:style-name="T71">.</text:span></text:p>
            </text:list-item>
          </text:list>
        </text:list-item>
      </text:list>
      <text:h text:style-name="P86" text:outline-level="3">HL7 Clinical Document Architecture</text:h>
      <text:p text:style-name="Standard"><text:tab/><text:span text:style-name="T143">One of the most complex real-world XML standards.</text:span></text:p>
      <text:list text:style-name="L13">
        <text:list-item>
          <text:list>
            <text:list-item>
              <text:p text:style-name="P122">massive schema</text:p>
            </text:list-item>
            <text:list-item>
              <text:p text:style-name="P122">heavy metadata</text:p>
            </text:list-item>
            <text:list-item>
              <text:p text:style-name="P122">controlled vocabularies</text:p>
            </text:list-item>
            <text:list-item>
              <text:p text:style-name="P122">deep nesting</text:p>
            </text:list-item>
          </text:list>
        </text:list-item>
      </text:list>
      <text:p text:style-name="Standard"><text:span text:style-name="T71"><text:tab/>Often </text:span><text:span text:style-name="Strong_20_Emphasis"><text:span text:style-name="T71">thousands of unique paths</text:span></text:span><text:span text:style-name="T71"> across medical documents.</text:span></text:p>
      <text:h text:style-name="P86" text:outline-level="3">Legal XML / Akoma Ntoso</text:h>
      <text:p text:style-name="P36"><text:tab/>Extremely complex legislative documents:</text:p>
      <text:list text:style-name="L14">
        <text:list-item>
          <text:list>
            <text:list-item>
              <text:p text:style-name="P123">hierarchical law structures</text:p>
            </text:list-item>
            <text:list-item>
              <text:p text:style-name="P123">cross references</text:p>
            </text:list-item>
            <text:list-item>
              <text:p text:style-name="P123">amendments</text:p>
            </text:list-item>
            <text:list-item>
              <text:p text:style-name="P123">semantic tagging</text:p>
            </text:list-item>
          </text:list>
        </text:list-item>
      </text:list>
      <text:p text:style-name="P65"><text:span text:style-name="T151"/></text:p>
      <text:p text:style-name="P65"><text:span text:style-name="T151">With current hardware in 2026, fast binary search, in </text:span><text:span text:style-name="T152">absolute </text:span><text:span text:style-name="T151">worst case, over 800 memory mapped files is still relatively performant: </text:span><text:span text:style-name="T88">O(N log</text:span><text:span text:style-name="T89">(</text:span><text:span text:style-name="T88">M</text:span><text:span text:style-name="T89">)</text:span><text:span text:style-name="T88">)</text:span><text:span text:style-name="T30"> </text:span><text:span text:style-name="T81">where N is the number of indexes (here 800) and M is the maximum number of items in each. But since the indexes are sorted it is more typically:</text:span><text:span text:style-name="T89"> O(log(NM))</text:span></text:p>
      <text:p text:style-name="P27"/>
      <text:p text:style-name="P28">Most <text:span text:style-name="T202">path </text:span>searches will be into just a few fields (tags) or paths whence a fast binary search in just a few memory mapped and cached file<text:span text:style-name="T202">s</text:span>. <text:span text:style-name="T202">As noted above: DDR5 random access ~75ns, L3 ~10ns — negligible.</text:span></text:p>
      <text:p text:style-name="P28"/>
      <text:p text:style-name="P36">Key Considerations:</text:p>
      <text:list text:style-name="L15">
        <text:list-item>
          <text:p text:style-name="P124"><text:span text:style-name="T204">Mapping </text:span>requires system calls (open + mmap) to map a file into the process's virtual address space. If the file's metadata is already in the OS page cache, the open() call is exceptionally fast.</text:p>
        </text:list-item>
      </text:list>
      <text:list text:style-name="L16">
        <text:list-item>
          <text:p text:style-name="P125"><text:soft-page-break/>High-Speed Storage (NVMe/Storage Class Memory): The cost of the page fault is increasingly determined by the latency of the underlying SSD, which is extremely fast on modern systems. </text:p>
        </text:list-item>
        <text:list-item>
          <text:p text:style-name="P125">64-Bit Addressing: There is virtually no limit on mapping file sizes on 64-bit systems. </text:p>
          <text:list>
            <text:list-item>
              <text:p text:style-name="P125">Cached Performance: If the file is already in the page cache, the mmap() overhead is minimal </text:p>
            </text:list-item>
          </text:list>
        </text:list-item>
        <text:list-item>
          <text:p text:style-name="P125"><text:span text:style-name="T195">VMA Limits: </text:span><text:span text:style-name="T196">While </text:span><text:span text:style-name="T195">Linux has a default limit on the number of memory map areas a single process can have (vm.max_map_count, often 65,530) </text:span><text:span text:style-name="T196">this is well below max fields/paths.</text:span></text:p>
        </text:list-item>
        <text:list-item>
          <text:p text:style-name="P125"><text:span text:style-name="T196">The Unix kernel's page cache manages memory-mapped files lazily.</text:span><text:span text:style-name="T195"> </text:span></text:p>
        </text:list-item>
        <text:list-item>
          <text:p text:style-name="P125">Metadata Efficiency: The OS is very efficient at opening a few files as needed. </text:p>
        </text:list-item>
      </text:list>
      <text:list text:style-name="L17">
        <text:list-item>
          <text:p text:style-name="P126">By mapping only the files <text:span text:style-name="T203">(</text:span><text:span text:style-name="T204">lazily </text:span><text:span text:style-name="T203">on demand) as they are</text:span> actually <text:span text:style-name="T204">needed we improve, <text:s/>given how the kernel uses variations of LRU to manage the page cache, efficiency.</text:span></text:p>
        </text:list-item>
      </text:list>
      <text:p text:style-name="P45"><text:s/></text:p>
      <text:p text:style-name="P77"><text:span text:style-name="T95">T</text:span><text:span text:style-name="T97">he advantage of the this approach is that memory demands don’t spiral out of control even with an “excessive” number of fields. <text:s/>Since </text:span><text:span text:style-name="T96">Core</text:span><text:span text:style-name="T97">Quarry only maps (using a LRU heuristic) the fields being searched memory demands for searches is modest. During index the number of fields/paths has no impact on consumption since indexing buffers are pre-defined irrespective of their numbers—relevant only to the maximum size of an individual document.</text:span></text:p>
      <text:p text:style-name="P72"><text:span text:style-name="T164"/></text:p>
      <text:p text:style-name="P6"><text:span text:style-name="T220">Appendix </text:span><text:span text:style-name="T221">I</text:span><text:span text:style-name="T220">I: </text:span><text:span text:style-name="T222">Wh</text:span><text:span text:style-name="T223">at is different?</text:span></text:p>
      <text:p text:style-name="P46"><text:span text:style-name="T121"/></text:p>
      <text:p text:style-name="P36"><text:span text:style-name="T113">7</text:span><text:span text:style-name="T111">0% of Retrieval-Augmented Generation (RAG) systems fail in production</text:span><text:span text:style-name="T111"><text:note text:id="ftn1" text:note-class="footnote"><text:note-citation>1</text:note-citation><text:note-body><text:p text:style-name="Footnote"><text:a xlink:type="simple" xlink:href="https://python.plainenglish.io/why-70-of-rag-implementations-fail-and-the-6-things-that-separate-production-grade-systems-97501c11b682" text:style-name="Internet_20_link" text:visited-style-name="Visited_20_Internet_20_Link">https://python.plainenglish.io/why-70-of-rag-implementations-fail-and-the-6-things-that-separate-production-grade-systems-97501c11b682</text:a></text:p></text:note-body></text:note></text:span><text:span text:style-name="T111">. </text:span><text:span text:style-name="T114">They mostly </text:span><text:span text:style-name="T111">fail at retrieval, not generation. </text:span><text:span text:style-name="T112">The main issues are 1) context mismatch (chunking) 2) semantic collapse</text:span><text:span text:style-name="T112"><text:note text:id="ftn2" text:note-class="footnote"><text:note-citation>2</text:note-citation><text:note-body><text:p text:style-name="Footnote"><text:a xlink:type="simple" xlink:href="https://dho.stanford.edu/wp-content/uploads/Legal_RAG_Hallucinations.pdf" text:style-name="Internet_20_link" text:visited-style-name="Visited_20_Internet_20_Link">https://dho.stanford.edu/wp-content/uploads/Legal_RAG_Hallucinations.pdf</text:a></text:p></text:note-body></text:note></text:span><text:span text:style-name="T112"> 3) drift.</text:span></text:p>
      <text:p text:style-name="P46"><text:span text:style-name="T121">H</text:span><text:span text:style-name="T115">andling semantic drift is a "missing link" for Retrieval-Augmented Generation (RAG) systems because it represents the silent degradation of retrieval accuracy over time, turning previously reliable AI systems into sources of outdated or conflicting information. As enterprise data evolves, the "meaning-space" of the vector database shifts, causing embeddings of new documents to diverge from old ones, or queries to no longer align with stored knowledge. </text:span><text:span text:style-name="T117">When a RAG system is updated with new documents without re-embedding old data or retraining the retriever, it creates a "single vector index" with mixed, conflicting, and divergent semantic contexts, known as </text:span><text:span text:style-name="Strong_20_Emphasis"><text:span text:style-name="T118">Knowledge Drift</text:span></text:span><text:span text:style-name="T117">.</text:span></text:p>
      <text:p text:style-name="P46"><text:span text:style-name="T117"/></text:p>
      <text:p text:style-name="Standard">Unlike a traditional code error that breaks a system, <text:s/>drift causes the RAG system to continue operating, but with silently declining accuracy. This degrades trust as the system provides subtly outdated or irrelevant information.</text:p>
      <text:p text:style-name="Standard"/>
      <text:p text:style-name="P72">To address <text:span text:style-name="T214">these issues</text:span>, <text:span text:style-name="T213">DeepQuarry </text:span><text:span text:style-name="T216">(R&amp;D),</text:span><text:span text:style-name="T213"> implements:</text:span></text:p>
      <text:list text:style-name="L18">
        <text:list-item>
          <text:p text:style-name="P148"><text:span text:style-name="Strong_20_Emphasis"><text:span text:style-name="T105">Continuous Monitor</text:span></text:span><text:span text:style-name="Strong_20_Emphasis"><text:span text:style-name="T106">ing</text:span></text:span><text:span text:style-name="Strong_20_Emphasis"><text:span text:style-name="T105">: </text:span></text:span><text:span text:style-name="Strong_20_Emphasis"><text:span text:style-name="T90">Actively monitoring for "Retrieval Misses" and using specialized metrics to detect drift.</text:span></text:span></text:p>
        </text:list-item>
        <text:list-item>
          <text:p text:style-name="P148"><text:span text:style-name="Strong_20_Emphasis"><text:span text:style-name="T108">Semantic Segmentation:</text:span></text:span><text:span text:style-name="Strong_20_Emphasis"><text:span text:style-name="T102"> segmenting data into more coherent semantic clusters working backwards from detected drift</text:span></text:span></text:p>
        </text:list-item>
        <text:list-item>
          <text:p text:style-name="P148"><text:span text:style-name="Strong_20_Emphasis"><text:span text:style-name="T105">Incremental Updating: </text:span></text:span><text:span text:style-name="T90">Re-indexing or re-embedding data with updated models.</text:span></text:p>
        </text:list-item>
        <text:list-item>
          <text:p text:style-name="P148"><text:span text:style-name="Strong_20_Emphasis"><text:span text:style-name="T105">Hybrid Search: </text:span></text:span><text:span text:style-name="T90">Combining semantic vector search with keyword search to catch specific, updated terminology that embeddings might miss.</text:span></text:p>
        </text:list-item>
        <text:list-item>
          <text:p text:style-name="P148"><text:span text:style-name="Strong_20_Emphasis"><text:span text:style-name="T105">Semantic Chunking: </text:span></text:span><text:span text:style-name="T90">Breaking down documents based on logical structure (not arbitrary character counts) to maintain the semantic integrity of each segment. </text:span><text:span text:style-name="T94">The basic concept is that the explicit and implicit structure of documents anchors context.</text:span></text:p>
        </text:list-item>
        <text:list-item>
          <text:p text:style-name="P149"><text:span text:style-name="T107">Semantic indexes by field and sharding</text:span><text:span text:style-name="T90">: this avoids the network getting too crowded. When everything is thrown into a single pile the evidence is that starting as early as with 10k documents things start to fall part. The architecture implemented in </text:span><text:span text:style-name="T96">Core</text:span><text:span text:style-name="T90">Quarry vastly extends the document capacity.</text:span></text:p>
        </text:list-item>
      </text:list>
      <text:p text:style-name="P4"/>
      <text:p text:style-name="P3">Appendix <text:span text:style-name="T215">II</text:span>I: Competitive Landscape</text:p>
      <text:p text:style-name="P37"><text:span text:style-name="T33">Our</text:span><text:span text:style-name="T32"> architecture </text:span><text:span text:style-name="T33">uniquely </text:span><text:span text:style-name="T32">overlaps </text:span><text:span text:style-name="Strong_20_Emphasis"><text:span text:style-name="T31">three domains simultaneously</text:span></text:span><text:span text:style-name="T32">:</text:span></text:p>
      <text:section text:style-name="Sect1" text:name="Section3">
        <text:p text:style-name="P60"><text:s text:c="8"/>vector DBs</text:p>
        <text:p text:style-name="P54"><text:s text:c="11"/>▲</text:p>
        <text:p text:style-name="P54"><text:s text:c="11"/>│</text:p>
        <text:p text:style-name="P54"><text:s/><text:span text:style-name="T188">IR engines ─── structured document DBs</text:span></text:p>
      </text:section>
      <text:p text:style-name="P34"/>
      <text:p text:style-name="P34">The<text:span text:style-name="T187"> engine has several advantages commercially:</text:span></text:p>
      <text:list text:style-name="L19">
        <text:list-item>
          <text:p text:style-name="P150"><text:span text:style-name="T64">runs </text:span><text:span text:style-name="T65">l</text:span><text:span text:style-name="Strong_20_Emphasis"><text:span text:style-name="T64">ocally</text:span></text:span></text:p>
        </text:list-item>
        <text:list-item>
          <text:p text:style-name="P150"><text:span text:style-name="Strong_20_Emphasis"><text:span text:style-name="T145">small footprint</text:span></text:span></text:p>
        </text:list-item>
        <text:list-item>
          <text:p text:style-name="P150"><text:span text:style-name="Strong_20_Emphasis"><text:span text:style-name="T145">high performance</text:span></text:span></text:p>
        </text:list-item>
        <text:list-item>
          <text:p text:style-name="P150"><text:span text:style-name="Strong_20_Emphasis"><text:span text:style-name="T145">hybrid retrieval</text:span></text:span></text:p>
        </text:list-item>
        <text:list-item>
          <text:p text:style-name="P150"><text:span text:style-name="Strong_20_Emphasis"><text:span text:style-name="T145">structured document awareness</text:span></text:span></text:p>
        </text:list-item>
      </text:list>
      <text:p text:style-name="P56"><text:span text:style-name="Strong_20_Emphasis"><text:span text:style-name="T46"/></text:span></text:p>
      <text:p text:style-name="P56"><text:span text:style-name="Strong_20_Emphasis"><text:span text:style-name="T46"/></text:span></text:p>
      <text:p text:style-name="P56"><text:span text:style-name="Strong_20_Emphasis"><text:span text:style-name="T46"/></text:span></text:p>
      <text:p text:style-name="P56"><text:span text:style-name="Strong_20_Emphasis"><text:span text:style-name="T46">Right now, RAG infrastructure is mostly:</text:span></text:span></text:p>
      <text:section text:style-name="Sect1" text:name="Section1">
        <text:p text:style-name="P50"><text:bookmark text:name="code-block-viewer"/><text:s text:c="10"/>LLM</text:p>
        <text:p text:style-name="P53"><text:s text:c="11"/>↓</text:p>
        <text:p text:style-name="P52"><text:s text:c="9"/>vector DB</text:p>
        <text:p text:style-name="P53"><text:s text:c="11"/>↓</text:p>
        <text:p text:style-name="P52"><text:s text:c="6"/>chunked documents</text:p>
      </text:section>
      <text:p text:style-name="P57"><text:span text:style-name="T34"/></text:p>
      <text:p text:style-name="P57"><text:span text:style-name="T71">This architecture is </text:span><text:span text:style-name="Strong_20_Emphasis"><text:span text:style-name="T71">deeply flawed</text:span></text:span><text:span text:style-name="T71">. </text:span><text:span text:style-name="T82">Instead </text:span><text:span text:style-name="T83">or model</text:span><text:span text:style-name="T82">:</text:span></text:p>
      <text:section text:style-name="Sect1" text:name="Section2">
        <text:p text:style-name="P50"><text:bookmark text:name="code-block-viewer Copy 1"/><text:s text:c="10"/>LLM</text:p>
        <text:p text:style-name="P53"><text:s text:c="11"/>↓</text:p>
        <text:p text:style-name="P52"><text:s text:c="7"/><text:span text:style-name="T216">Core</text:span>Quarry</text:p>
        <text:p text:style-name="P52">(structural + lexical + vector)</text:p>
      </text:section>
      <text:p text:style-name="P57"><text:span text:style-name="T30"/></text:p>
      <text:p text:style-name="P57"><text:span text:style-name="T30">If positioned correctly, it could </text:span><text:span text:style-name="T35">disrupt the market </text:span><text:span text:style-name="T30">become </text:span><text:span text:style-name="Strong_20_Emphasis"><text:span text:style-name="T30">the retrieval layer for local AI systems</text:span></text:span><text:span text:style-name="T30">. </text:span></text:p>
      <text:h text:style-name="P87" text:outline-level="3" text:is-list-header="true"><text:span text:style-name="T189">1) </text:span><text:span text:style-name="T193">PRIMARY </text:span>Direct Competitors (combining lexical + vector search)</text:h>
      <text:p text:style-name="P24">Elasticsearch</text:p>
      <text:list text:style-name="L20">
        <text:list-item>
          <text:p text:style-name="P101"><text:s/>Lucene-based</text:p>
        </text:list-item>
        <text:list-item>
          <text:p text:style-name="P101"><text:s/>supports BM25 + vector search</text:p>
        </text:list-item>
        <text:list-item>
          <text:p text:style-name="P101"><text:s/>widely used in RAG stacks</text:p>
        </text:list-item>
      </text:list>
      <text:p text:style-name="P24"><text:span text:style-name="T187">Comparative Weakness</text:span>:</text:p>
      <text:list text:style-name="L21">
        <text:list-item>
          <text:p text:style-name="P102"><text:s/>poor structural awareness</text:p>
        </text:list-item>
        <text:list-item>
          <text:p text:style-name="P102"><text:s/>heavy infrastructure</text:p>
        </text:list-item>
        <text:list-item>
          <text:p text:style-name="P102"><text:s/>BM25-centric ranking</text:p>
        </text:list-item>
        <text:list-item>
          <text:p text:style-name="P103"><text:s/>Written in Java</text:p>
        </text:list-item>
        <text:list-item>
          <text:p text:style-name="P103"><text:s/>Triple license / AGPL</text:p>
        </text:list-item>
      </text:list>
      <text:p text:style-name="Standard"/>
      <text:p text:style-name="Standard"/>
      <text:p text:style-name="P24">OpenSearch</text:p>
      <text:p text:style-name="P24"><text:tab/>Fork of Elasticsearch.</text:p>
      <text:p text:style-name="P24">Weakness:</text:p>
      <text:list text:style-name="L22">
        <text:list-item>
          <text:p text:style-name="P105">same Lucene constraints</text:p>
        </text:list-item>
      </text:list>
      <text:p text:style-name="Standard"/>
      <text:p text:style-name="P24"><text:soft-page-break/>Weaviate</text:p>
      <text:list text:style-name="L23">
        <text:list-item>
          <text:p text:style-name="P106"><text:s/>hybrid search</text:p>
        </text:list-item>
        <text:list-item>
          <text:p text:style-name="P106"><text:s/>object store</text:p>
        </text:list-item>
        <text:list-item>
          <text:p text:style-name="P106"><text:s/>semantic queries</text:p>
        </text:list-item>
        <text:list-item>
          <text:p text:style-name="P104"><text:s/>BSD 3-Clause license. <text:s/></text:p>
        </text:list-item>
      </text:list>
      <text:p text:style-name="P24">Weakness:</text:p>
      <text:list text:style-name="L24">
        <text:list-item>
          <text:p text:style-name="P107"><text:s/>vectors first</text:p>
        </text:list-item>
        <text:list-item>
          <text:p text:style-name="P107"><text:s/>weak lexical IR</text:p>
        </text:list-item>
        <text:list-item>
          <text:p text:style-name="P107"><text:s/>heavy infrastructure</text:p>
        </text:list-item>
        <text:list-item>
          <text:p text:style-name="P151"><text:span text:style-name="T150"><text:s/></text:span><text:span text:style-name="T155">written in Go. </text:span><text:span text:style-name="T132">This means some memory is not immediately available for reuse when it is no longer needed.</text:span></text:p>
        </text:list-item>
      </text:list>
      <text:p text:style-name="Standard"/>
      <text:p text:style-name="P24">Qdrant</text:p>
      <text:list text:style-name="L25">
        <text:list-item>
          <text:p text:style-name="P108"><text:s/>fast ANN <text:span text:style-name="T208">(HNSW)</text:span></text:p>
        </text:list-item>
        <text:list-item>
          <text:p text:style-name="P108"><text:s/>filtering</text:p>
        </text:list-item>
        <text:list-item>
          <text:p text:style-name="P108"><text:s/><text:span text:style-name="T208">Apache 2.0</text:span></text:p>
        </text:list-item>
      </text:list>
      <text:p text:style-name="P24">Weakness:</text:p>
      <text:list text:style-name="L26">
        <text:list-item>
          <text:p text:style-name="P109"><text:s/>minimal lexical search</text:p>
        </text:list-item>
        <text:list-item>
          <text:p text:style-name="P109"><text:s/>no structural IR</text:p>
        </text:list-item>
      </text:list>
      <text:p text:style-name="Standard"/>
      <text:p text:style-name="P24">Milvus</text:p>
      <text:p text:style-name="P68"><text:span text:style-name="T136">H</text:span><text:span text:style-name="T134">eavily-modified </text:span><text:span text:style-name="T135">forks</text:span><text:span text:style-name="T133"> </text:span><text:span text:style-name="T134">of third-party open source </text:span><text:a xlink:type="simple" xlink:href="https://en.wikipedia.org/wiki/Similarity_search" text:style-name="Internet_20_link" text:visited-style-name="Visited_20_Internet_20_Link">s</text:a><text:span text:style-name="T135">imilarity search</text:span><text:span text:style-name="T133"> </text:span><text:span text:style-name="T134">libraries, such as </text:span><text:span text:style-name="T135">FAISS, DiskANN and HNSWlib.</text:span></text:p>
      <text:list text:style-name="L27">
        <text:list-item>
          <text:p text:style-name="P118"><text:span text:style-name="T210"><text:s/>large-scale vector DB </text:span><text:span text:style-name="T211">(</text:span><text:span text:style-name="T119">Kubernetes </text:span><text:span text:style-name="T211">clusters)</text:span></text:p>
        </text:list-item>
        <text:list-item>
          <text:p text:style-name="P110"><text:s/><text:span text:style-name="T208">Apache 2.0</text:span></text:p>
        </text:list-item>
      </text:list>
      <text:p text:style-name="P24">Weakness</text:p>
      <text:list text:style-name="L28">
        <text:list-item>
          <text:p text:style-name="P111"><text:s/>not really a document retrieval engine</text:p>
        </text:list-item>
      </text:list>
      <text:p text:style-name="P24"/>
      <text:p text:style-name="Horizontal_20_Line"/>
      <text:h text:style-name="P88" text:outline-level="3" text:is-list-header="true"><text:span text:style-name="T189">2) <text:s/></text:span><text:span text:style-name="T190">CLASSICAL</text:span><text:span text:style-name="T29"> IR S</text:span><text:span text:style-name="T44">YSTEMS</text:span></text:h>
      <text:p text:style-name="Standard">Apache Lucene</text:p>
      <text:p text:style-name="Standard">The foundation for:</text:p>
      <text:list text:style-name="L29">
        <text:list-item>
          <text:p text:style-name="P152"><text:s/>Elasticsearch</text:p>
        </text:list-item>
        <text:list-item>
          <text:p text:style-name="P152"><text:s/>Solr</text:p>
        </text:list-item>
        <text:list-item>
          <text:p text:style-name="P152"><text:s/>OpenSearch</text:p>
        </text:list-item>
      </text:list>
      <text:p text:style-name="P36">Weakness:</text:p>
      <text:list text:style-name="L30">
        <text:list-item>
          <text:p text:style-name="P112"><text:s/>Java (written entirely in Java). </text:p>
        </text:list-item>
        <text:list-item>
          <text:p text:style-name="P113"><text:s/>inverted index constraints</text:p>
        </text:list-item>
        <text:list-item>
          <text:p text:style-name="P114"><text:s/>comparatively limited boolean model</text:p>
        </text:list-item>
        <text:list-item>
          <text:p text:style-name="P114"><text:s/>BM25-centric scoring</text:p>
        </text:list-item>
        <text:list-item>
          <text:p text:style-name="P114"><text:s/>limited structural awareness</text:p>
        </text:list-item>
        <text:list-item>
          <text:p text:style-name="P114"><text:s/>is resource hungry.</text:p>
        </text:list-item>
        <text:list-item>
          <text:p text:style-name="P136"><text:s/>Lucene writes new data to new, immutable segments, which are merged later. Merging is a resource-intensive, slow process.</text:p>
        </text:list-item>
        <text:list-item>
          <text:p text:style-name="P153"><text:span text:style-name="Strong_20_Emphasis"><text:span text:style-name="T101"><text:s/>Deep paging limits: </text:span></text:span><text:span text:style-name="T101">Standard paging is inefficient for deep searches, often limited to the first 10,000 documents to prevent cluster instability.</text:span></text:p>
        </text:list-item>
      </text:list>
      <text:p text:style-name="P36"/>
      <text:p text:style-name="P36">Apache Solr</text:p>
      <text:p text:style-name="P36"><text:tab/>Enterprise Lucene server.</text:p>
      <text:p text:style-name="P36">Weakness</text:p>
      <text:list text:style-name="L31">
        <text:list-item>
          <text:p text:style-name="P127"><text:soft-page-break/><text:s/>heavy</text:p>
        </text:list-item>
        <text:list-item>
          <text:p text:style-name="P127"><text:s/>poor hybrid semantic search</text:p>
        </text:list-item>
      </text:list>
      <text:p text:style-name="Standard"/>
      <text:p text:style-name="P70">Tantivity</text:p>
      <text:p text:style-name="P29"><text:span text:style-name="T212">F</text:span><text:span text:style-name="T128">ollows Lucene's fundamental architecture and algorithms, including </text:span><text:span text:style-name="T129">BM25 </text:span><text:span text:style-name="T128">scoring and similar indexing strategies, but takes advantage of Rust's memory safety and performance characteristics.</text:span></text:p>
      <text:list text:continue-numbering="true" text:style-name="L31">
        <text:list-item>
          <text:p text:style-name="P128"><text:span text:style-name="T209"><text:s/></text:span><text:span text:style-name="T212">Faster than Lucene</text:span></text:p>
        </text:list-item>
        <text:list-item>
          <text:p text:style-name="P129"><text:s/>MIT license </text:p>
        </text:list-item>
      </text:list>
      <text:p text:style-name="P69">Weakness</text:p>
      <text:list xml:id="list114456003915664" text:continue-numbering="true" text:style-name="L31">
        <text:list-item>
          <text:p text:style-name="P154"><text:span text:style-name="T130"><text:s/></text:span><text:span text:style-name="T131">many like Lucene</text:span></text:p>
        </text:list-item>
      </text:list>
      <text:p text:style-name="Standard"/>
      <text:h text:style-name="P85" text:outline-level="3" text:is-list-header="true">Xapian</text:h>
      <text:p text:style-name="Standard"><text:tab/>Interesting academically <text:span text:style-name="T212">(long history)</text:span> but not hybrid.</text:p>
      <text:p text:style-name="Standard">Weakness</text:p>
      <text:list text:continue-numbering="true" text:style-name="L31">
        <text:list-item>
          <text:p text:style-name="P155"><text:s/>inverted index</text:p>
        </text:list-item>
        <text:list-item>
          <text:p text:style-name="P155"><text:s/>GPL license</text:p>
        </text:list-item>
      </text:list>
      <text:p text:style-name="P67"/>
      <text:p text:style-name="P67"/>
      <text:h text:style-name="P91" text:outline-level="3" text:is-list-header="true"><text:span text:style-name="T1">3</text:span><text:span text:style-name="T2">) </text:span><text:span text:style-name="T1">Vector Search Engines</text:span></text:h>
      <text:p text:style-name="P36">FAISS</text:p>
      <text:p text:style-name="P36">Very fast but:</text:p>
      <text:list text:style-name="L32">
        <text:list-item>
          <text:p text:style-name="P130">vectors only</text:p>
        </text:list-item>
        <text:list-item>
          <text:p text:style-name="P130">no document model</text:p>
        </text:list-item>
      </text:list>
      <text:p text:style-name="P38">Weakness:</text:p>
      <text:p text:style-name="P38"><text:tab/>Slower than Quarry</text:p>
      <text:p text:style-name="Standard"/>
      <text:p text:style-name="Standard"/>
      <text:p text:style-name="P36">ScaNN</text:p>
      <text:p text:style-name="P36"><text:tab/>Google ANN system.</text:p>
      <text:p text:style-name="Standard"/>
      <text:p text:style-name="P36">HNSWlib</text:p>
      <text:p text:style-name="P36"><text:tab/>ANN library only. <text:span text:style-name="T191">The is the starting code basis for the HNSW layer.</text:span></text:p>
      <text:p text:style-name="P44"/>
      <text:p text:style-name="Horizontal_20_Line"/>
      <text:h text:style-name="Heading_20_3" text:outline-level="3" text:is-list-header="true"><text:span text:style-name="T1">4</text:span><text:span text:style-name="T3">)</text:span><text:span text:style-name="T1"> Structured Document Databases</text:span></text:h>
      <text:p text:style-name="P36">MarkLogic</text:p>
      <text:p text:style-name="Standard"><text:span text:style-name="T71"><text:tab/>This is probably the </text:span><text:span text:style-name="Strong_20_Emphasis"><text:span text:style-name="T71">closest philosophical competitor</text:span></text:span><text:span text:style-name="T71">.</text:span></text:p>
      <text:p text:style-name="P36">Features</text:p>
      <text:list text:style-name="L33">
        <text:list-item>
          <text:p text:style-name="P131">XML aware</text:p>
        </text:list-item>
        <text:list-item>
          <text:p text:style-name="P131">structural queries</text:p>
        </text:list-item>
        <text:list-item>
          <text:p text:style-name="P131">strong IR</text:p>
        </text:list-item>
      </text:list>
      <text:p text:style-name="P36">But:</text:p>
      <text:list text:style-name="L34">
        <text:list-item>
          <text:p text:style-name="P132">extremely heavy enterprise system</text:p>
        </text:list-item>
        <text:list-item>
          <text:p text:style-name="P132">not local-first</text:p>
        </text:list-item>
        <text:list-item>
          <text:p text:style-name="P165">not optimized for RAG</text:p>
        </text:list-item>
      </text:list>
      <text:p text:style-name="P36">BaseX</text:p>
      <text:p text:style-name="P36"><text:tab/>XML structural search.</text:p>
      <text:p text:style-name="P36"><text:soft-page-break/>Weakness:</text:p>
      <text:list text:style-name="L35">
        <text:list-item>
          <text:p text:style-name="P133">no vector search</text:p>
        </text:list-item>
        <text:list-item>
          <text:p text:style-name="P133">limited IR capabilities</text:p>
        </text:list-item>
      </text:list>
      <text:p text:style-name="P36"/>
      <text:p text:style-name="Standard">eXist-db</text:p>
      <text:p text:style-name="P71"><text:tab/>Similar category.</text:p>
      <text:h text:style-name="P89" text:outline-level="3" text:is-list-header="true">5<text:span text:style-name="T192">) </text:span><text:s/>Embedded Databases (indirect competitors)</text:h>
      <text:p text:style-name="Standard">SQLite</text:p>
      <text:p text:style-name="Standard"><text:tab/>Many RAG systems are now built on top of SQLite + vector extensions.</text:p>
      <text:p text:style-name="Standard"/>
      <text:p text:style-name="Standard">DuckDB</text:p>
      <text:p text:style-name="Standard"><text:tab/>Often used locally for data analysis.</text:p>
      <text:h text:style-name="P90" text:outline-level="3" text:is-list-header="true">6<text:span text:style-name="T192">)</text:span> RAG Framework Ecosystems</text:h>
      <text:p text:style-name="P59"><text:span text:style-name="T71">These are </text:span><text:span text:style-name="Strong_20_Emphasis"><text:span text:style-name="T71">indirect competitors</text:span></text:span><text:span text:style-name="T71">, because they often define the retrieval stack.</text:span></text:p>
      <text:p text:style-name="P36">LangChain</text:p>
      <text:p text:style-name="P36"><text:tab/>Often integrates with:</text:p>
      <text:list text:style-name="L36">
        <text:list-item>
          <text:p text:style-name="P134">FAISS</text:p>
        </text:list-item>
        <text:list-item>
          <text:p text:style-name="P134">Pinecone</text:p>
        </text:list-item>
        <text:list-item>
          <text:p text:style-name="P134">Qdrant</text:p>
        </text:list-item>
      </text:list>
      <text:p text:style-name="Horizontal_20_Line"/>
      <text:p text:style-name="P36"/>
      <text:p text:style-name="P36">LlamaIndex</text:p>
      <text:p text:style-name="P36"><text:tab/>Focused on document ingestion for RAG.</text:p>
      <text:p text:style-name="P73"><text:span text:style-name="T163"/></text:p>
      <text:p text:style-name="P7"><text:span text:style-name="T219">Appendix I</text:span><text:span text:style-name="T224">V</text:span><text:span text:style-name="T219">: Used Technologies and main AI tech</text:span></text:p>
      <text:p text:style-name="P16"/>
      <text:p text:style-name="P36"><text:span text:style-name="T11">The core is </text:span><text:span text:style-name="T171">a </text:span><text:span text:style-name="T19">novel multimodal search and retrieval engine. It is </text:span><text:span text:style-name="T172">a kind of hybrid between full-text, XML, object and graph noSQL-db that natively ingests a wide range of document types and </text:span><text:span text:style-name="T173">data </text:span><text:span text:style-name="T172">formats. </text:span><text:span text:style-name="T174">Lexical search is based not on inverted indexes but on Pat </text:span><text:span text:style-name="T173">Arrays</text:span><text:span text:style-name="T174"> with a two-tier address-based caching system that solve</text:span><text:span text:style-name="T173">d </text:span><text:span text:style-name="T174">its main limitations. <text:s/>Dense vector search is handled by HNSW. The implementation is based on the HNSWlib references but heavily enhanced and turbo-charged. <text:s/></text:span></text:p>
      <text:p text:style-name="P36"><text:span text:style-name="T174"/></text:p>
      <text:p text:style-name="P116" loext:marker-style-name="T175"><text:span text:style-name="T179">Behind our embeddings is our fork of bert.cpp and the mainlined llama.cpp. Behind these is the GGML tensor library. <text:s/>Unlike mainstream vendor libraries (like PyTorch, TensorFlow, or TensorRT) built for data-center GPUs, GGML runs large transformer models efficiently on commodity hardware.</text:span></text:p>
      <text:p text:style-name="P117" loext:marker-style-name="T175"><text:span text:style-name="T178"/></text:p>
      <text:p text:style-name="P115" loext:marker-style-name="T175"><text:span text:style-name="T170">1. </text:span><text:span text:style-name="T176">Superior CPU and Edge Device Executio</text:span><text:span text:style-name="T170">n.</text:span></text:p>
      <text:p text:style-name="P115" loext:marker-style-name="T175"><text:span text:style-name="T170">Mainstream libraries rely heavily on massive GPU VRAM to hold model weights during inference. GGML is written in plain C and C++, making it highly portable.</text:span><text:span text:style-name="T170"/></text:p>
      <text:list text:style-name="L37">
        <text:list-item>
          <text:p text:style-name="P156" loext:marker-style-name="T175"><text:span text:style-name="T181">Zero Dependencies</text:span><text:span text:style-name="T180">: It requires no heavy third-party stacks (such as CUDA or ROCm) just to run on a standard machine.</text:span></text:p>
        </text:list-item>
        <text:list-item>
          <text:p text:style-name="P156" loext:marker-style-name="T175"><text:span text:style-name="T181">Hardware Interoperability</text:span><text:span text:style-name="T180">: It is optimized for x86 architectures (AVX, AVX2, AVX-512) and Apple Silicon (via native ARM NEON and Metal).</text:span></text:p>
        </text:list-item>
        <text:list-item>
          <text:p text:style-name="P156" loext:marker-style-name="T175"><text:span text:style-name="T181">System RAM Utilization</text:span><text:span text:style-name="T180">: Because most modern consumer computers feature far more system RAM than GPU VRAM, GGML natively bridges the gap by enabling models to run efficiently on standard CPUs or via CPU-GPU offloading.</text:span></text:p>
          <text:p text:style-name="P156" loext:marker-style-name="T175"><text:span text:style-name="T180"/></text:p>
        </text:list-item>
      </text:list>
      <text:p text:style-name="P157" loext:marker-style-name="T175"><text:span text:style-name="T180">2. </text:span><text:span text:style-name="T182">Accelerators</text:span><text:span text:style-name="T180">: GGML features a highly modular backend architecture. This layout allows it to offload computation graph execution to a variety of hardware accelerators via specific hardware drivers, completely bypassing heavy Python stacks.</text:span></text:p>
      <text:p text:style-name="P162" loext:marker-style-name="T175"><text:soft-page-break/></text:p>
      <text:p text:style-name="P162" loext:marker-style-name="T175"/>
      <text:p text:style-name="P115" loext:marker-style-name="T175"><text:span text:style-name="T170">3. </text:span><text:span text:style-name="T176">Advanced, Fine-Grained Quantization</text:span><text:span text:style-name="T170">: One of GGML's most compelling features is its pioneering approach to model quantization (compressing floating-point numbers into lower bit-widths, such as 4-bit or 5-bit).</text:span></text:p>
      <text:list text:style-name="L38">
        <text:list-item>
          <text:p text:style-name="P158" loext:marker-style-name="T175"><text:span text:style-name="T181">K-Quants</text:span><text:span text:style-name="T180">: GGML utilizes highly engineered, variable bit-width quantization strategies (like Q4_K_M) that minimize the traditional loss in output accuracy.</text:span></text:p>
        </text:list-item>
        <text:list-item>
          <text:p text:style-name="P158" loext:marker-style-name="T175"><text:span text:style-name="T181">Memory Compression</text:span><text:span text:style-name="T180">: It shrinks the memory footprint of massive models by up to 70-80% without heavily compromising the model's perplexity or reasoning capabilities.</text:span></text:p>
        </text:list-item>
      </text:list>
      <text:p text:style-name="P163" loext:marker-style-name="T175"/>
      <text:p text:style-name="P115" loext:marker-style-name="T175"><text:span text:style-name="T170">4. </text:span><text:span text:style-name="T176">Streamlined Portabilit</text:span><text:span text:style-name="T170">y (The GGUF Standard). GGML's associated file format, GGUF, was specifically designed to solve the fragmentation and loading issues of older ML formats.</text:span></text:p>
      <text:p text:style-name="P163" loext:marker-style-name="T175"/>
      <text:p text:style-name="P115" loext:marker-style-name="T175"><text:span text:style-name="T170">5. </text:span><text:span text:style-name="T176">No Python Overhead</text:span></text:p>
      <text:p text:style-name="P163" loext:marker-style-name="T175"/>
      <text:p text:style-name="P115" loext:marker-style-name="T175"><text:span text:style-name="T170">6. </text:span><text:span text:style-name="T176">Specialized Text-Generation Ecosystem</text:span></text:p>
      <text:p text:style-name="P163" loext:marker-style-name="T175"/>
      <text:p text:style-name="P115" loext:marker-style-name="T175"><text:span text:style-name="T170">While mainstream libraries like TensorRT or PyTorch remain undisputed for model training and high-throughput server farms, GGML democratizes access to AI by allowing us to run powerful models locally on mainstream hardware.</text:span><text:span text:style-name="T170"/></text:p>
      <text:p text:style-name="P163" loext:marker-style-name="T175"/>
      <text:p text:style-name="P80">While we build upon a heavily refactored bert.cpp we also support llama.cpp for more modern sophisticated models that don't use the BERT architecture such as EuroBERT.</text:p>
      <text:p text:style-name="P35"><text:span text:style-name="T170"/></text:p>
      <text:p text:style-name="P5"><text:span text:style-name="T183">Appendix </text:span><text:span text:style-name="T184">V</text:span><text:span text:style-name="T183">: </text:span><text:span text:style-name="T185">Accelerators</text:span></text:p>
      <text:p text:style-name="P115" loext:marker-style-name="T175"><text:span text:style-name="T185">Our <text:s/></text:span><text:span text:style-name="T186">lexical algorithms and </text:span><text:span text:style-name="T185">HNSW implementation is, by design, CPU bound (</text:span><text:span text:style-name="T186">the later </text:span><text:span text:style-name="T185">using heavily optimized SIMD instructions) to leave the accelerators free to do the heavy lifting of running the models. Even on an Apple M1 (Pro) we've clocked 13k QPS-- on an M5 Pro we expect 30,000 to 39,000+ QPS-- so we found ample state-of-the-art performance already on CPUs.</text:span></text:p>
      <text:p text:style-name="P119" loext:marker-style-name="T175"><text:span text:style-name="T170"/></text:p>
      <text:p text:style-name="P115" loext:marker-style-name="T175"><text:span text:style-name="T185">1. </text:span><text:span text:style-name="T177">NVIDIA CUDA</text:span></text:p>
      <text:list text:style-name="L39">
        <text:list-item>
          <text:p text:style-name="P159" loext:marker-style-name="T175"><text:span text:style-name="T180"><text:s/></text:span><text:span text:style-name="T181">Quality</text:span><text:span text:style-name="T180">: This is the most mature, heavily optimized backend in the GGML ecosystem. It receives immediate day-one updates for new architectures.</text:span></text:p>
        </text:list-item>
        <text:list-item>
          <text:p text:style-name="P159" loext:marker-style-name="T175"><text:span text:style-name="T181">Performance</text:span><text:span text:style-name="T180">: Offers the highest token-per-second generation rates. It handles massive context windows and batched requests effortlessly.</text:span></text:p>
        </text:list-item>
        <text:list-item>
          <text:p text:style-name="P159" loext:marker-style-name="T175"><text:span text:style-name="T181">Efficiency</text:span><text:span text:style-name="T180">: While desktop NVIDIA cards draw significant wattage, the work-per-watt remains high because the GPU completes the generation sequence rapidly and returns to idle.</text:span></text:p>
        </text:list-item>
      </text:list>
      <text:p text:style-name="P163" loext:marker-style-name="T175"/>
      <text:p text:style-name="P115" loext:marker-style-name="T175"><text:span text:style-name="T170">2. </text:span><text:span text:style-name="T176">Apple Metal </text:span></text:p>
      <text:list text:style-name="L40">
        <text:list-item>
          <text:p text:style-name="P160" loext:marker-style-name="T175"><text:span text:style-name="T181">Quality</text:span><text:span text:style-name="T180">: Flawless integration natively recognized by macOS and iOS.</text:span></text:p>
        </text:list-item>
        <text:list-item>
          <text:p text:style-name="P160" loext:marker-style-name="T175"><text:span text:style-name="T181">Performance</text:span><text:span text:style-name="T180">: Extremely rapid. Because Apple Silicon uses a Unified Memory Architecture, the CPU and GPU share the same physical RAM pool. GGML leverages this via mmap, allowing a model to load instantly without a slow transfer over a PCIe bus.</text:span></text:p>
        </text:list-item>
        <text:list-item>
          <text:p text:style-name="P160" loext:marker-style-name="T175"><text:span text:style-name="T181">Efficiency</text:span><text:span text:style-name="T180">: Unmatched. Users can run quantized 70B models locally on a MacBook with minimal heat production, preserving battery life during background operations.</text:span></text:p>
        </text:list-item>
      </text:list>
      <text:p text:style-name="P163" loext:marker-style-name="T175"/>
      <text:p text:style-name="P115" loext:marker-style-name="T175"><text:span text:style-name="T170">3. </text:span><text:span text:style-name="T176">Vulkan</text:span><text:span text:style-name="T170"> (The Compatibility Champion)</text:span></text:p>
      <text:list text:style-name="L41">
        <text:list-item>
          <text:p text:style-name="P161" loext:marker-style-name="T175"><text:span text:style-name="T181">Quality</text:span><text:span text:style-name="T180">: Highly robust and serves as the best open-source, vendor-agnostic fallback.</text:span></text:p>
        </text:list-item>
        <text:list-item>
          <text:p text:style-name="P161" loext:marker-style-name="T175"><text:span text:style-name="T181">Performance</text:span><text:span text:style-name="T180">: While it slightly lags behind native CUDA or ROCm tweaks, it delivers impressive matrix-multiplication speeds across diverse hardware, including Steam Decks, Raspberry Pis, and mixed-GPU setups.</text:span></text:p>
        </text:list-item>
        <text:list-item>
          <text:p text:style-name="P161" loext:marker-style-name="T175"><text:span text:style-name="T181">Efficiency</text:span><text:span text:style-name="T180">: Balanced. Vulkan provides hardware acceleration on low-power devices that lack </text:span><text:soft-page-break/><text:span text:style-name="T180">dedicated AI chips.</text:span></text:p>
        </text:list-item>
      </text:list>
      <text:p text:style-name="P163" loext:marker-style-name="T175"/>
      <text:p text:style-name="P5"><text:span text:style-name="T185"/></text:p>
      <text:p text:style-name="P35"/>
      <text:p text:style-name="P2"><text:span text:style-name="T169">Appendix </text:span><text:span text:style-name="T213">V</text:span><text:span text:style-name="T243">I</text:span><text:span text:style-name="T169">: </text:span>Vector search performance</text:p>
      <text:p text:style-name="P12"/>
      <text:p text:style-name="P8">Speed matters because RAG pipelines are dominated by retrieval latency. <text:span text:style-name="T14">F</text:span>aster retrieval can dramatically improve RAG pipelines</text:p>
      <table:table table:name="Table1" table:style-name="Table1">
        <table:table-column table:style-name="Table1.A"/>
        <table:table-column table:style-name="Table1.B"/>
        <table:table-column table:style-name="Table1.C"/>
        <table:table-row>
          <table:table-cell table:style-name="Table1.A1" office:value-type="string">
            <text:p text:style-name="P13">System</text:p>
          </table:table-cell>
          <table:table-cell table:style-name="Table1.A1" office:value-type="string">
            <text:p text:style-name="P13">Approx QPS (768d)</text:p>
          </table:table-cell>
          <table:table-cell table:style-name="Table1.A1" office:value-type="string">
            <text:p text:style-name="P13">Notes</text:p>
          </table:table-cell>
        </table:table-row>
        <table:table-row>
          <table:table-cell table:style-name="Table1.A1" office:value-type="string">
            <text:p text:style-name="P40">Qdrant</text:p>
          </table:table-cell>
          <table:table-cell table:style-name="Table1.A1" office:value-type="string">
            <text:p text:style-name="P40">~1k–3k</text:p>
          </table:table-cell>
          <table:table-cell table:style-name="Table1.A1" office:value-type="string">
            <text:p text:style-name="P40">depends heavily on HNSW tuning</text:p>
          </table:table-cell>
        </table:table-row>
        <table:table-row table:style-name="Table1.3">
          <table:table-cell table:style-name="Table1.A1" office:value-type="string">
            <text:p text:style-name="P40">Milvus</text:p>
          </table:table-cell>
          <table:table-cell table:style-name="Table1.A1" office:value-type="string">
            <text:p text:style-name="P40">~2k–5k</text:p>
          </table:table-cell>
          <table:table-cell table:style-name="Table1.A1" office:value-type="string">
            <text:p text:style-name="P40">heavier infra</text:p>
          </table:table-cell>
        </table:table-row>
        <table:table-row>
          <table:table-cell table:style-name="Table1.A1" office:value-type="string">
            <text:p text:style-name="P40">FAISS</text:p>
          </table:table-cell>
          <table:table-cell table:style-name="Table1.A1" office:value-type="string">
            <text:p text:style-name="P40">~5k–10k</text:p>
          </table:table-cell>
          <table:table-cell table:style-name="Table1.A1" office:value-type="string">
            <text:p text:style-name="P40">optimized C++ but limited system features</text:p>
          </table:table-cell>
        </table:table-row>
        <table:table-row>
          <table:table-cell table:style-name="Table1.A1" office:value-type="string">
            <text:p text:style-name="P40">Elasticsearch</text:p>
          </table:table-cell>
          <table:table-cell table:style-name="Table1.A1" office:value-type="string">
            <text:p text:style-name="P40">usually &lt;2k</text:p>
          </table:table-cell>
          <table:table-cell table:style-name="Table1.A1" office:value-type="string">
            <text:p text:style-name="P40">heavy overhead</text:p>
          </table:table-cell>
        </table:table-row>
        <table:table-row>
          <table:table-cell table:style-name="Table1.A1" office:value-type="string">
            <text:p text:style-name="P43">Quarry HNSW</text:p>
          </table:table-cell>
          <table:table-cell table:style-name="Table1.A1" office:value-type="string">
            <text:p text:style-name="P43">13k</text:p>
          </table:table-cell>
          <table:table-cell table:style-name="Table1.A1" office:value-type="string">
            <text:p text:style-name="P43">C++.</text:p>
          </table:table-cell>
        </table:table-row>
      </table:table>
      <text:p text:style-name="Text_20_body"/>
      <text:p text:style-name="P14"><text:span text:style-name="T14">Comparing to</text:span> FAISS and single thread <text:span text:style-name="T14">on an Apple M1:</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Index type</text:p>
          </table:table-cell>
          <table:table-cell table:style-name="Table2.A1" office:value-type="string">
            <text:p text:style-name="P13">Dataset size</text:p>
          </table:table-cell>
          <table:table-cell table:style-name="Table2.A1" office:value-type="string">
            <text:p text:style-name="P13">QPS (1 thread)</text:p>
          </table:table-cell>
          <table:table-cell table:style-name="Table2.A1" office:value-type="string">
            <text:p text:style-name="P13">Notes</text:p>
          </table:table-cell>
        </table:table-row>
        <table:table-row>
          <table:table-cell table:style-name="Table2.A1" office:value-type="string">
            <text:p text:style-name="P40">Flat (exact search)</text:p>
          </table:table-cell>
          <table:table-cell table:style-name="Table2.A1" office:value-type="string">
            <text:p text:style-name="P40">1M vectors</text:p>
          </table:table-cell>
          <table:table-cell table:style-name="Table2.A1" office:value-type="string">
            <text:p text:style-name="P40">40–120 QPS</text:p>
          </table:table-cell>
          <table:table-cell table:style-name="Table2.A1" office:value-type="string">
            <text:p text:style-name="P40">brute-force dot products</text:p>
          </table:table-cell>
        </table:table-row>
        <table:table-row>
          <table:table-cell table:style-name="Table2.A1" office:value-type="string">
            <text:p text:style-name="P40">IVFFlat</text:p>
          </table:table-cell>
          <table:table-cell table:style-name="Table2.A1" office:value-type="string">
            <text:p text:style-name="P40">1M vectors</text:p>
          </table:table-cell>
          <table:table-cell table:style-name="Table2.A1" office:value-type="string">
            <text:p text:style-name="P40">150–400 QPS</text:p>
          </table:table-cell>
          <table:table-cell table:style-name="Table2.A1" office:value-type="string">
            <text:p text:style-name="P40">typical ANN config</text:p>
          </table:table-cell>
        </table:table-row>
        <table:table-row>
          <table:table-cell table:style-name="Table2.A1" office:value-type="string">
            <text:p text:style-name="P40">IVFPQ</text:p>
          </table:table-cell>
          <table:table-cell table:style-name="Table2.A1" office:value-type="string">
            <text:p text:style-name="P40">1M vectors</text:p>
          </table:table-cell>
          <table:table-cell table:style-name="Table2.A1" office:value-type="string">
            <text:p text:style-name="P40">300–900 QPS</text:p>
          </table:table-cell>
          <table:table-cell table:style-name="Table2.A1" office:value-type="string">
            <text:p text:style-name="P40">quantized vectors</text:p>
          </table:table-cell>
        </table:table-row>
        <table:table-row>
          <table:table-cell table:style-name="Table2.A1" office:value-type="string">
            <text:p text:style-name="P40">HNSW (FAISS)</text:p>
          </table:table-cell>
          <table:table-cell table:style-name="Table2.A1" office:value-type="string">
            <text:p text:style-name="P40">1M vectors</text:p>
          </table:table-cell>
          <table:table-cell table:style-name="Table2.A1" office:value-type="string">
            <text:p text:style-name="P40">200–600 QPS</text:p>
          </table:table-cell>
          <table:table-cell table:style-name="Table2.A1" office:value-type="string">
            <text:p text:style-name="P40">depends heavily on efSearch</text:p>
          </table:table-cell>
        </table:table-row>
        <table:table-row>
          <table:table-cell table:style-name="Table2.A1" office:value-type="string">
            <text:p text:style-name="P43">Quarry HNSW</text:p>
          </table:table-cell>
          <table:table-cell table:style-name="Table2.A1" office:value-type="string">
            <text:p text:style-name="P43">1M vectors</text:p>
          </table:table-cell>
          <table:table-cell table:style-name="Table2.A1" office:value-type="string">
            <text:p text:style-name="P43">3000 QPS</text:p>
          </table:table-cell>
          <table:table-cell table:style-name="Table2.A1" office:value-type="string">
            <text:p text:style-name="P43">Faster for quantized vectors</text:p>
          </table:table-cell>
        </table:table-row>
      </table:table>
      <text:p text:style-name="P20"/>
      <text:p text:style-name="P36"><text:span text:style-name="T14">T</text:span><text:span text:style-name="T197">he C++ HNSWlib was already one of the fastest HNSW implementations on the market. </text:span><text:span text:style-name="T199">We kept to</text:span><text:span text:style-name="T197"> CPU only (to allow better utiliz</text:span><text:span text:style-name="T198">at</text:span><text:span text:style-name="T197">ion of the accelerators for the embedding models) but turbo-charged it to be 4-6x faster with Fp32 on ARM hardware </text:span><text:span text:style-name="T199">and</text:span><text:span text:style-name="T115"> </text:span><text:span text:style-name="T116">expanded it </text:span><text:span text:style-name="T115">support </text:span><text:span text:style-name="T116">larger</text:span><text:span text:style-name="T115"> datasets through </text:span><text:span text:style-name="T116">the reduction of memory demands through </text:span><text:span text:style-name="T115">quantization. </text:span><text:span text:style-name="T14">Comparing our optimized version with a straight compile (Clang without -O) the difference was 20x on an Apple M1. We also added </text:span><text:span text:style-name="T205">support </text:span><text:span text:style-name="T14">for pre-quantised models. These require not just much less memory but are also significantly faster than Fp32 </text:span><text:span text:style-name="T205">models—</text:span><text:span text:style-name="T206">since we implemented pass-through our HNSW graph networks also demand far less memory than solutions that pad to Fp32</text:span><text:span text:style-name="T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ppleSystemUIFont" svg:font-family="AppleSystemUIFont" style:font-family-generic="roman" style:font-pitch="variable"/>
    <style:font-face style:name="Caladea" svg:font-family="Caladea" style:font-adornments="Regular" style:font-family-generic="roman" style:font-pitch="variable"/>
    <style:font-face style:name="Carlito" svg:font-family="Carlito" style:font-family-generic="swiss" style:font-pitch="variable"/>
    <style:font-face style:name="Carlito1" svg:font-family="Carlito" style:font-adornments="Regular"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enlo-Regular" svg:font-family="Menlo-Regular" style:font-family-generic="roman" style:font-pitch="variable"/>
    <style:font-face style:name="Menlo-Regular1" svg:font-family="Menlo-Regular" style:font-adornments="Regular" style:font-family-generic="swiss"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1"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1pt"/>
    </style:style>
    <style:style style:name="Title" style:family="paragraph" style:parent-style-name="Heading" style:next-style-name="Subtitle"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Carlito" fo:font-size="14pt" officeooo:paragraph-rsid="008a423a" style:font-size-asian="14pt" style:font-size-complex="14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Quarry: Next-Generation Knowledge Retrieval Kernel for Local AI Applications.</text:p>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8T12:55:38.058083757</meta:creation-date>
    <dc:title>Modern</dc:title>
    <meta:generator>LibreOffice/24.2.5.2$MacOSX_AARCH64 LibreOffice_project/bffef4ea93e59bebbeaf7f431bb02b1a39ee8a59</meta:generator>
    <meta:editing-duration>P3DT2H51M22S</meta:editing-duration>
    <meta:editing-cycles>91</meta:editing-cycles>
    <dc:date>2026-05-21T11:44:54.858195886</dc:date>
    <meta:print-date>2026-04-27T16:40:29.257881040</meta:print-date>
    <meta:printed-by>PDF files</meta:printed-by>
    <meta:document-statistic meta:table-count="13" meta:image-count="23" meta:object-count="0" meta:page-count="16" meta:paragraph-count="527" meta:word-count="5131" meta:character-count="33353" meta:non-whitespace-character-count="28727"/>
    <meta:template xlink:type="simple" xlink:actuate="onRequest" xlink:title="Modern" xlink:href="../../../../Applications/LibreOffice.app/Contents/Resources/template/common/styles/Modern.ott" meta:date="2026-03-08T12:55:37.918077831"/>
  </office:meta>
</office:document-meta>
</file>