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5F000000718D2E9B9B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webkit-standard" svg:font-family="webkit-standard"/>
  </office:font-face-decls>
  <office:automatic-styles>
    <style:style style:name="P1" style:family="paragraph" style:parent-style-name="Heading_20_1">
      <style:text-properties fo:font-variant="normal" fo:text-transform="none" fo:color="#000000" loext:opacity="100%" fo:letter-spacing="normal" fo:font-style="normal" fo:font-weight="normal" officeooo:rsid="0014064e" officeooo:paragraph-rsid="0014064e"/>
    </style:style>
    <style:style style:name="P2" style:family="paragraph" style:parent-style-name="Heading_20_1">
      <style:text-properties fo:font-variant="normal" fo:text-transform="none" fo:color="#000000" loext:opacity="100%" fo:font-size="28pt" fo:letter-spacing="normal" fo:font-style="normal" fo:font-weight="normal" officeooo:rsid="0014064e" officeooo:paragraph-rsid="0014064e" style:font-size-asian="28pt" style:font-size-complex="28pt"/>
    </style:style>
    <style:style style:name="P3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ize-complex="18pt"/>
    </style:style>
    <style:style style:name="P4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Heading_20_3">
      <style:paragraph-properties fo:margin-left="0in" fo:margin-right="0in" fo:text-indent="0in" style:auto-text-indent="false"/>
    </style:style>
    <style:style style:name="P6" style:family="paragraph" style:parent-style-name="Standard">
      <style:text-properties officeooo:rsid="0014064e" officeooo:paragraph-rsid="0014064e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5b2ac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612a8"/>
    </style:style>
    <style:style style:name="T4" style:family="text">
      <style:text-properties fo:font-variant="normal" fo:text-transform="none" fo:color="#000000" loext:opacity="100%" style:font-name="webkit-standard" fo:font-size="14pt" fo:letter-spacing="normal" fo:font-style="normal" fo:font-weight="normal"/>
    </style:style>
    <style:style style:name="T5" style:family="text">
      <style:text-properties officeooo:rsid="001612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span text:style-name="Emphasis"><text:span text:style-name="T3">P</text:span></text:span><text:span text:style-name="Emphasis"><text:span text:style-name="T1">rinciples embodied by CoreQuarry</text:span></text:span></text:h>
      <text:h text:style-name="P4" text:outline-level="2">Preamble</text:h>
      <text:p text:style-name="P7">Knowledge systems should not be defined by the technologies of their time, but by the principles that remain valid as technologies evolve.</text:p>
      <text:p text:style-name="P7">Representations change. Storage models change. Query languages change. Artificial intelligence will change. Yet the need to preserve, discover, relate, and understand knowledge endures.</text:p>
      <text:p text:style-name="P7">This Constitution sets out the architectural principles for knowledge systems intended to remain useful across changing technologies, domains, and generations.</text:p>
      <text:p text:style-name="Horizontal_20_Line"/>
      <text:h text:style-name="P3" text:outline-level="1"><text:span text:style-name="T5">Article </text:span>I. Knowledge is Derived</text:h>
      <text:p text:style-name="P7">Information is not knowledge.</text:p>
      <text:p text:style-name="P7">Knowledge arises through interpretation, communication, context, provenance, and inquiry.</text:p>
      <text:p text:style-name="P7">A knowledge system therefore preserves the conditions from which knowledge may be derived rather than claiming to contain knowledge itself.</text:p>
      <text:p text:style-name="Horizontal_20_Line"/>
      <text:h text:style-name="P3" text:outline-level="1"><text:span text:style-name="T5">Article </text:span>II. Artifacts are Primary</text:h>
      <text:p text:style-name="P7">The fundamental objects of a knowledge system are artifacts.</text:p>
      <text:p text:style-name="P7">Artifacts may be documents, records, fragments, observations, messages, datasets, images, software, or other representations of human or computational activity.</text:p>
      <text:p text:style-name="P7">No particular representation shall be privileged.</text:p>
      <text:p text:style-name="Horizontal_20_Line"/>
      <text:h text:style-name="P3" text:outline-level="1"><text:span text:style-name="T5">Article </text:span>III. Essence is Independent of Representation</text:h>
      <text:p text:style-name="P7">Representation is not essence.</text:p>
      <text:p text:style-name="P7">XML, JSON, MIME, RDF, relational tables, binary formats, or future representations are expressions of underlying abstractions rather than the abstractions themselves.</text:p>
      <text:p text:style-name="P7">A knowledge system should preserve structural and semantic continuity independently of presentation syntax.</text:p>
      <text:p text:style-name="Horizontal_20_Line"/>
      <text:h text:style-name="P3" text:outline-level="1"><text:soft-page-break/><text:span text:style-name="T5">Article </text:span>IV. Inquiry Determines Retrieval</text:h>
      <text:p text:style-name="P7">Storage boundaries shall not determine the boundaries of inquiry.</text:p>
      <text:p text:style-name="P7">The appropriate unit of retrieval is determined by the question being asked.</text:p>
      <text:p text:style-name="P7">An inquiry may retrieve a fragment, a document, a record, a collection, a structural element, or a composed result drawn from multiple sources.</text:p>
      <text:p text:style-name="Horizontal_20_Line"/>
      <text:h text:style-name="P3" text:outline-level="1"><text:span text:style-name="T5">Article </text:span>V. Authority Shall Be Respected</text:h>
      <text:p text:style-name="P7">Not all authoritative knowledge belongs within a repository.</text:p>
      <text:p text:style-name="P7">Knowledge systems shall distinguish between preserved artifacts and maintained operational state.</text:p>
      <text:p text:style-name="P7">Authoritative operational systems should remain authoritative while participating in inquiry when appropriate.</text:p>
      <text:p text:style-name="Horizontal_20_Line"/>
      <text:h text:style-name="P3" text:outline-level="1"><text:span text:style-name="T5">Article </text:span>VI. Structure Precedes Implementation</text:h>
      <text:p text:style-name="P7">Architectural abstractions should precede implementation choices.</text:p>
      <text:p text:style-name="P7">Data structures, storage engines, query languages, indexing methods, embedding models, and retrieval algorithms are realizations of architectural principles rather than their definition.</text:p>
      <text:p text:style-name="P7">No implementation shall define the architecture.</text:p>
      <text:p text:style-name="Horizontal_20_Line"/>
      <text:h text:style-name="P3" text:outline-level="1"><text:span text:style-name="T5">Article </text:span>VII. Semantic Continuity Shall Be Preserved</text:h>
      <text:p text:style-name="P7">Names, schemas, and representations evolve.</text:p>
      <text:p text:style-name="P7">Meaning should remain discoverable despite those changes.</text:p>
      <text:p text:style-name="P7">Knowledge systems should preserve semantic continuity through explicit mappings and structural abstractions rather than requiring uniform representations.</text:p>
      <text:p text:style-name="Horizontal_20_Line"/>
      <text:h text:style-name="P3" text:outline-level="1"><text:span text:style-name="T5">Article </text:span>VIII. Generalization Before Specialization</text:h>
      <text:p text:style-name="P7">Architectures evolve through discovering broader abstractions.</text:p>
      <text:p text:style-name="P7">Capabilities that reveal general principles belong within the architecture.</text:p>
      <text:p text:style-name="P7">Requirements that express local policy belong at explicit extension points.</text:p>
      <text:p text:style-name="P7"><text:soft-page-break/>The architecture shall grow through abstraction rather than the accumulation of exceptions.</text:p>
      <text:p text:style-name="Horizontal_20_Line"/>
      <text:h text:style-name="P3" text:outline-level="1"><text:span text:style-name="T5">Article </text:span>IX. Inquiry May Be Composed</text:h>
      <text:p text:style-name="P7">Answers need not originate from a single repository.</text:p>
      <text:p text:style-name="P7">Inquiry may compose preserved artifacts, derived knowledge, delegated capabilities, and authoritative external systems into a coherent and defensible result.</text:p>
      <text:p text:style-name="P7">Composition is a property of inquiry rather than storage.</text:p>
      <text:p text:style-name="Horizontal_20_Line"/>
      <text:h text:style-name="P3" text:outline-level="1"><text:span text:style-name="T5">Article </text:span>X. Provenance Enables Trust</text:h>
      <text:p text:style-name="P7">Every contribution to an inquiry should be attributable.</text:p>
      <text:p text:style-name="P7">The origin of artifacts, derived results, delegated evaluations, and transformations should remain visible.</text:p>
      <text:p text:style-name="P7">Trust depends not upon certainty but upon defensibility.</text:p>
      <text:p text:style-name="Horizontal_20_Line"/>
      <text:h text:style-name="P3" text:outline-level="1"><text:span text:style-name="T5">Article </text:span>XI. Engineering Accepts Uncertainty</text:h>
      <text:p text:style-name="P7">Uncertainty is an inherent property of knowledge.</text:p>
      <text:p text:style-name="P7">The objective of engineering is not to eliminate uncertainty, but to design systems in which uncertainty is visible, decisions are defensible, and failures remain proportionate to their consequences.</text:p>
      <text:p text:style-name="Horizontal_20_Line"/>
      <text:h text:style-name="P3" text:outline-level="1"><text:span text:style-name="T5">Article </text:span>XII. Architectures Should Outlive Technologies</text:h>
      <text:p text:style-name="P7">Technologies evolve.</text:p>
      <text:p text:style-name="P7">Architectural principles endure.</text:p>
      <text:p text:style-name="P7">A successful knowledge system is measured not by the popularity of its implementations, but by the continued relevance of the abstractions upon which they are built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webkit-standard" svg:font-family="webkit-standar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text-properties fo:font-variant="normal" fo:text-transform="none" fo:color="#000000" loext:opacity="100%" fo:letter-spacing="normal" fo:font-style="normal" fo:font-weight="normal" officeooo:rsid="0014064e" officeooo:paragraph-rsid="0014064e"/>
    </style:style>
    <style:style style:name="MP2" style:family="paragraph" style:parent-style-name="Heading_20_1">
      <style:text-properties fo:font-variant="normal" fo:text-transform="none" fo:color="#000000" loext:opacity="100%" fo:font-size="28pt" fo:letter-spacing="normal" fo:font-style="normal" fo:font-weight="normal" officeooo:rsid="0014064e" officeooo:paragraph-rsid="0014064e" style:font-size-asian="28pt" style:font-size-complex="2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A Constitution for Knowledge Systems</text:h>
      </style:header>
      <style:header-left>
        <text:h text:style-name="MP1" text:outline-level="1">A Constitution for Knowledge Systems</text:h>
      </style:header-left>
      <style:header-first>
        <text:h text:style-name="MP2" text:outline-level="1">A Constitution for Knowledge Systems<draw:frame draw:style-name="Mfr1" draw:name="Image1" text:anchor-type="char" svg:x="6.2457in" svg:y="-0.5354in" svg:width="0.9898in" svg:height="1.1772in" draw:z-index="0"><draw:image xlink:href="Pictures/100000010000005F000000718D2E9B9B.png" xlink:type="simple" xlink:show="embed" xlink:actuate="onLoad" draw:mime-type="image/png"/></draw:frame></text:h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3T13:26:44.332130349</meta:creation-date>
    <dc:date>2026-07-13T13:41:53.595841635</dc:date>
    <meta:editing-duration>PT15M9S</meta:editing-duration>
    <meta:editing-cycles>3</meta:editing-cycles>
    <meta:generator>LibreOffice/24.2.5.2$MacOSX_AARCH64 LibreOffice_project/bffef4ea93e59bebbeaf7f431bb02b1a39ee8a59</meta:generator>
    <meta:document-statistic meta:table-count="0" meta:image-count="1" meta:object-count="0" meta:page-count="3" meta:paragraph-count="57" meta:word-count="568" meta:character-count="4362" meta:non-whitespace-character-count="3851"/>
  </office:meta>
</office:document-meta>
</file>