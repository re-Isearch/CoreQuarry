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fo:font-size="24pt" officeooo:rsid="00132d5e" officeooo:paragraph-rsid="00132d5e" style:font-size-asian="24pt" style:font-size-complex="24pt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Standard">
      <style:text-properties officeooo:rsid="00132d5e" officeooo:paragraph-rsid="00132d5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officeooo:rsid="00132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Artifact</text:span></text:h>
      <text:p text:style-name="P5">An artifact is any preserved representation of human, organizational, scientific, or computational activity from which knowledge may be derived.</text:p>
      <text:p text:style-name="P5">Artifacts include, but are not limited to, documents, records, messages, datasets, images, software, multimedia, observations, and structured or unstructured content.</text:p>
      <text:p text:style-name="P5">An artifact is defined by its role in inquiry rather than by its representation or storage format.</text:p>
      <text:p text:style-name="Horizontal_20_Line"/>
      <text:h text:style-name="P3" text:outline-level="2">Authority</text:h>
      <text:p text:style-name="P5">The source responsible for maintaining the correctness and currency of a particular body of information.</text:p>
      <text:p text:style-name="P5">A knowledge system may preserve artifacts while delegating operational truth to authoritative external systems.</text:p>
      <text:p text:style-name="Horizontal_20_Line"/>
      <text:h text:style-name="P3" text:outline-level="2">Composition</text:h>
      <text:p text:style-name="P5">The act of forming an inquiry result from multiple artifacts, repositories, services, or authoritative sources.</text:p>
      <text:p text:style-name="P5">Composition occurs at inquiry time and need not imply physical integration of the underlying information.</text:p>
      <text:p text:style-name="Horizontal_20_Line"/>
      <text:h text:style-name="P3" text:outline-level="2">Essence</text:h>
      <text:p text:style-name="P5">The underlying structural and semantic identity of an artifact, independent of its presentation syntax or serialization.</text:p>
      <text:p text:style-name="P5">Different representations may express the same underlying essence.</text:p>
      <text:p text:style-name="Horizontal_20_Line"/>
      <text:h text:style-name="P3" text:outline-level="2">Field Unification</text:h>
      <text:p text:style-name="P5">The explicit mapping of structurally or semantically equivalent fields, paths, or attributes into a common conceptual view.</text:p>
      <text:p text:style-name="P5">Field unification preserves semantic continuity without requiring uniform schemas.</text:p>
      <text:p text:style-name="Horizontal_20_Line"/>
      <text:h text:style-name="P3" text:outline-level="2"><text:soft-page-break/>Information</text:h>
      <text:p text:style-name="P5">Representations that describe observations, events, measurements, or assertions.</text:p>
      <text:p text:style-name="P5">Information forms the material from which knowledge may be derived but is not itself knowledge.</text:p>
      <text:p text:style-name="Horizontal_20_Line"/>
      <text:h text:style-name="P3" text:outline-level="2">Inquiry</text:h>
      <text:p text:style-name="P5">The process of exploring artifacts in order to derive understanding.</text:p>
      <text:p text:style-name="P5">Inquiry is broader than search or retrieval. It may involve discovery, composition, analysis, comparison, navigation, interpretation, and interaction.</text:p>
      <text:p text:style-name="Horizontal_20_Line"/>
      <text:h text:style-name="P3" text:outline-level="2">Knowledge</text:h>
      <text:p text:style-name="P5">Understanding derived through interpretation, context, provenance, communication, and inquiry.</text:p>
      <text:p text:style-name="P5">Knowledge is not simply stored but continually constructed and refined.</text:p>
      <text:p text:style-name="Horizontal_20_Line"/>
      <text:h text:style-name="P3" text:outline-level="2">Knowledge System</text:h>
      <text:p text:style-name="P5">A system that preserves artifacts and enables inquiry across them while maintaining provenance, semantic continuity, and respect for authority.</text:p>
      <text:p text:style-name="Horizontal_20_Line"/>
      <text:h text:style-name="P3" text:outline-level="2">Operational State</text:h>
      <text:p text:style-name="P5">Information whose authoritative value changes over time and is maintained by an external operational system.</text:p>
      <text:p text:style-name="P5">Examples include inventory levels, exchange rates, sensor readings, and transaction status.</text:p>
      <text:p text:style-name="Horizontal_20_Line"/>
      <text:h text:style-name="P3" text:outline-level="2">Projection</text:h>
      <text:p text:style-name="P5">A particular representation or view of an underlying artifact or structure.</text:p>
      <text:p text:style-name="P5">Multiple projections may exist without altering the underlying essence.</text:p>
      <text:p text:style-name="Horizontal_20_Line"/>
      <text:h text:style-name="P3" text:outline-level="2"><text:soft-page-break/>Provenance</text:h>
      <text:p text:style-name="P5">Information describing the origin, history, ownership, or transformation of an artifact or derived result.</text:p>
      <text:p text:style-name="P5">Provenance supports transparency, traceability, and defensibility.</text:p>
      <text:p text:style-name="Horizontal_20_Line"/>
      <text:h text:style-name="P3" text:outline-level="2">Representation</text:h>
      <text:p text:style-name="P5">A concrete encoding or serialization of information.</text:p>
      <text:p text:style-name="P5">Representations may evolve independently of the underlying structure or meaning they express.</text:p>
      <text:p text:style-name="Horizontal_20_Line"/>
      <text:h text:style-name="P3" text:outline-level="2">Retrieval Unit</text:h>
      <text:p text:style-name="P5">The portion of information returned in response to an inquiry.</text:p>
      <text:p text:style-name="P5">The retrieval unit is determined by the inquiry and may range from a fragment to a composed collection of artifacts.</text:p>
      <text:p text:style-name="Horizontal_20_Line"/>
      <text:h text:style-name="P3" text:outline-level="2">Semantic Continuity</text:h>
      <text:p text:style-name="P5">The preservation of intended meaning despite changes in naming, schema, representation, or organizational structure.</text:p>
      <text:p text:style-name="Horizontal_20_Line"/>
      <text:h text:style-name="P3" text:outline-level="2">Structure</text:h>
      <text:p text:style-name="P5">The organization and relationships inherent in an artifact, independent of its external representation.</text:p>
      <text:p text:style-name="P5">Structure provides the foundation for inquiry and reconstruction.</text:p>
      <text:p text:style-name="Horizontal_20_Line"/>
      <text:h text:style-name="P3" text:outline-level="2">Trust</text:h>
      <text:p text:style-name="P5">Confidence arising from visible provenance, explicit authority, and defensible reasoning rather than from unsupported certainty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132d5e" officeooo:paragraph-rsid="00132d5e" style:font-size-asian="24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reQuarry Glossa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4T13:54:52.603996787</meta:creation-date>
    <dc:date>2026-07-14T13:56:09.391826604</dc:date>
    <meta:editing-duration>PT1M17S</meta:editing-duration>
    <meta:editing-cycles>1</meta:editing-cycles>
    <meta:document-statistic meta:table-count="0" meta:image-count="0" meta:object-count="0" meta:page-count="3" meta:paragraph-count="50" meta:word-count="443" meta:character-count="3395" meta:non-whitespace-character-count="3002"/>
    <meta:generator>LibreOffice/24.2.5.2$MacOSX_AARCH64 LibreOffice_project/bffef4ea93e59bebbeaf7f431bb02b1a39ee8a59</meta:generator>
  </office:meta>
</office:document-meta>
</file>